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9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withoutfill">
      <style:graphic-properties svg:stroke-width="0.035cm" svg:stroke-color="#000000" draw:marker-start-width="0.252cm" draw:marker-end="화살촉_20_1" draw:marker-end-width="0.252cm" draw:fill="none" draw:textarea-vertical-align="middle" fo:padding-top="0.142cm" fo:padding-bottom="0.142cm" fo:padding-left="0.267cm" fo:padding-right="0.267cm" loext:decorative="false"/>
    </style:style>
    <style:style style:name="co1" style:family="table-column">
      <style:table-column-properties style:column-width="4.3cm" style:use-optimal-column-width="false"/>
    </style:style>
    <style:style style:name="co2" style:family="table-column">
      <style:table-column-properties style:column-width="4.385cm" style:use-optimal-column-width="false"/>
    </style:style>
    <style:style style:name="ro1" style:family="table-row">
      <style:table-row-properties style:row-height="1.17cm" style:use-optimal-row-height="false"/>
    </style:style>
    <style:style style:name="ro2" style:family="table-row">
      <style:table-row-properties style:row-height="2.154cm" style:use-optimal-row-height="false"/>
    </style:style>
    <style:style style:name="ro3" style:family="table-row">
      <style:table-row-properties style:row-height="2.07cm" style:use-optimal-row-height="false"/>
    </style:style>
    <style:style style:name="ro4" style:family="table-row">
      <style:table-row-properties style:row-height="2.11cm" style:use-optimal-row-height="false"/>
    </style:style>
    <style:style style:name="ro5" style:family="table-row">
      <style:table-row-properties style:row-height="1.969cm" style:use-optimal-row-height="false"/>
    </style:style>
    <style:style style:name="ro6" style:family="table-row">
      <style:table-row-properties style:row-height="2.049cm" style:use-optimal-row-height="false"/>
    </style:style>
    <style:style style:name="ro7" style:family="table-row">
      <style:table-row-properties style:row-height="1.569cm" style:use-optimal-row-height="false"/>
    </style:style>
    <style:style style:name="ro8" style:family="table-row">
      <style:table-row-properties style:row-height="1.601cm" style:use-optimal-row-height="false"/>
    </style:style>
    <style:style style:name="ro9" style:family="table-row">
      <style:table-row-properties style:row-height="1.596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Mono" fo:font-size="12pt" fo:font-weight="bold" style:font-name-asian="Noto Sans Mono CJK KR" style:font-size-asian="12pt" style:font-weight-asian="bold" style:font-name-complex="Liberation Mono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frame draw:style-name="gr1" draw:layer="layout" svg:width="4.299cm" svg:height="1.428cm" svg:x="4.049cm" svg:y="2.59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bg-none">
                <text:p text:style-name="P1">프로젝트 생성</text:p>
                <text:p text:style-name="P1">(STEP 1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4.299cm" svg:height="2.153cm" svg:x="4.095cm" svg:y="4.794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bg-none">
                <text:p text:style-name="P1">Stage 1</text:p>
                <text:p text:style-name="P1"><text:s/>전략 수립 </text:p>
                <text:p text:style-name="P1"><text:s/>(STEP 2)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layer="layout" svg:width="4.384cm" svg:height="2.069cm" svg:x="4.041cm" svg:y="7.794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bg-none">
                <text:p text:style-name="P1">Stage 2</text:p>
                <text:p text:style-name="P1"><text:s/>설계 정의 </text:p>
                <text:p text:style-name="P1"><text:s/>(STEP 3)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layer="layout" svg:width="4.299cm" svg:height="2.109cm" svg:x="4.095cm" svg:y="10.648cm">
          <table:table table:template-name="default" table:use-first-row-styles="true" table:use-banding-rows-styles="true">
            <table:table-column table:style-name="co1"/>
            <table:table-row table:style-name="ro4">
              <table:table-cell table:style-name="bg-none">
                <text:p text:style-name="P1">Stage 3</text:p>
                <text:p text:style-name="P1">솔루션 구축</text:p>
                <text:p text:style-name="P1">(STEP 4)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layer="layout" svg:width="4.299cm" svg:height="2.042cm" svg:x="4.195cm" svg:y="13.59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bg-none">
                <text:p text:style-name="P1">Stage 4</text:p>
                <text:p text:style-name="P1"><text:s/>파일럿/확산 </text:p>
                <text:p text:style-name="P1"><text:s/>(STEP 5)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layer="layout" svg:width="4.299cm" svg:height="2.048cm" svg:x="4.195cm" svg:y="16.394cm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bg-none">
                <text:p text:style-name="P1">Stage 5</text:p>
                <text:p text:style-name="P1"><text:s/>운영/개선 </text:p>
                <text:p text:style-name="P1"><text:s/>(STEP 6)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layer="layout" svg:width="4.299cm" svg:height="1.428cm" svg:x="4.195cm" svg:y="19.24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bg-none">
                <text:p text:style-name="P1">시나리오 분석 </text:p>
                <text:p text:style-name="P1"><text:s/>(STEP 9)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draw:layer="layout" svg:width="4.299cm" svg:height="1.568cm" svg:x="4.195cm" svg:y="21.548cm">
          <table:table table:template-name="default" table:use-first-row-styles="true" table:use-banding-rows-styles="true">
            <table:table-column table:style-name="co1"/>
            <table:table-row table:style-name="ro7">
              <table:table-cell table:style-name="bg-none">
                <text:p text:style-name="P1">피드백/승인</text:p>
                <text:p text:style-name="P1"><text:s/>(STEP 10)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" draw:layer="layout" svg:width="4.299cm" svg:height="1.428cm" svg:x="4.095cm" svg:y="23.94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bg-none">
                <text:p text:style-name="P1">보고서 생성</text:p>
                <text:p text:style-name="P1"><text:s/>(STEP 11)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2" draw:text-style-name="P2" draw:layer="layout" svg:x1="6.196cm" svg:y1="3.992cm" svg:x2="6.196cm" svg:y2="4.992cm">
          <text:p/>
        </draw:line>
        <draw:line draw:style-name="gr2" draw:text-style-name="P2" draw:layer="layout" svg:x1="6.196cm" svg:y1="6.983cm" svg:x2="6.196cm" svg:y2="7.983cm">
          <text:p/>
        </draw:line>
        <draw:line draw:style-name="gr2" draw:text-style-name="P2" draw:layer="layout" svg:x1="6.196cm" svg:y1="9.874cm" svg:x2="6.196cm" svg:y2="10.874cm">
          <text:p/>
        </draw:line>
        <draw:line draw:style-name="gr2" draw:text-style-name="P2" draw:layer="layout" svg:x1="6.196cm" svg:y1="12.765cm" svg:x2="6.196cm" svg:y2="13.765cm">
          <text:p/>
        </draw:line>
        <draw:line draw:style-name="gr2" draw:text-style-name="P2" draw:layer="layout" svg:x1="6.196cm" svg:y1="15.656cm" svg:x2="6.196cm" svg:y2="16.656cm">
          <text:p/>
        </draw:line>
        <draw:line draw:style-name="gr2" draw:text-style-name="P2" draw:layer="layout" svg:x1="6.196cm" svg:y1="18.447cm" svg:x2="6.196cm" svg:y2="19.447cm">
          <text:p/>
        </draw:line>
        <draw:line draw:style-name="gr2" draw:text-style-name="P2" draw:layer="layout" svg:x1="6.196cm" svg:y1="20.638cm" svg:x2="6.196cm" svg:y2="21.638cm">
          <text:p/>
        </draw:line>
        <draw:line draw:style-name="gr2" draw:text-style-name="P2" draw:layer="layout" svg:x1="6.196cm" svg:y1="23.029cm" svg:x2="6.196cm" svg:y2="24.029cm">
          <text:p/>
        </draw:line>
        <draw:line draw:style-name="gr2" draw:text-style-name="P2" draw:layer="layout" svg:x1="6.196cm" svg:y1="25.42cm" svg:x2="6.196cm" svg:y2="26.42cm">
          <text:p/>
        </draw:line>
        <draw:frame draw:style-name="gr1" draw:layer="layout" svg:width="4.299cm" svg:height="1.6cm" svg:x="10.596cm" svg:y="10.949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bg-none">
                <text:p text:style-name="P3"><text:span text:style-name="T1">MLOps </text:span><text:span text:style-name="T1">표준</text:span></text:p>
                <text:p text:style-name="P3"><text:span text:style-name="T1">(STEP 7)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" draw:layer="layout" svg:width="4.299cm" svg:height="1.595cm" svg:x="10.596cm" svg:y="13.749cm">
          <table:table table:template-name="default" table:use-first-row-styles="true" table:use-banding-rows-styles="true">
            <table:table-column table:style-name="co1"/>
            <table:table-row table:style-name="ro9">
              <table:table-cell table:style-name="bg-none">
                <text:p text:style-name="P3"><text:span text:style-name="T1">인력 구성</text:span></text:p>
                <text:p text:style-name="P3"><text:span text:style-name="T1">(STEP 8)</text:span></text:p>
              </table:table-cell>
            </table:table-row>
          </table:table>
          <draw:image xlink:href="Pictures/TablePreview11.svm" xlink:type="simple" xlink:show="embed" xlink:actuate="onLoad"/>
        </draw:frame>
        <draw:line draw:style-name="gr2" draw:text-style-name="P2" draw:layer="layout" svg:x1="10.5cm" svg:y1="14.5cm" svg:x2="8.5cm" svg:y2="14.499cm">
          <text:p/>
        </draw:line>
        <draw:line draw:style-name="gr2" draw:text-style-name="P2" draw:layer="layout" svg:x1="10.509cm" svg:y1="11.701cm" svg:x2="8.509cm" svg:y2="11.7cm">
          <text:p/>
        </draw:line>
        <draw:line draw:style-name="gr2" draw:text-style-name="P2" draw:layer="layout" svg:x1="8.45cm" svg:y1="5.8cm" svg:x2="16cm" svg:y2="5.75cm">
          <text:p/>
        </draw:line>
        <draw:line draw:style-name="gr2" draw:text-style-name="P2" draw:layer="layout" svg:x1="16cm" svg:y1="5.75cm" svg:x2="16cm" svg:y2="14.5cm">
          <text:p/>
        </draw:line>
        <draw:line draw:style-name="gr2" draw:text-style-name="P2" draw:layer="layout" svg:x1="16cm" svg:y1="14.5cm" svg:x2="14.809cm" svg:y2="14.5cm">
          <text:p/>
        </draw:line>
        <draw:line draw:style-name="gr2" draw:text-style-name="P2" draw:layer="layout" svg:x1="16.01cm" svg:y1="11.7cm" svg:x2="14.819cm" svg:y2="11.7cm">
          <text:p/>
        </draw:line>
        <draw:frame draw:style-name="gr1" draw:layer="layout" svg:width="4.299cm" svg:height="1.169cm" svg:x="4.096cm" svg:y="26.44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2">【</text:span><text:span text:style-name="T2">컨</text:span><text:span text:style-name="T2">설</text:span><text:span text:style-name="T2">팅 </text:span><text:span text:style-name="T2">완</text:span><text:span text:style-name="T2">료</text:span><text:span text:style-name="T2">]</text:span></text:p>
              </table:table-cell>
            </table:table-row>
          </table:table>
          <draw:image xlink:href="Pictures/TablePreview12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draw:marker draw:name="화살촉_20_1" draw:display-name="화살촉 1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Noto Serif CJK KR" fo:font-family="'Noto Serif CJK KR'" style:font-family-generic="roman" style:font-pitch="variable" fo:font-size="10pt" fo:language="en" fo:country="US" style:font-name-asian="F" style:font-family-generic-asian="roman" style:font-size-asian="10pt" style:language-asian="ko" style:country-asian="KR" style:font-name-complex="Noto Serif CJK KR" style:font-family-complex="'Noto Serif CJK KR'" style:font-family-generic-complex="roman" style:font-pitch-complex="variable" style:font-size-complex="10pt" style:language-complex="hi" style:country-complex="IN"/>
    </style:style>
    <style:style style:name="표제목" style:family="graphic">
      <style:paragraph-properties fo:text-align="center" style:text-autospace="none"/>
      <style:text-properties fo:font-weight="bold" style:font-weight-asian="bold" style:font-weight-complex="bold"/>
    </style:style>
    <style:style style:name="표_20_내용" style:display-name="표 내용" style:family="graphic">
      <style:paragraph-properties style:text-autospace="none"/>
    </style:style>
    <style:style style:name="사전_20_서식_20_지정된_20_텍스트" style:display-name="사전 서식 지정된 텍스트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KR" style:font-family-asian="'Noto Sans Mono CJK KR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색인" style:family="graphic">
      <style:paragraph-properties style:text-autospace="none"/>
      <style:text-properties fo:font-size="12pt" style:font-size-asian="12pt" style:font-name-complex="Noto Sans Devanagari" style:font-family-complex="'Noto Sans Devanagari'" style:font-family-generic-complex="swiss" style:font-size-complex="12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fo:font-size="12pt" style:font-name-complex="Noto Sans Devanagari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Noto Sans CJK KR" fo:font-family="'Noto Sans CJK KR'" style:font-family-generic="roman" style:font-pitch="variable" fo:font-size="18pt" style:letter-kerning="true" style:font-name-asian="Noto Sans CJK KR1" style:font-family-asian="'Noto Sans CJK KR'" style:font-family-generic-asian="system" style:font-pitch-asian="variable" style:font-size-asian="18pt" style:font-name-complex="Noto Sans Devanagari1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7T08:39:50.151399240</meta:creation-date>
    <dc:date>2025-12-07T08:56:08.171799218</dc:date>
    <meta:editing-duration>PT5M50S</meta:editing-duration>
    <meta:editing-cycles>1</meta:editing-cycles>
    <meta:document-statistic meta:object-count="27"/>
    <meta:generator>LibreOffice/24.2.7.2$Linux_X86_64 LibreOffice_project/420$Build-2</meta:generator>
  </office:meta>
</office:document-meta>
</file>