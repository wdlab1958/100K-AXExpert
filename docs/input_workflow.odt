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50000002F1547AB3E.png" manifest:media-type="image/png"/>
  <manifest:file-entry manifest:full-path="Pictures/10000001000000A50000003FF8E0F073.png" manifest:media-type="image/png"/>
  <manifest:file-entry manifest:full-path="Pictures/2000004B000010F000000665118C5AB2.svm" manifest:media-type="image/x-svm"/>
  <manifest:file-entry manifest:full-path="Pictures/2000003A000010F0000004B66956596A.svm" manifest:media-type="image/x-svm"/>
  <manifest:file-entry manifest:full-path="Pictures/10000001000000A50000003F18DA24DE.png" manifest:media-type="image/png"/>
  <manifest:file-entry manifest:full-path="Pictures/10000001000000A500000038144ED984.png" manifest:media-type="image/png"/>
  <manifest:file-entry manifest:full-path="Pictures/2000004B000010F0000005B9AFD82611.svm" manifest:media-type="image/x-svm"/>
  <manifest:file-entry manifest:full-path="Pictures/10000001000000A50000003E49C4B16D.png" manifest:media-type="image/png"/>
  <manifest:file-entry manifest:full-path="Pictures/20000043000010F000000660D4F96AC6.svm" manifest:media-type="image/x-svm"/>
  <manifest:file-entry manifest:full-path="Pictures/20000054000010F000000645A8992803.svm" manifest:media-type="image/x-svm"/>
  <manifest:file-entry manifest:full-path="Pictures/20000045000010F0000005B9DB2772D8.svm" manifest:media-type="image/x-svm"/>
  <manifest:file-entry manifest:full-path="Pictures/10000001000000A500000038486C02FA.png" manifest:media-type="image/png"/>
  <manifest:file-entry manifest:full-path="Pictures/20000061000010F00000088EE59E7C10.svm" manifest:media-type="image/x-svm"/>
  <manifest:file-entry manifest:full-path="Pictures/2000006A000010F0000008255F81A4E9.svm" manifest:media-type="image/x-svm"/>
  <manifest:file-entry manifest:full-path="Pictures/10000001000000A5000000502DDB6393.png" manifest:media-type="image/png"/>
  <manifest:file-entry manifest:full-path="Pictures/10000001000000A5000000541CE22F4C.png" manifest:media-type="image/png"/>
  <manifest:file-entry manifest:full-path="Pictures/20000061000011450000083AD47688F2.svm" manifest:media-type="image/x-svm"/>
  <manifest:file-entry manifest:full-path="Pictures/2000004E000010F0000005B96BCE7150.svm" manifest:media-type="image/x-svm"/>
  <manifest:file-entry manifest:full-path="Pictures/10000001000000A5000000385E233370.png" manifest:media-type="image/png"/>
  <manifest:file-entry manifest:full-path="Pictures/10000001000000A8000000515433C684.png" manifest:media-type="image/png"/>
  <manifest:file-entry manifest:full-path="Pictures/10000001000000A5000000521A556AD2.png" manifest:media-type="image/png"/>
  <manifest:file-entry manifest:full-path="Pictures/20000053000010F000000862117D055C.svm" manifest:media-type="image/x-svm"/>
  <manifest:file-entry manifest:full-path="Pictures/2000006B000010F00000081FF83DD969.svm" manifest:media-type="image/x-svm"/>
  <manifest:file-entry manifest:full-path="Pictures/10000001000000A500000050372263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" svg:font-family="'Noto Sa'"/>
    <style:font-face style:name="Noto Sans" svg:font-family="'Noto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209cm" style:rel-column-width="2953*"/>
    </style:style>
    <style:style style:name="표1.B" style:family="table-column">
      <style:table-column-properties style:column-width="2.399cm" style:rel-column-width="1360*"/>
    </style:style>
    <style:style style:name="표1.C" style:family="table-column">
      <style:table-column-properties style:column-width="1.487cm" style:rel-column-width="843*"/>
    </style:style>
    <style:style style:name="표1.D" style:family="table-column">
      <style:table-column-properties style:column-width="7.906cm" style:rel-column-width="4482*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D1" style:family="table-cell">
      <style:table-cell-properties fo:padding="0.097cm" fo:border="0.5pt solid #000000"/>
    </style:style>
    <style:style style:name="표1.A2" style:family="table-cell">
      <style:table-cell-properties fo:padding="0.097cm" fo:border-left="0.5pt solid #000000" fo:border-right="none" fo:border-top="none" fo:border-bottom="0.5pt solid #000000"/>
    </style:style>
    <style:style style:name="표1.D2" style:family="table-cell">
      <style:table-cell-properties fo:padding="0.097cm" fo:border-left="0.5pt solid #000000" fo:border-right="0.5pt solid #000000" fo:border-top="none" fo:border-bottom="0.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5.106cm" style:rel-column-width="2895*"/>
    </style:style>
    <style:style style:name="표2.B" style:family="table-column">
      <style:table-column-properties style:column-width="2.501cm" style:rel-column-width="1418*"/>
    </style:style>
    <style:style style:name="표2.C" style:family="table-column">
      <style:table-column-properties style:column-width="1.487cm" style:rel-column-width="843*"/>
    </style:style>
    <style:style style:name="표2.D" style:family="table-column">
      <style:table-column-properties style:column-width="7.906cm" style:rel-column-width="4482*"/>
    </style:style>
    <style:style style:name="표2.A1" style:family="table-cell">
      <style:table-cell-properties fo:padding="0.097cm" fo:border-left="0.5pt solid #000000" fo:border-right="none" fo:border-top="0.5pt solid #000000" fo:border-bottom="0.5pt solid #000000"/>
    </style:style>
    <style:style style:name="표2.D1" style:family="table-cell">
      <style:table-cell-properties fo:padding="0.097cm" fo:border="0.5pt solid #000000"/>
    </style:style>
    <style:style style:name="표2.A2" style:family="table-cell">
      <style:table-cell-properties fo:padding="0.097cm" fo:border-left="0.5pt solid #000000" fo:border-right="none" fo:border-top="none" fo:border-bottom="0.5pt solid #000000"/>
    </style:style>
    <style:style style:name="표2.D2" style:family="table-cell">
      <style:table-cell-properties fo:padding="0.097cm" fo:border-left="0.5pt solid #000000" fo:border-right="0.5pt solid #000000" fo:border-top="none" fo:border-bottom="0.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5.106cm" style:rel-column-width="2895*"/>
    </style:style>
    <style:style style:name="표3.B" style:family="table-column">
      <style:table-column-properties style:column-width="2.501cm" style:rel-column-width="1418*"/>
    </style:style>
    <style:style style:name="표3.C" style:family="table-column">
      <style:table-column-properties style:column-width="1.487cm" style:rel-column-width="843*"/>
    </style:style>
    <style:style style:name="표3.D" style:family="table-column">
      <style:table-column-properties style:column-width="7.906cm" style:rel-column-width="4482*"/>
    </style:style>
    <style:style style:name="표3.A1" style:family="table-cell">
      <style:table-cell-properties fo:padding="0.097cm" fo:border-left="0.5pt solid #000000" fo:border-right="none" fo:border-top="0.5pt solid #000000" fo:border-bottom="0.5pt solid #000000"/>
    </style:style>
    <style:style style:name="표3.D1" style:family="table-cell">
      <style:table-cell-properties fo:padding="0.097cm" fo:border="0.5pt solid #000000"/>
    </style:style>
    <style:style style:name="표3.A2" style:family="table-cell">
      <style:table-cell-properties fo:padding="0.097cm" fo:border-left="0.5pt solid #000000" fo:border-right="none" fo:border-top="none" fo:border-bottom="0.5pt solid #000000"/>
    </style:style>
    <style:style style:name="표3.D2" style:family="table-cell">
      <style:table-cell-properties fo:padding="0.097cm" fo:border-left="0.5pt solid #000000" fo:border-right="0.5pt solid #000000" fo:border-top="none" fo:border-bottom="0.5pt solid #000000"/>
    </style:style>
    <style:style style:name="표3.3" style:family="table-row">
      <style:table-row-properties style:min-row-height="0.566cm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5.106cm" style:rel-column-width="2895*"/>
    </style:style>
    <style:style style:name="표4.B" style:family="table-column">
      <style:table-column-properties style:column-width="2.501cm" style:rel-column-width="1418*"/>
    </style:style>
    <style:style style:name="표4.C" style:family="table-column">
      <style:table-column-properties style:column-width="1.487cm" style:rel-column-width="843*"/>
    </style:style>
    <style:style style:name="표4.D" style:family="table-column">
      <style:table-column-properties style:column-width="7.906cm" style:rel-column-width="4482*"/>
    </style:style>
    <style:style style:name="표4.A1" style:family="table-cell">
      <style:table-cell-properties fo:padding="0.097cm" fo:border-left="0.5pt solid #000000" fo:border-right="none" fo:border-top="0.5pt solid #000000" fo:border-bottom="0.5pt solid #000000"/>
    </style:style>
    <style:style style:name="표4.D1" style:family="table-cell">
      <style:table-cell-properties fo:padding="0.097cm" fo:border="0.5pt solid #000000"/>
    </style:style>
    <style:style style:name="표4.A2" style:family="table-cell">
      <style:table-cell-properties fo:padding="0.097cm" fo:border-left="0.5pt solid #000000" fo:border-right="none" fo:border-top="none" fo:border-bottom="0.5pt solid #000000"/>
    </style:style>
    <style:style style:name="표4.D2" style:family="table-cell">
      <style:table-cell-properties fo:padding="0.097cm" fo:border-left="0.5pt solid #000000" fo:border-right="0.5pt solid #000000" fo:border-top="none" fo:border-bottom="0.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5.106cm" style:rel-column-width="2895*"/>
    </style:style>
    <style:style style:name="표5.B" style:family="table-column">
      <style:table-column-properties style:column-width="2.501cm" style:rel-column-width="1418*"/>
    </style:style>
    <style:style style:name="표5.C" style:family="table-column">
      <style:table-column-properties style:column-width="1.487cm" style:rel-column-width="843*"/>
    </style:style>
    <style:style style:name="표5.D" style:family="table-column">
      <style:table-column-properties style:column-width="7.906cm" style:rel-column-width="4482*"/>
    </style:style>
    <style:style style:name="표5.A1" style:family="table-cell">
      <style:table-cell-properties fo:padding="0.097cm" fo:border-left="0.5pt solid #000000" fo:border-right="none" fo:border-top="0.5pt solid #000000" fo:border-bottom="0.5pt solid #000000"/>
    </style:style>
    <style:style style:name="표5.D1" style:family="table-cell">
      <style:table-cell-properties fo:padding="0.097cm" fo:border="0.5pt solid #000000"/>
    </style:style>
    <style:style style:name="표5.A2" style:family="table-cell">
      <style:table-cell-properties fo:padding="0.097cm" fo:border-left="0.5pt solid #000000" fo:border-right="none" fo:border-top="none" fo:border-bottom="0.5pt solid #000000"/>
    </style:style>
    <style:style style:name="표5.D2" style:family="table-cell">
      <style:table-cell-properties fo:padding="0.097cm" fo:border-left="0.5pt solid #000000" fo:border-right="0.5pt solid #000000" fo:border-top="none" fo:border-bottom="0.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5.106cm" style:rel-column-width="2895*"/>
    </style:style>
    <style:style style:name="표6.B" style:family="table-column">
      <style:table-column-properties style:column-width="2.501cm" style:rel-column-width="1418*"/>
    </style:style>
    <style:style style:name="표6.C" style:family="table-column">
      <style:table-column-properties style:column-width="1.487cm" style:rel-column-width="843*"/>
    </style:style>
    <style:style style:name="표6.D" style:family="table-column">
      <style:table-column-properties style:column-width="7.906cm" style:rel-column-width="4482*"/>
    </style:style>
    <style:style style:name="표6.A1" style:family="table-cell">
      <style:table-cell-properties fo:padding="0.097cm" fo:border-left="0.5pt solid #000000" fo:border-right="none" fo:border-top="0.5pt solid #000000" fo:border-bottom="0.5pt solid #000000"/>
    </style:style>
    <style:style style:name="표6.D1" style:family="table-cell">
      <style:table-cell-properties fo:padding="0.097cm" fo:border="0.5pt solid #000000"/>
    </style:style>
    <style:style style:name="표6.A2" style:family="table-cell">
      <style:table-cell-properties fo:padding="0.097cm" fo:border-left="0.5pt solid #000000" fo:border-right="none" fo:border-top="none" fo:border-bottom="0.5pt solid #000000"/>
    </style:style>
    <style:style style:name="표6.D2" style:family="table-cell">
      <style:table-cell-properties fo:padding="0.097cm" fo:border-left="0.5pt solid #000000" fo:border-right="0.5pt solid #000000" fo:border-top="none" fo:border-bottom="0.5pt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5.913cm" style:rel-column-width="3352*"/>
    </style:style>
    <style:style style:name="표7.B" style:family="table-column">
      <style:table-column-properties style:column-width="1.591cm" style:rel-column-width="902*"/>
    </style:style>
    <style:style style:name="표7.C" style:family="table-column">
      <style:table-column-properties style:column-width="9.497cm" style:rel-column-width="5384*"/>
    </style:style>
    <style:style style:name="표7.A1" style:family="table-cell">
      <style:table-cell-properties fo:padding="0.097cm" fo:border-left="0.5pt solid #000000" fo:border-right="none" fo:border-top="0.5pt solid #000000" fo:border-bottom="0.5pt solid #000000"/>
    </style:style>
    <style:style style:name="표7.C1" style:family="table-cell">
      <style:table-cell-properties fo:padding="0.097cm" fo:border="0.5pt solid #000000"/>
    </style:style>
    <style:style style:name="표7.A2" style:family="table-cell">
      <style:table-cell-properties fo:padding="0.097cm" fo:border-left="0.5pt solid #000000" fo:border-right="none" fo:border-top="none" fo:border-bottom="0.5pt solid #000000"/>
    </style:style>
    <style:style style:name="표7.C2" style:family="table-cell">
      <style:table-cell-properties fo:padding="0.097cm" fo:border-left="0.5pt solid #000000" fo:border-right="0.5pt solid #000000" fo:border-top="none" fo:border-bottom="0.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5.913cm" style:rel-column-width="3352*"/>
    </style:style>
    <style:style style:name="표8.B" style:family="table-column">
      <style:table-column-properties style:column-width="1.591cm" style:rel-column-width="902*"/>
    </style:style>
    <style:style style:name="표8.C" style:family="table-column">
      <style:table-column-properties style:column-width="9.497cm" style:rel-column-width="5384*"/>
    </style:style>
    <style:style style:name="표8.A1" style:family="table-cell">
      <style:table-cell-properties fo:padding="0.097cm" fo:border-left="0.5pt solid #000000" fo:border-right="none" fo:border-top="0.5pt solid #000000" fo:border-bottom="0.5pt solid #000000"/>
    </style:style>
    <style:style style:name="표8.C1" style:family="table-cell">
      <style:table-cell-properties fo:padding="0.097cm" fo:border="0.5pt solid #000000"/>
    </style:style>
    <style:style style:name="표8.A2" style:family="table-cell">
      <style:table-cell-properties fo:padding="0.097cm" fo:border-left="0.5pt solid #000000" fo:border-right="none" fo:border-top="none" fo:border-bottom="0.5pt solid #000000"/>
    </style:style>
    <style:style style:name="표8.C2" style:family="table-cell">
      <style:table-cell-properties fo:padding="0.097cm" fo:border-left="0.5pt solid #000000" fo:border-right="0.5pt solid #000000" fo:border-top="none" fo:border-bottom="0.5pt solid #000000"/>
    </style:style>
    <style:style style:name="표8.5" style:family="table-row">
      <style:table-row-properties style:min-row-height="0.542cm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5.913cm" style:rel-column-width="3352*"/>
    </style:style>
    <style:style style:name="표9.B" style:family="table-column">
      <style:table-column-properties style:column-width="1.591cm" style:rel-column-width="902*"/>
    </style:style>
    <style:style style:name="표9.C" style:family="table-column">
      <style:table-column-properties style:column-width="9.497cm" style:rel-column-width="5384*"/>
    </style:style>
    <style:style style:name="표9.A1" style:family="table-cell">
      <style:table-cell-properties fo:padding="0.097cm" fo:border-left="0.5pt solid #000000" fo:border-right="none" fo:border-top="0.5pt solid #000000" fo:border-bottom="0.5pt solid #000000"/>
    </style:style>
    <style:style style:name="표9.C1" style:family="table-cell">
      <style:table-cell-properties fo:padding="0.097cm" fo:border="0.5pt solid #000000"/>
    </style:style>
    <style:style style:name="표9.A2" style:family="table-cell">
      <style:table-cell-properties fo:padding="0.097cm" fo:border-left="0.5pt solid #000000" fo:border-right="none" fo:border-top="none" fo:border-bottom="0.5pt solid #000000"/>
    </style:style>
    <style:style style:name="표9.C2" style:family="table-cell">
      <style:table-cell-properties fo:padding="0.097cm" fo:border-left="0.5pt solid #000000" fo:border-right="0.5pt solid #000000" fo:border-top="none" fo:border-bottom="0.5pt solid #000000"/>
    </style:style>
    <style:style style:name="표9.4" style:family="table-row">
      <style:table-row-properties style:min-row-height="0.554cm"/>
    </style:style>
    <style:style style:name="표9.5" style:family="table-row">
      <style:table-row-properties style:min-row-height="0.542cm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5.913cm" style:rel-column-width="3352*"/>
    </style:style>
    <style:style style:name="표10.B" style:family="table-column">
      <style:table-column-properties style:column-width="1.591cm" style:rel-column-width="902*"/>
    </style:style>
    <style:style style:name="표10.C" style:family="table-column">
      <style:table-column-properties style:column-width="9.497cm" style:rel-column-width="5384*"/>
    </style:style>
    <style:style style:name="표10.A1" style:family="table-cell">
      <style:table-cell-properties fo:padding="0.097cm" fo:border-left="0.5pt solid #000000" fo:border-right="none" fo:border-top="0.5pt solid #000000" fo:border-bottom="0.5pt solid #000000"/>
    </style:style>
    <style:style style:name="표10.C1" style:family="table-cell">
      <style:table-cell-properties fo:padding="0.097cm" fo:border="0.5pt solid #000000"/>
    </style:style>
    <style:style style:name="표10.A2" style:family="table-cell">
      <style:table-cell-properties fo:padding="0.097cm" fo:border-left="0.5pt solid #000000" fo:border-right="none" fo:border-top="none" fo:border-bottom="0.5pt solid #000000"/>
    </style:style>
    <style:style style:name="표10.C2" style:family="table-cell">
      <style:table-cell-properties fo:padding="0.097cm" fo:border-left="0.5pt solid #000000" fo:border-right="0.5pt solid #000000" fo:border-top="none" fo:border-bottom="0.5pt solid #000000"/>
    </style:style>
    <style:style style:name="표10.4" style:family="table-row">
      <style:table-row-properties style:min-row-height="0.554cm"/>
    </style:style>
    <style:style style:name="표10.5" style:family="table-row">
      <style:table-row-properties style:min-row-height="0.542cm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5.913cm" style:rel-column-width="3352*"/>
    </style:style>
    <style:style style:name="표11.B" style:family="table-column">
      <style:table-column-properties style:column-width="1.591cm" style:rel-column-width="902*"/>
    </style:style>
    <style:style style:name="표11.C" style:family="table-column">
      <style:table-column-properties style:column-width="9.497cm" style:rel-column-width="5384*"/>
    </style:style>
    <style:style style:name="표11.A1" style:family="table-cell">
      <style:table-cell-properties fo:padding="0.097cm" fo:border-left="0.5pt solid #000000" fo:border-right="none" fo:border-top="0.5pt solid #000000" fo:border-bottom="0.5pt solid #000000"/>
    </style:style>
    <style:style style:name="표11.C1" style:family="table-cell">
      <style:table-cell-properties fo:padding="0.097cm" fo:border="0.5pt solid #000000"/>
    </style:style>
    <style:style style:name="표11.A2" style:family="table-cell">
      <style:table-cell-properties fo:padding="0.097cm" fo:border-left="0.5pt solid #000000" fo:border-right="none" fo:border-top="none" fo:border-bottom="0.5pt solid #000000"/>
    </style:style>
    <style:style style:name="표11.C2" style:family="table-cell">
      <style:table-cell-properties fo:padding="0.097cm" fo:border-left="0.5pt solid #000000" fo:border-right="0.5pt solid #000000" fo:border-top="none" fo:border-bottom="0.5pt solid #000000"/>
    </style:style>
    <style:style style:name="표12" style:family="table">
      <style:table-properties style:width="16.933cm" table:align="right"/>
    </style:style>
    <style:style style:name="표12.A" style:family="table-column">
      <style:table-column-properties style:column-width="6.202cm"/>
    </style:style>
    <style:style style:name="표12.B" style:family="table-column">
      <style:table-column-properties style:column-width="2.231cm"/>
    </style:style>
    <style:style style:name="표12.C" style:family="table-column">
      <style:table-column-properties style:column-width="1.178cm"/>
    </style:style>
    <style:style style:name="표12.D" style:family="table-column">
      <style:table-column-properties style:column-width="7.322cm"/>
    </style:style>
    <style:style style:name="표12.A1" style:family="table-cell">
      <style:table-cell-properties fo:padding="0.097cm" fo:border-left="0.5pt solid #000000" fo:border-right="none" fo:border-top="0.5pt solid #000000" fo:border-bottom="0.5pt solid #000000"/>
    </style:style>
    <style:style style:name="표12.D1" style:family="table-cell">
      <style:table-cell-properties fo:padding="0.097cm" fo:border="0.5pt solid #000000"/>
    </style:style>
    <style:style style:name="표12.A2" style:family="table-cell">
      <style:table-cell-properties fo:padding="0.097cm" fo:border-left="0.5pt solid #000000" fo:border-right="none" fo:border-top="none" fo:border-bottom="0.5pt solid #000000"/>
    </style:style>
    <style:style style:name="표12.D2" style:family="table-cell">
      <style:table-cell-properties fo:padding="0.097cm" fo:border-left="0.5pt solid #000000" fo:border-right="0.5pt solid #000000" fo:border-top="none" fo:border-bottom="0.5pt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4.249cm" style:rel-column-width="2409*"/>
    </style:style>
    <style:style style:name="표13.B" style:family="table-column">
      <style:table-column-properties style:column-width="4.251cm" style:rel-column-width="2410*"/>
    </style:style>
    <style:style style:name="표13.C" style:family="table-column">
      <style:table-column-properties style:column-width="1.194cm" style:rel-column-width="677*"/>
    </style:style>
    <style:style style:name="표13.D" style:family="table-column">
      <style:table-column-properties style:column-width="7.306cm" style:rel-column-width="4142*"/>
    </style:style>
    <style:style style:name="표13.A1" style:family="table-cell">
      <style:table-cell-properties fo:padding="0.097cm" fo:border-left="0.5pt solid #000000" fo:border-right="none" fo:border-top="0.5pt solid #000000" fo:border-bottom="0.5pt solid #000000"/>
    </style:style>
    <style:style style:name="표13.D1" style:family="table-cell">
      <style:table-cell-properties fo:padding="0.097cm" fo:border="0.5pt solid #000000"/>
    </style:style>
    <style:style style:name="표13.A2" style:family="table-cell">
      <style:table-cell-properties fo:padding="0.097cm" fo:border-left="0.5pt solid #000000" fo:border-right="none" fo:border-top="none" fo:border-bottom="0.5pt solid #000000"/>
    </style:style>
    <style:style style:name="표13.D2" style:family="table-cell">
      <style:table-cell-properties fo:padding="0.097cm" fo:border-left="0.5pt solid #000000" fo:border-right="0.5pt solid #000000" fo:border-top="none" fo:border-bottom="0.5pt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5.994cm" style:rel-column-width="3398*"/>
    </style:style>
    <style:style style:name="표14.B" style:family="table-column">
      <style:table-column-properties style:column-width="2.506cm" style:rel-column-width="1421*"/>
    </style:style>
    <style:style style:name="표14.C" style:family="table-column">
      <style:table-column-properties style:column-width="1.401cm" style:rel-column-width="794*"/>
    </style:style>
    <style:style style:name="표14.D" style:family="table-column">
      <style:table-column-properties style:column-width="7.1cm" style:rel-column-width="4025*"/>
    </style:style>
    <style:style style:name="표14.A1" style:family="table-cell">
      <style:table-cell-properties fo:padding="0.097cm" fo:border-left="0.5pt solid #000000" fo:border-right="none" fo:border-top="0.5pt solid #000000" fo:border-bottom="0.5pt solid #000000"/>
    </style:style>
    <style:style style:name="표14.D1" style:family="table-cell">
      <style:table-cell-properties fo:padding="0.097cm" fo:border="0.5pt solid #000000"/>
    </style:style>
    <style:style style:name="표14.A2" style:family="table-cell">
      <style:table-cell-properties fo:padding="0.097cm" fo:border-left="0.5pt solid #000000" fo:border-right="none" fo:border-top="none" fo:border-bottom="0.5pt solid #000000"/>
    </style:style>
    <style:style style:name="표14.D2" style:family="table-cell">
      <style:table-cell-properties fo:padding="0.097cm" fo:border-left="0.5pt solid #000000" fo:border-right="0.5pt solid #000000" fo:border-top="none" fo:border-bottom="0.5pt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5.994cm" style:rel-column-width="3398*"/>
    </style:style>
    <style:style style:name="표15.B" style:family="table-column">
      <style:table-column-properties style:column-width="2.506cm" style:rel-column-width="1421*"/>
    </style:style>
    <style:style style:name="표15.C" style:family="table-column">
      <style:table-column-properties style:column-width="1.401cm" style:rel-column-width="794*"/>
    </style:style>
    <style:style style:name="표15.D" style:family="table-column">
      <style:table-column-properties style:column-width="7.1cm" style:rel-column-width="4025*"/>
    </style:style>
    <style:style style:name="표15.A1" style:family="table-cell">
      <style:table-cell-properties fo:padding="0.097cm" fo:border-left="0.5pt solid #000000" fo:border-right="none" fo:border-top="0.5pt solid #000000" fo:border-bottom="0.5pt solid #000000"/>
    </style:style>
    <style:style style:name="표15.D1" style:family="table-cell">
      <style:table-cell-properties fo:padding="0.097cm" fo:border="0.5pt solid #000000"/>
    </style:style>
    <style:style style:name="표15.A2" style:family="table-cell">
      <style:table-cell-properties fo:padding="0.097cm" fo:border-left="0.5pt solid #000000" fo:border-right="none" fo:border-top="none" fo:border-bottom="0.5pt solid #000000"/>
    </style:style>
    <style:style style:name="표15.D2" style:family="table-cell">
      <style:table-cell-properties fo:padding="0.097cm" fo:border-left="0.5pt solid #000000" fo:border-right="0.5pt solid #000000" fo:border-top="none" fo:border-bottom="0.5pt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5.994cm" style:rel-column-width="3398*"/>
    </style:style>
    <style:style style:name="표16.B" style:family="table-column">
      <style:table-column-properties style:column-width="2.506cm" style:rel-column-width="1421*"/>
    </style:style>
    <style:style style:name="표16.C" style:family="table-column">
      <style:table-column-properties style:column-width="1.401cm" style:rel-column-width="794*"/>
    </style:style>
    <style:style style:name="표16.D" style:family="table-column">
      <style:table-column-properties style:column-width="7.1cm" style:rel-column-width="4025*"/>
    </style:style>
    <style:style style:name="표16.A1" style:family="table-cell">
      <style:table-cell-properties fo:padding="0.097cm" fo:border-left="0.5pt solid #000000" fo:border-right="none" fo:border-top="0.5pt solid #000000" fo:border-bottom="0.5pt solid #000000"/>
    </style:style>
    <style:style style:name="표16.D1" style:family="table-cell">
      <style:table-cell-properties fo:padding="0.097cm" fo:border="0.5pt solid #000000"/>
    </style:style>
    <style:style style:name="표16.A2" style:family="table-cell">
      <style:table-cell-properties fo:padding="0.097cm" fo:border-left="0.5pt solid #000000" fo:border-right="none" fo:border-top="none" fo:border-bottom="0.5pt solid #000000"/>
    </style:style>
    <style:style style:name="표16.D2" style:family="table-cell">
      <style:table-cell-properties fo:padding="0.097cm" fo:border-left="0.5pt solid #000000" fo:border-right="0.5pt solid #000000" fo:border-top="none" fo:border-bottom="0.5pt solid #000000"/>
    </style:style>
    <style:style style:name="표26" style:family="table">
      <style:table-properties style:width="17cm" table:align="margins"/>
    </style:style>
    <style:style style:name="표26.A" style:family="table-column">
      <style:table-column-properties style:column-width="2.708cm" style:rel-column-width="1535*"/>
    </style:style>
    <style:style style:name="표26.B" style:family="table-column">
      <style:table-column-properties style:column-width="7.482cm" style:rel-column-width="4242*"/>
    </style:style>
    <style:style style:name="표26.C" style:family="table-column">
      <style:table-column-properties style:column-width="4.113cm" style:rel-column-width="2332*"/>
    </style:style>
    <style:style style:name="표26.D" style:family="table-column">
      <style:table-column-properties style:column-width="2.697cm" style:rel-column-width="1529*"/>
    </style:style>
    <style:style style:name="표26.A1" style:family="table-cell">
      <style:table-cell-properties fo:padding="0.097cm" fo:border-left="0.5pt solid #000000" fo:border-right="none" fo:border-top="0.5pt solid #000000" fo:border-bottom="0.5pt solid #000000"/>
    </style:style>
    <style:style style:name="표26.D1" style:family="table-cell">
      <style:table-cell-properties fo:padding="0.097cm" fo:border="0.5pt solid #000000"/>
    </style:style>
    <style:style style:name="표26.2" style:family="table-row">
      <style:table-row-properties style:min-row-height="0.101cm"/>
    </style:style>
    <style:style style:name="표26.A2" style:family="table-cell">
      <style:table-cell-properties fo:padding="0.097cm" fo:border-left="0.5pt solid #000000" fo:border-right="none" fo:border-top="none" fo:border-bottom="0.5pt solid #000000"/>
    </style:style>
    <style:style style:name="표26.D2" style:family="table-cell">
      <style:table-cell-properties fo:padding="0.097cm" fo:border-left="0.5pt solid #000000" fo:border-right="0.5pt solid #000000" fo:border-top="none" fo:border-bottom="0.5pt solid #000000"/>
    </style:style>
    <style:style style:name="표27" style:family="table">
      <style:table-properties style:width="17cm" table:align="margins"/>
    </style:style>
    <style:style style:name="표27.A" style:family="table-column">
      <style:table-column-properties style:column-width="5.994cm" style:rel-column-width="3398*"/>
    </style:style>
    <style:style style:name="표27.B" style:family="table-column">
      <style:table-column-properties style:column-width="2.506cm" style:rel-column-width="1421*"/>
    </style:style>
    <style:style style:name="표27.C" style:family="table-column">
      <style:table-column-properties style:column-width="1.401cm" style:rel-column-width="794*"/>
    </style:style>
    <style:style style:name="표27.D" style:family="table-column">
      <style:table-column-properties style:column-width="7.1cm" style:rel-column-width="4025*"/>
    </style:style>
    <style:style style:name="표27.A1" style:family="table-cell">
      <style:table-cell-properties fo:padding="0.097cm" fo:border-left="0.5pt solid #000000" fo:border-right="none" fo:border-top="0.5pt solid #000000" fo:border-bottom="0.5pt solid #000000"/>
    </style:style>
    <style:style style:name="표27.D1" style:family="table-cell">
      <style:table-cell-properties fo:padding="0.097cm" fo:border="0.5pt solid #000000"/>
    </style:style>
    <style:style style:name="표27.A2" style:family="table-cell">
      <style:table-cell-properties fo:padding="0.097cm" fo:border-left="0.5pt solid #000000" fo:border-right="none" fo:border-top="none" fo:border-bottom="0.5pt solid #000000"/>
    </style:style>
    <style:style style:name="표27.D2" style:family="table-cell">
      <style:table-cell-properties fo:padding="0.097cm" fo:border-left="0.5pt solid #000000" fo:border-right="0.5pt solid #000000" fo:border-top="none" fo:border-bottom="0.5pt solid #000000"/>
    </style:style>
    <style:style style:name="표28" style:family="table">
      <style:table-properties style:width="17cm" table:align="margins"/>
    </style:style>
    <style:style style:name="표28.A" style:family="table-column">
      <style:table-column-properties style:column-width="5.994cm" style:rel-column-width="3398*"/>
    </style:style>
    <style:style style:name="표28.B" style:family="table-column">
      <style:table-column-properties style:column-width="2.506cm" style:rel-column-width="1421*"/>
    </style:style>
    <style:style style:name="표28.C" style:family="table-column">
      <style:table-column-properties style:column-width="1.401cm" style:rel-column-width="794*"/>
    </style:style>
    <style:style style:name="표28.D" style:family="table-column">
      <style:table-column-properties style:column-width="7.1cm" style:rel-column-width="4025*"/>
    </style:style>
    <style:style style:name="표28.A1" style:family="table-cell">
      <style:table-cell-properties fo:padding="0.097cm" fo:border-left="0.5pt solid #000000" fo:border-right="none" fo:border-top="0.5pt solid #000000" fo:border-bottom="0.5pt solid #000000"/>
    </style:style>
    <style:style style:name="표28.D1" style:family="table-cell">
      <style:table-cell-properties fo:padding="0.097cm" fo:border="0.5pt solid #000000"/>
    </style:style>
    <style:style style:name="표28.A2" style:family="table-cell">
      <style:table-cell-properties fo:padding="0.097cm" fo:border-left="0.5pt solid #000000" fo:border-right="none" fo:border-top="none" fo:border-bottom="0.5pt solid #000000"/>
    </style:style>
    <style:style style:name="표28.D2" style:family="table-cell">
      <style:table-cell-properties fo:padding="0.097cm" fo:border-left="0.5pt solid #000000" fo:border-right="0.5pt solid #000000" fo:border-top="none" fo:border-bottom="0.5pt solid #000000"/>
    </style:style>
    <style:style style:name="표29" style:family="table">
      <style:table-properties style:width="17cm" table:align="margins"/>
    </style:style>
    <style:style style:name="표29.A" style:family="table-column">
      <style:table-column-properties style:column-width="5.994cm" style:rel-column-width="3398*"/>
    </style:style>
    <style:style style:name="표29.B" style:family="table-column">
      <style:table-column-properties style:column-width="2.506cm" style:rel-column-width="1421*"/>
    </style:style>
    <style:style style:name="표29.C" style:family="table-column">
      <style:table-column-properties style:column-width="1.401cm" style:rel-column-width="794*"/>
    </style:style>
    <style:style style:name="표29.D" style:family="table-column">
      <style:table-column-properties style:column-width="7.1cm" style:rel-column-width="4025*"/>
    </style:style>
    <style:style style:name="표29.A1" style:family="table-cell">
      <style:table-cell-properties fo:padding="0.097cm" fo:border-left="0.5pt solid #000000" fo:border-right="none" fo:border-top="0.5pt solid #000000" fo:border-bottom="0.5pt solid #000000"/>
    </style:style>
    <style:style style:name="표29.D1" style:family="table-cell">
      <style:table-cell-properties fo:padding="0.097cm" fo:border="0.5pt solid #000000"/>
    </style:style>
    <style:style style:name="표29.A2" style:family="table-cell">
      <style:table-cell-properties fo:padding="0.097cm" fo:border-left="0.5pt solid #000000" fo:border-right="none" fo:border-top="none" fo:border-bottom="0.5pt solid #000000"/>
    </style:style>
    <style:style style:name="표29.D2" style:family="table-cell">
      <style:table-cell-properties fo:padding="0.097cm" fo:border-left="0.5pt solid #000000" fo:border-right="0.5pt solid #000000" fo:border-top="none" fo:border-bottom="0.5pt solid #000000"/>
    </style:style>
    <style:style style:name="표30" style:family="table">
      <style:table-properties style:width="17cm" table:align="margins"/>
    </style:style>
    <style:style style:name="표30.A" style:family="table-column">
      <style:table-column-properties style:column-width="5.994cm" style:rel-column-width="3398*"/>
    </style:style>
    <style:style style:name="표30.B" style:family="table-column">
      <style:table-column-properties style:column-width="2.506cm" style:rel-column-width="1421*"/>
    </style:style>
    <style:style style:name="표30.C" style:family="table-column">
      <style:table-column-properties style:column-width="1.401cm" style:rel-column-width="794*"/>
    </style:style>
    <style:style style:name="표30.D" style:family="table-column">
      <style:table-column-properties style:column-width="7.1cm" style:rel-column-width="4025*"/>
    </style:style>
    <style:style style:name="표30.A1" style:family="table-cell">
      <style:table-cell-properties fo:padding="0.097cm" fo:border-left="0.5pt solid #000000" fo:border-right="none" fo:border-top="0.5pt solid #000000" fo:border-bottom="0.5pt solid #000000"/>
    </style:style>
    <style:style style:name="표30.D1" style:family="table-cell">
      <style:table-cell-properties fo:padding="0.097cm" fo:border="0.5pt solid #000000"/>
    </style:style>
    <style:style style:name="표30.A2" style:family="table-cell">
      <style:table-cell-properties fo:padding="0.097cm" fo:border-left="0.5pt solid #000000" fo:border-right="none" fo:border-top="none" fo:border-bottom="0.5pt solid #000000"/>
    </style:style>
    <style:style style:name="표30.D2" style:family="table-cell">
      <style:table-cell-properties fo:padding="0.097cm" fo:border-left="0.5pt solid #000000" fo:border-right="0.5pt solid #000000" fo:border-top="none" fo:border-bottom="0.5pt solid #000000"/>
    </style:style>
    <style:style style:name="표31" style:family="table">
      <style:table-properties style:width="17cm" table:align="margins"/>
    </style:style>
    <style:style style:name="표31.A" style:family="table-column">
      <style:table-column-properties style:column-width="5.994cm" style:rel-column-width="3398*"/>
    </style:style>
    <style:style style:name="표31.B" style:family="table-column">
      <style:table-column-properties style:column-width="2.506cm" style:rel-column-width="1421*"/>
    </style:style>
    <style:style style:name="표31.C" style:family="table-column">
      <style:table-column-properties style:column-width="1.401cm" style:rel-column-width="794*"/>
    </style:style>
    <style:style style:name="표31.D" style:family="table-column">
      <style:table-column-properties style:column-width="7.1cm" style:rel-column-width="4025*"/>
    </style:style>
    <style:style style:name="표31.A1" style:family="table-cell">
      <style:table-cell-properties fo:padding="0.097cm" fo:border-left="0.5pt solid #000000" fo:border-right="none" fo:border-top="0.5pt solid #000000" fo:border-bottom="0.5pt solid #000000"/>
    </style:style>
    <style:style style:name="표31.D1" style:family="table-cell">
      <style:table-cell-properties fo:padding="0.097cm" fo:border="0.5pt solid #000000"/>
    </style:style>
    <style:style style:name="표31.A2" style:family="table-cell">
      <style:table-cell-properties fo:padding="0.097cm" fo:border-left="0.5pt solid #000000" fo:border-right="none" fo:border-top="none" fo:border-bottom="0.5pt solid #000000"/>
    </style:style>
    <style:style style:name="표31.D2" style:family="table-cell">
      <style:table-cell-properties fo:padding="0.097cm" fo:border-left="0.5pt solid #000000" fo:border-right="0.5pt solid #000000" fo:border-top="none" fo:border-bottom="0.5pt solid #000000"/>
    </style:style>
    <style:style style:name="표32" style:family="table">
      <style:table-properties style:width="17cm" table:align="margins"/>
    </style:style>
    <style:style style:name="표32.A" style:family="table-column">
      <style:table-column-properties style:column-width="5.994cm" style:rel-column-width="3398*"/>
    </style:style>
    <style:style style:name="표32.B" style:family="table-column">
      <style:table-column-properties style:column-width="2.506cm" style:rel-column-width="1421*"/>
    </style:style>
    <style:style style:name="표32.C" style:family="table-column">
      <style:table-column-properties style:column-width="1.401cm" style:rel-column-width="794*"/>
    </style:style>
    <style:style style:name="표32.D" style:family="table-column">
      <style:table-column-properties style:column-width="7.1cm" style:rel-column-width="4025*"/>
    </style:style>
    <style:style style:name="표32.A1" style:family="table-cell">
      <style:table-cell-properties fo:padding="0.097cm" fo:border-left="0.5pt solid #000000" fo:border-right="none" fo:border-top="0.5pt solid #000000" fo:border-bottom="0.5pt solid #000000"/>
    </style:style>
    <style:style style:name="표32.D1" style:family="table-cell">
      <style:table-cell-properties fo:padding="0.097cm" fo:border="0.5pt solid #000000"/>
    </style:style>
    <style:style style:name="표32.A2" style:family="table-cell">
      <style:table-cell-properties fo:padding="0.097cm" fo:border-left="0.5pt solid #000000" fo:border-right="none" fo:border-top="none" fo:border-bottom="0.5pt solid #000000"/>
    </style:style>
    <style:style style:name="표32.D2" style:family="table-cell">
      <style:table-cell-properties fo:padding="0.097cm" fo:border-left="0.5pt solid #000000" fo:border-right="0.5pt solid #000000" fo:border-top="none" fo:border-bottom="0.5pt solid #000000"/>
    </style:style>
    <style:style style:name="표33" style:family="table">
      <style:table-properties style:width="17cm" table:align="margins"/>
    </style:style>
    <style:style style:name="표33.A" style:family="table-column">
      <style:table-column-properties style:column-width="5.994cm" style:rel-column-width="3398*"/>
    </style:style>
    <style:style style:name="표33.B" style:family="table-column">
      <style:table-column-properties style:column-width="2.506cm" style:rel-column-width="1421*"/>
    </style:style>
    <style:style style:name="표33.C" style:family="table-column">
      <style:table-column-properties style:column-width="1.401cm" style:rel-column-width="794*"/>
    </style:style>
    <style:style style:name="표33.D" style:family="table-column">
      <style:table-column-properties style:column-width="7.1cm" style:rel-column-width="4025*"/>
    </style:style>
    <style:style style:name="표33.A1" style:family="table-cell">
      <style:table-cell-properties fo:padding="0.097cm" fo:border-left="0.5pt solid #000000" fo:border-right="none" fo:border-top="0.5pt solid #000000" fo:border-bottom="0.5pt solid #000000"/>
    </style:style>
    <style:style style:name="표33.D1" style:family="table-cell">
      <style:table-cell-properties fo:padding="0.097cm" fo:border="0.5pt solid #000000"/>
    </style:style>
    <style:style style:name="표33.A2" style:family="table-cell">
      <style:table-cell-properties fo:padding="0.097cm" fo:border-left="0.5pt solid #000000" fo:border-right="none" fo:border-top="none" fo:border-bottom="0.5pt solid #000000"/>
    </style:style>
    <style:style style:name="표33.D2" style:family="table-cell">
      <style:table-cell-properties fo:padding="0.097cm" fo:border-left="0.5pt solid #000000" fo:border-right="0.5pt solid #000000" fo:border-top="none" fo:border-bottom="0.5pt solid #000000"/>
    </style:style>
    <style:style style:name="표34" style:family="table">
      <style:table-properties style:width="17cm" table:align="margins"/>
    </style:style>
    <style:style style:name="표34.A" style:family="table-column">
      <style:table-column-properties style:column-width="5.994cm" style:rel-column-width="3398*"/>
    </style:style>
    <style:style style:name="표34.B" style:family="table-column">
      <style:table-column-properties style:column-width="2.506cm" style:rel-column-width="1421*"/>
    </style:style>
    <style:style style:name="표34.C" style:family="table-column">
      <style:table-column-properties style:column-width="1.401cm" style:rel-column-width="794*"/>
    </style:style>
    <style:style style:name="표34.D" style:family="table-column">
      <style:table-column-properties style:column-width="7.1cm" style:rel-column-width="4025*"/>
    </style:style>
    <style:style style:name="표34.A1" style:family="table-cell">
      <style:table-cell-properties fo:padding="0.097cm" fo:border-left="0.5pt solid #000000" fo:border-right="none" fo:border-top="0.5pt solid #000000" fo:border-bottom="0.5pt solid #000000"/>
    </style:style>
    <style:style style:name="표34.D1" style:family="table-cell">
      <style:table-cell-properties fo:padding="0.097cm" fo:border="0.5pt solid #000000"/>
    </style:style>
    <style:style style:name="표34.A2" style:family="table-cell">
      <style:table-cell-properties fo:padding="0.097cm" fo:border-left="0.5pt solid #000000" fo:border-right="none" fo:border-top="none" fo:border-bottom="0.5pt solid #000000"/>
    </style:style>
    <style:style style:name="표34.D2" style:family="table-cell">
      <style:table-cell-properties fo:padding="0.097cm" fo:border-left="0.5pt solid #000000" fo:border-right="0.5pt solid #000000" fo:border-top="none" fo:border-bottom="0.5pt solid #000000"/>
    </style:style>
    <style:style style:name="표35" style:family="table">
      <style:table-properties style:width="17cm" table:align="margins"/>
    </style:style>
    <style:style style:name="표35.A" style:family="table-column">
      <style:table-column-properties style:column-width="5.994cm" style:rel-column-width="3398*"/>
    </style:style>
    <style:style style:name="표35.B" style:family="table-column">
      <style:table-column-properties style:column-width="2.506cm" style:rel-column-width="1421*"/>
    </style:style>
    <style:style style:name="표35.C" style:family="table-column">
      <style:table-column-properties style:column-width="1.401cm" style:rel-column-width="794*"/>
    </style:style>
    <style:style style:name="표35.D" style:family="table-column">
      <style:table-column-properties style:column-width="7.1cm" style:rel-column-width="4025*"/>
    </style:style>
    <style:style style:name="표35.A1" style:family="table-cell">
      <style:table-cell-properties fo:padding="0.097cm" fo:border-left="0.5pt solid #000000" fo:border-right="none" fo:border-top="0.5pt solid #000000" fo:border-bottom="0.5pt solid #000000"/>
    </style:style>
    <style:style style:name="표35.D1" style:family="table-cell">
      <style:table-cell-properties fo:padding="0.097cm" fo:border="0.5pt solid #000000"/>
    </style:style>
    <style:style style:name="표35.A2" style:family="table-cell">
      <style:table-cell-properties fo:padding="0.097cm" fo:border-left="0.5pt solid #000000" fo:border-right="none" fo:border-top="none" fo:border-bottom="0.5pt solid #000000"/>
    </style:style>
    <style:style style:name="표35.D2" style:family="table-cell">
      <style:table-cell-properties fo:padding="0.097cm" fo:border-left="0.5pt solid #000000" fo:border-right="0.5pt solid #000000" fo:border-top="none" fo:border-bottom="0.5pt solid #000000"/>
    </style:style>
    <style:style style:name="표36" style:family="table">
      <style:table-properties style:width="17cm" table:align="margins"/>
    </style:style>
    <style:style style:name="표36.A" style:family="table-column">
      <style:table-column-properties style:column-width="5.994cm" style:rel-column-width="3398*"/>
    </style:style>
    <style:style style:name="표36.B" style:family="table-column">
      <style:table-column-properties style:column-width="2.506cm" style:rel-column-width="1421*"/>
    </style:style>
    <style:style style:name="표36.C" style:family="table-column">
      <style:table-column-properties style:column-width="1.401cm" style:rel-column-width="794*"/>
    </style:style>
    <style:style style:name="표36.D" style:family="table-column">
      <style:table-column-properties style:column-width="7.1cm" style:rel-column-width="4025*"/>
    </style:style>
    <style:style style:name="표36.A1" style:family="table-cell">
      <style:table-cell-properties fo:padding="0.097cm" fo:border-left="0.5pt solid #000000" fo:border-right="none" fo:border-top="0.5pt solid #000000" fo:border-bottom="0.5pt solid #000000"/>
    </style:style>
    <style:style style:name="표36.D1" style:family="table-cell">
      <style:table-cell-properties fo:padding="0.097cm" fo:border="0.5pt solid #000000"/>
    </style:style>
    <style:style style:name="표36.A2" style:family="table-cell">
      <style:table-cell-properties fo:padding="0.097cm" fo:border-left="0.5pt solid #000000" fo:border-right="none" fo:border-top="none" fo:border-bottom="0.5pt solid #000000"/>
    </style:style>
    <style:style style:name="표36.D2" style:family="table-cell">
      <style:table-cell-properties fo:padding="0.097cm" fo:border-left="0.5pt solid #000000" fo:border-right="0.5pt solid #000000" fo:border-top="none" fo:border-bottom="0.5pt solid #000000"/>
    </style:style>
    <style:style style:name="표37" style:family="table">
      <style:table-properties style:width="17cm" table:align="margins"/>
    </style:style>
    <style:style style:name="표37.A" style:family="table-column">
      <style:table-column-properties style:column-width="5.994cm" style:rel-column-width="3398*"/>
    </style:style>
    <style:style style:name="표37.B" style:family="table-column">
      <style:table-column-properties style:column-width="2.506cm" style:rel-column-width="1421*"/>
    </style:style>
    <style:style style:name="표37.C" style:family="table-column">
      <style:table-column-properties style:column-width="1.401cm" style:rel-column-width="794*"/>
    </style:style>
    <style:style style:name="표37.D" style:family="table-column">
      <style:table-column-properties style:column-width="7.1cm" style:rel-column-width="4025*"/>
    </style:style>
    <style:style style:name="표37.A1" style:family="table-cell">
      <style:table-cell-properties fo:padding="0.097cm" fo:border-left="0.5pt solid #000000" fo:border-right="none" fo:border-top="0.5pt solid #000000" fo:border-bottom="0.5pt solid #000000"/>
    </style:style>
    <style:style style:name="표37.D1" style:family="table-cell">
      <style:table-cell-properties fo:padding="0.097cm" fo:border="0.5pt solid #000000"/>
    </style:style>
    <style:style style:name="표37.A2" style:family="table-cell">
      <style:table-cell-properties fo:padding="0.097cm" fo:border-left="0.5pt solid #000000" fo:border-right="none" fo:border-top="none" fo:border-bottom="0.5pt solid #000000"/>
    </style:style>
    <style:style style:name="표37.D2" style:family="table-cell">
      <style:table-cell-properties fo:padding="0.097cm" fo:border-left="0.5pt solid #000000" fo:border-right="0.5pt solid #000000" fo:border-top="none" fo:border-bottom="0.5pt solid #000000"/>
    </style:style>
    <style:style style:name="표37.8" style:family="table-row">
      <style:table-row-properties style:min-row-height="0.669cm"/>
    </style:style>
    <style:style style:name="표38" style:family="table">
      <style:table-properties style:width="17cm" table:align="margins"/>
    </style:style>
    <style:style style:name="표38.A" style:family="table-column">
      <style:table-column-properties style:column-width="5.994cm" style:rel-column-width="3398*"/>
    </style:style>
    <style:style style:name="표38.B" style:family="table-column">
      <style:table-column-properties style:column-width="2.506cm" style:rel-column-width="1421*"/>
    </style:style>
    <style:style style:name="표38.C" style:family="table-column">
      <style:table-column-properties style:column-width="1.401cm" style:rel-column-width="794*"/>
    </style:style>
    <style:style style:name="표38.D" style:family="table-column">
      <style:table-column-properties style:column-width="7.1cm" style:rel-column-width="4025*"/>
    </style:style>
    <style:style style:name="표38.A1" style:family="table-cell">
      <style:table-cell-properties fo:padding="0.097cm" fo:border-left="0.5pt solid #000000" fo:border-right="none" fo:border-top="0.5pt solid #000000" fo:border-bottom="0.5pt solid #000000"/>
    </style:style>
    <style:style style:name="표38.D1" style:family="table-cell">
      <style:table-cell-properties fo:padding="0.097cm" fo:border="0.5pt solid #000000"/>
    </style:style>
    <style:style style:name="표38.A2" style:family="table-cell">
      <style:table-cell-properties fo:padding="0.097cm" fo:border-left="0.5pt solid #000000" fo:border-right="none" fo:border-top="none" fo:border-bottom="0.5pt solid #000000"/>
    </style:style>
    <style:style style:name="표38.D2" style:family="table-cell">
      <style:table-cell-properties fo:padding="0.097cm" fo:border-left="0.5pt solid #000000" fo:border-right="0.5pt solid #000000" fo:border-top="none" fo:border-bottom="0.5pt solid #000000"/>
    </style:style>
    <style:style style:name="표38.8" style:family="table-row">
      <style:table-row-properties style:min-row-height="0.669cm"/>
    </style:style>
    <style:style style:name="표39" style:family="table">
      <style:table-properties style:width="17cm" table:align="margins"/>
    </style:style>
    <style:style style:name="표39.A" style:family="table-column">
      <style:table-column-properties style:column-width="5.994cm" style:rel-column-width="3398*"/>
    </style:style>
    <style:style style:name="표39.B" style:family="table-column">
      <style:table-column-properties style:column-width="2.506cm" style:rel-column-width="1421*"/>
    </style:style>
    <style:style style:name="표39.C" style:family="table-column">
      <style:table-column-properties style:column-width="1.401cm" style:rel-column-width="794*"/>
    </style:style>
    <style:style style:name="표39.D" style:family="table-column">
      <style:table-column-properties style:column-width="7.1cm" style:rel-column-width="4025*"/>
    </style:style>
    <style:style style:name="표39.A1" style:family="table-cell">
      <style:table-cell-properties fo:padding="0.097cm" fo:border-left="0.5pt solid #000000" fo:border-right="none" fo:border-top="0.5pt solid #000000" fo:border-bottom="0.5pt solid #000000"/>
    </style:style>
    <style:style style:name="표39.D1" style:family="table-cell">
      <style:table-cell-properties fo:padding="0.097cm" fo:border="0.5pt solid #000000"/>
    </style:style>
    <style:style style:name="표39.A2" style:family="table-cell">
      <style:table-cell-properties fo:padding="0.097cm" fo:border-left="0.5pt solid #000000" fo:border-right="none" fo:border-top="none" fo:border-bottom="0.5pt solid #000000"/>
    </style:style>
    <style:style style:name="표39.D2" style:family="table-cell">
      <style:table-cell-properties fo:padding="0.097cm" fo:border-left="0.5pt solid #000000" fo:border-right="0.5pt solid #000000" fo:border-top="none" fo:border-bottom="0.5pt solid #000000"/>
    </style:style>
    <style:style style:name="표39.8" style:family="table-row">
      <style:table-row-properties style:min-row-height="0.669cm"/>
    </style:style>
    <style:style style:name="표40" style:family="table">
      <style:table-properties style:width="17cm" table:align="margins"/>
    </style:style>
    <style:style style:name="표40.A" style:family="table-column">
      <style:table-column-properties style:column-width="5.994cm" style:rel-column-width="3398*"/>
    </style:style>
    <style:style style:name="표40.B" style:family="table-column">
      <style:table-column-properties style:column-width="2.506cm" style:rel-column-width="1421*"/>
    </style:style>
    <style:style style:name="표40.C" style:family="table-column">
      <style:table-column-properties style:column-width="1.401cm" style:rel-column-width="794*"/>
    </style:style>
    <style:style style:name="표40.D" style:family="table-column">
      <style:table-column-properties style:column-width="7.1cm" style:rel-column-width="4025*"/>
    </style:style>
    <style:style style:name="표40.A1" style:family="table-cell">
      <style:table-cell-properties fo:padding="0.097cm" fo:border-left="0.5pt solid #000000" fo:border-right="none" fo:border-top="0.5pt solid #000000" fo:border-bottom="0.5pt solid #000000"/>
    </style:style>
    <style:style style:name="표40.D1" style:family="table-cell">
      <style:table-cell-properties fo:padding="0.097cm" fo:border="0.5pt solid #000000"/>
    </style:style>
    <style:style style:name="표40.A2" style:family="table-cell">
      <style:table-cell-properties fo:padding="0.097cm" fo:border-left="0.5pt solid #000000" fo:border-right="none" fo:border-top="none" fo:border-bottom="0.5pt solid #000000"/>
    </style:style>
    <style:style style:name="표40.D2" style:family="table-cell">
      <style:table-cell-properties fo:padding="0.097cm" fo:border-left="0.5pt solid #000000" fo:border-right="0.5pt solid #000000" fo:border-top="none" fo:border-bottom="0.5pt solid #000000"/>
    </style:style>
    <style:style style:name="표40.8" style:family="table-row">
      <style:table-row-properties style:min-row-height="0.669cm"/>
    </style:style>
    <style:style style:name="표41" style:family="table">
      <style:table-properties style:width="17cm" table:align="margins"/>
    </style:style>
    <style:style style:name="표41.A" style:family="table-column">
      <style:table-column-properties style:column-width="5.994cm" style:rel-column-width="3398*"/>
    </style:style>
    <style:style style:name="표41.B" style:family="table-column">
      <style:table-column-properties style:column-width="2.506cm" style:rel-column-width="1421*"/>
    </style:style>
    <style:style style:name="표41.C" style:family="table-column">
      <style:table-column-properties style:column-width="1.401cm" style:rel-column-width="794*"/>
    </style:style>
    <style:style style:name="표41.D" style:family="table-column">
      <style:table-column-properties style:column-width="7.1cm" style:rel-column-width="4025*"/>
    </style:style>
    <style:style style:name="표41.A1" style:family="table-cell">
      <style:table-cell-properties fo:padding="0.097cm" fo:border-left="0.5pt solid #000000" fo:border-right="none" fo:border-top="0.5pt solid #000000" fo:border-bottom="0.5pt solid #000000"/>
    </style:style>
    <style:style style:name="표41.D1" style:family="table-cell">
      <style:table-cell-properties fo:padding="0.097cm" fo:border="0.5pt solid #000000"/>
    </style:style>
    <style:style style:name="표41.A2" style:family="table-cell">
      <style:table-cell-properties fo:padding="0.097cm" fo:border-left="0.5pt solid #000000" fo:border-right="none" fo:border-top="none" fo:border-bottom="0.5pt solid #000000"/>
    </style:style>
    <style:style style:name="표41.D2" style:family="table-cell">
      <style:table-cell-properties fo:padding="0.097cm" fo:border-left="0.5pt solid #000000" fo:border-right="0.5pt solid #000000" fo:border-top="none" fo:border-bottom="0.5pt solid #000000"/>
    </style:style>
    <style:style style:name="표41.8" style:family="table-row">
      <style:table-row-properties style:min-row-height="0.669cm"/>
    </style:style>
    <style:style style:name="표42" style:family="table">
      <style:table-properties style:width="17cm" table:align="margins"/>
    </style:style>
    <style:style style:name="표42.A" style:family="table-column">
      <style:table-column-properties style:column-width="5.994cm" style:rel-column-width="3398*"/>
    </style:style>
    <style:style style:name="표42.B" style:family="table-column">
      <style:table-column-properties style:column-width="2.506cm" style:rel-column-width="1421*"/>
    </style:style>
    <style:style style:name="표42.C" style:family="table-column">
      <style:table-column-properties style:column-width="1.401cm" style:rel-column-width="794*"/>
    </style:style>
    <style:style style:name="표42.D" style:family="table-column">
      <style:table-column-properties style:column-width="7.1cm" style:rel-column-width="4025*"/>
    </style:style>
    <style:style style:name="표42.A1" style:family="table-cell">
      <style:table-cell-properties fo:padding="0.097cm" fo:border-left="0.5pt solid #000000" fo:border-right="none" fo:border-top="0.5pt solid #000000" fo:border-bottom="0.5pt solid #000000"/>
    </style:style>
    <style:style style:name="표42.D1" style:family="table-cell">
      <style:table-cell-properties fo:padding="0.097cm" fo:border="0.5pt solid #000000"/>
    </style:style>
    <style:style style:name="표42.A2" style:family="table-cell">
      <style:table-cell-properties fo:padding="0.097cm" fo:border-left="0.5pt solid #000000" fo:border-right="none" fo:border-top="none" fo:border-bottom="0.5pt solid #000000"/>
    </style:style>
    <style:style style:name="표42.D2" style:family="table-cell">
      <style:table-cell-properties fo:padding="0.097cm" fo:border-left="0.5pt solid #000000" fo:border-right="0.5pt solid #000000" fo:border-top="none" fo:border-bottom="0.5pt solid #000000"/>
    </style:style>
    <style:style style:name="표43" style:family="table">
      <style:table-properties style:width="17cm" table:align="margins"/>
    </style:style>
    <style:style style:name="표43.A" style:family="table-column">
      <style:table-column-properties style:column-width="5.994cm" style:rel-column-width="3398*"/>
    </style:style>
    <style:style style:name="표43.B" style:family="table-column">
      <style:table-column-properties style:column-width="2.506cm" style:rel-column-width="1421*"/>
    </style:style>
    <style:style style:name="표43.C" style:family="table-column">
      <style:table-column-properties style:column-width="1.401cm" style:rel-column-width="794*"/>
    </style:style>
    <style:style style:name="표43.D" style:family="table-column">
      <style:table-column-properties style:column-width="7.1cm" style:rel-column-width="4025*"/>
    </style:style>
    <style:style style:name="표43.A1" style:family="table-cell">
      <style:table-cell-properties fo:padding="0.097cm" fo:border-left="0.5pt solid #000000" fo:border-right="none" fo:border-top="0.5pt solid #000000" fo:border-bottom="0.5pt solid #000000"/>
    </style:style>
    <style:style style:name="표43.D1" style:family="table-cell">
      <style:table-cell-properties fo:padding="0.097cm" fo:border="0.5pt solid #000000"/>
    </style:style>
    <style:style style:name="표43.A2" style:family="table-cell">
      <style:table-cell-properties fo:padding="0.097cm" fo:border-left="0.5pt solid #000000" fo:border-right="none" fo:border-top="none" fo:border-bottom="0.5pt solid #000000"/>
    </style:style>
    <style:style style:name="표43.D2" style:family="table-cell">
      <style:table-cell-properties fo:padding="0.097cm" fo:border-left="0.5pt solid #000000" fo:border-right="0.5pt solid #000000" fo:border-top="none" fo:border-bottom="0.5pt solid #000000"/>
    </style:style>
    <style:style style:name="표44" style:family="table">
      <style:table-properties style:width="17cm" table:align="margins"/>
    </style:style>
    <style:style style:name="표44.A" style:family="table-column">
      <style:table-column-properties style:column-width="5.994cm" style:rel-column-width="3398*"/>
    </style:style>
    <style:style style:name="표44.B" style:family="table-column">
      <style:table-column-properties style:column-width="2.506cm" style:rel-column-width="1421*"/>
    </style:style>
    <style:style style:name="표44.C" style:family="table-column">
      <style:table-column-properties style:column-width="1.401cm" style:rel-column-width="794*"/>
    </style:style>
    <style:style style:name="표44.D" style:family="table-column">
      <style:table-column-properties style:column-width="7.1cm" style:rel-column-width="4025*"/>
    </style:style>
    <style:style style:name="표44.A1" style:family="table-cell">
      <style:table-cell-properties fo:padding="0.097cm" fo:border-left="0.5pt solid #000000" fo:border-right="none" fo:border-top="0.5pt solid #000000" fo:border-bottom="0.5pt solid #000000"/>
    </style:style>
    <style:style style:name="표44.D1" style:family="table-cell">
      <style:table-cell-properties fo:padding="0.097cm" fo:border="0.5pt solid #000000"/>
    </style:style>
    <style:style style:name="표44.A2" style:family="table-cell">
      <style:table-cell-properties fo:padding="0.097cm" fo:border-left="0.5pt solid #000000" fo:border-right="none" fo:border-top="none" fo:border-bottom="0.5pt solid #000000"/>
    </style:style>
    <style:style style:name="표44.D2" style:family="table-cell">
      <style:table-cell-properties fo:padding="0.097cm" fo:border-left="0.5pt solid #000000" fo:border-right="0.5pt solid #000000" fo:border-top="none" fo:border-bottom="0.5pt solid #000000"/>
    </style:style>
    <style:style style:name="표45" style:family="table">
      <style:table-properties style:width="17cm" table:align="margins"/>
    </style:style>
    <style:style style:name="표45.A" style:family="table-column">
      <style:table-column-properties style:column-width="5.994cm" style:rel-column-width="3398*"/>
    </style:style>
    <style:style style:name="표45.B" style:family="table-column">
      <style:table-column-properties style:column-width="2.506cm" style:rel-column-width="1421*"/>
    </style:style>
    <style:style style:name="표45.C" style:family="table-column">
      <style:table-column-properties style:column-width="1.401cm" style:rel-column-width="794*"/>
    </style:style>
    <style:style style:name="표45.D" style:family="table-column">
      <style:table-column-properties style:column-width="7.1cm" style:rel-column-width="4025*"/>
    </style:style>
    <style:style style:name="표45.A1" style:family="table-cell">
      <style:table-cell-properties fo:padding="0.097cm" fo:border-left="0.5pt solid #000000" fo:border-right="none" fo:border-top="0.5pt solid #000000" fo:border-bottom="0.5pt solid #000000"/>
    </style:style>
    <style:style style:name="표45.D1" style:family="table-cell">
      <style:table-cell-properties fo:padding="0.097cm" fo:border="0.5pt solid #000000"/>
    </style:style>
    <style:style style:name="표45.A2" style:family="table-cell">
      <style:table-cell-properties fo:padding="0.097cm" fo:border-left="0.5pt solid #000000" fo:border-right="none" fo:border-top="none" fo:border-bottom="0.5pt solid #000000"/>
    </style:style>
    <style:style style:name="표45.D2" style:family="table-cell">
      <style:table-cell-properties fo:padding="0.097cm" fo:border-left="0.5pt solid #000000" fo:border-right="0.5pt solid #000000" fo:border-top="none" fo:border-bottom="0.5pt solid #000000"/>
    </style:style>
    <style:style style:name="표46" style:family="table">
      <style:table-properties style:width="17cm" table:align="margins"/>
    </style:style>
    <style:style style:name="표46.A" style:family="table-column">
      <style:table-column-properties style:column-width="5.994cm" style:rel-column-width="3398*"/>
    </style:style>
    <style:style style:name="표46.B" style:family="table-column">
      <style:table-column-properties style:column-width="2.506cm" style:rel-column-width="1421*"/>
    </style:style>
    <style:style style:name="표46.C" style:family="table-column">
      <style:table-column-properties style:column-width="1.401cm" style:rel-column-width="794*"/>
    </style:style>
    <style:style style:name="표46.D" style:family="table-column">
      <style:table-column-properties style:column-width="7.1cm" style:rel-column-width="4025*"/>
    </style:style>
    <style:style style:name="표46.A1" style:family="table-cell">
      <style:table-cell-properties fo:padding="0.097cm" fo:border-left="0.5pt solid #000000" fo:border-right="none" fo:border-top="0.5pt solid #000000" fo:border-bottom="0.5pt solid #000000"/>
    </style:style>
    <style:style style:name="표46.D1" style:family="table-cell">
      <style:table-cell-properties fo:padding="0.097cm" fo:border="0.5pt solid #000000"/>
    </style:style>
    <style:style style:name="표46.A2" style:family="table-cell">
      <style:table-cell-properties fo:padding="0.097cm" fo:border-left="0.5pt solid #000000" fo:border-right="none" fo:border-top="none" fo:border-bottom="0.5pt solid #000000"/>
    </style:style>
    <style:style style:name="표46.D2" style:family="table-cell">
      <style:table-cell-properties fo:padding="0.097cm" fo:border-left="0.5pt solid #000000" fo:border-right="0.5pt solid #000000" fo:border-top="none" fo:border-bottom="0.5pt solid #000000"/>
    </style:style>
    <style:style style:name="표47" style:family="table">
      <style:table-properties style:width="17cm" table:align="margins"/>
    </style:style>
    <style:style style:name="표47.A" style:family="table-column">
      <style:table-column-properties style:column-width="5.994cm" style:rel-column-width="3398*"/>
    </style:style>
    <style:style style:name="표47.B" style:family="table-column">
      <style:table-column-properties style:column-width="2.506cm" style:rel-column-width="1421*"/>
    </style:style>
    <style:style style:name="표47.C" style:family="table-column">
      <style:table-column-properties style:column-width="1.401cm" style:rel-column-width="794*"/>
    </style:style>
    <style:style style:name="표47.D" style:family="table-column">
      <style:table-column-properties style:column-width="7.1cm" style:rel-column-width="4025*"/>
    </style:style>
    <style:style style:name="표47.A1" style:family="table-cell">
      <style:table-cell-properties fo:padding="0.097cm" fo:border-left="0.5pt solid #000000" fo:border-right="none" fo:border-top="0.5pt solid #000000" fo:border-bottom="0.5pt solid #000000"/>
    </style:style>
    <style:style style:name="표47.D1" style:family="table-cell">
      <style:table-cell-properties fo:padding="0.097cm" fo:border="0.5pt solid #000000"/>
    </style:style>
    <style:style style:name="표47.A2" style:family="table-cell">
      <style:table-cell-properties fo:padding="0.097cm" fo:border-left="0.5pt solid #000000" fo:border-right="none" fo:border-top="none" fo:border-bottom="0.5pt solid #000000"/>
    </style:style>
    <style:style style:name="표47.D2" style:family="table-cell">
      <style:table-cell-properties fo:padding="0.097cm" fo:border-left="0.5pt solid #000000" fo:border-right="0.5pt solid #000000" fo:border-top="none" fo:border-bottom="0.5pt solid #000000"/>
    </style:style>
    <style:style style:name="표48" style:family="table">
      <style:table-properties style:width="17cm" table:align="margins"/>
    </style:style>
    <style:style style:name="표48.A" style:family="table-column">
      <style:table-column-properties style:column-width="5.994cm" style:rel-column-width="3398*"/>
    </style:style>
    <style:style style:name="표48.B" style:family="table-column">
      <style:table-column-properties style:column-width="2.506cm" style:rel-column-width="1421*"/>
    </style:style>
    <style:style style:name="표48.C" style:family="table-column">
      <style:table-column-properties style:column-width="1.401cm" style:rel-column-width="794*"/>
    </style:style>
    <style:style style:name="표48.D" style:family="table-column">
      <style:table-column-properties style:column-width="7.1cm" style:rel-column-width="4025*"/>
    </style:style>
    <style:style style:name="표48.A1" style:family="table-cell">
      <style:table-cell-properties fo:padding="0.097cm" fo:border-left="0.5pt solid #000000" fo:border-right="none" fo:border-top="0.5pt solid #000000" fo:border-bottom="0.5pt solid #000000"/>
    </style:style>
    <style:style style:name="표48.D1" style:family="table-cell">
      <style:table-cell-properties fo:padding="0.097cm" fo:border="0.5pt solid #000000"/>
    </style:style>
    <style:style style:name="표48.A2" style:family="table-cell">
      <style:table-cell-properties fo:padding="0.097cm" fo:border-left="0.5pt solid #000000" fo:border-right="none" fo:border-top="none" fo:border-bottom="0.5pt solid #000000"/>
    </style:style>
    <style:style style:name="표48.D2" style:family="table-cell">
      <style:table-cell-properties fo:padding="0.097cm" fo:border-left="0.5pt solid #000000" fo:border-right="0.5pt solid #000000" fo:border-top="none" fo:border-bottom="0.5pt solid #000000"/>
    </style:style>
    <style:style style:name="표49" style:family="table">
      <style:table-properties style:width="17cm" table:align="margins"/>
    </style:style>
    <style:style style:name="표49.A" style:family="table-column">
      <style:table-column-properties style:column-width="5.994cm" style:rel-column-width="3398*"/>
    </style:style>
    <style:style style:name="표49.B" style:family="table-column">
      <style:table-column-properties style:column-width="2.506cm" style:rel-column-width="1421*"/>
    </style:style>
    <style:style style:name="표49.C" style:family="table-column">
      <style:table-column-properties style:column-width="1.401cm" style:rel-column-width="794*"/>
    </style:style>
    <style:style style:name="표49.D" style:family="table-column">
      <style:table-column-properties style:column-width="7.1cm" style:rel-column-width="4025*"/>
    </style:style>
    <style:style style:name="표49.A1" style:family="table-cell">
      <style:table-cell-properties fo:padding="0.097cm" fo:border-left="0.5pt solid #000000" fo:border-right="none" fo:border-top="0.5pt solid #000000" fo:border-bottom="0.5pt solid #000000"/>
    </style:style>
    <style:style style:name="표49.D1" style:family="table-cell">
      <style:table-cell-properties fo:padding="0.097cm" fo:border="0.5pt solid #000000"/>
    </style:style>
    <style:style style:name="표49.A2" style:family="table-cell">
      <style:table-cell-properties fo:padding="0.097cm" fo:border-left="0.5pt solid #000000" fo:border-right="none" fo:border-top="none" fo:border-bottom="0.5pt solid #000000"/>
    </style:style>
    <style:style style:name="표49.D2" style:family="table-cell">
      <style:table-cell-properties fo:padding="0.097cm" fo:border-left="0.5pt solid #000000" fo:border-right="0.5pt solid #000000" fo:border-top="none" fo:border-bottom="0.5pt solid #000000"/>
    </style:style>
    <style:style style:name="표50" style:family="table">
      <style:table-properties style:width="17cm" table:align="margins"/>
    </style:style>
    <style:style style:name="표50.A" style:family="table-column">
      <style:table-column-properties style:column-width="5.994cm" style:rel-column-width="3398*"/>
    </style:style>
    <style:style style:name="표50.B" style:family="table-column">
      <style:table-column-properties style:column-width="2.506cm" style:rel-column-width="1421*"/>
    </style:style>
    <style:style style:name="표50.C" style:family="table-column">
      <style:table-column-properties style:column-width="1.401cm" style:rel-column-width="794*"/>
    </style:style>
    <style:style style:name="표50.D" style:family="table-column">
      <style:table-column-properties style:column-width="7.1cm" style:rel-column-width="4025*"/>
    </style:style>
    <style:style style:name="표50.A1" style:family="table-cell">
      <style:table-cell-properties fo:padding="0.097cm" fo:border-left="0.5pt solid #000000" fo:border-right="none" fo:border-top="0.5pt solid #000000" fo:border-bottom="0.5pt solid #000000"/>
    </style:style>
    <style:style style:name="표50.D1" style:family="table-cell">
      <style:table-cell-properties fo:padding="0.097cm" fo:border="0.5pt solid #000000"/>
    </style:style>
    <style:style style:name="표50.A2" style:family="table-cell">
      <style:table-cell-properties fo:padding="0.097cm" fo:border-left="0.5pt solid #000000" fo:border-right="none" fo:border-top="none" fo:border-bottom="0.5pt solid #000000"/>
    </style:style>
    <style:style style:name="표50.D2" style:family="table-cell">
      <style:table-cell-properties fo:padding="0.097cm" fo:border-left="0.5pt solid #000000" fo:border-right="0.5pt solid #000000" fo:border-top="none" fo:border-bottom="0.5pt solid #000000"/>
    </style:style>
    <style:style style:name="표51" style:family="table">
      <style:table-properties style:width="17cm" table:align="margins"/>
    </style:style>
    <style:style style:name="표51.A" style:family="table-column">
      <style:table-column-properties style:column-width="5.994cm" style:rel-column-width="3398*"/>
    </style:style>
    <style:style style:name="표51.B" style:family="table-column">
      <style:table-column-properties style:column-width="2.506cm" style:rel-column-width="1421*"/>
    </style:style>
    <style:style style:name="표51.C" style:family="table-column">
      <style:table-column-properties style:column-width="1.401cm" style:rel-column-width="794*"/>
    </style:style>
    <style:style style:name="표51.D" style:family="table-column">
      <style:table-column-properties style:column-width="7.1cm" style:rel-column-width="4025*"/>
    </style:style>
    <style:style style:name="표51.A1" style:family="table-cell">
      <style:table-cell-properties fo:padding="0.097cm" fo:border-left="0.5pt solid #000000" fo:border-right="none" fo:border-top="0.5pt solid #000000" fo:border-bottom="0.5pt solid #000000"/>
    </style:style>
    <style:style style:name="표51.D1" style:family="table-cell">
      <style:table-cell-properties fo:padding="0.097cm" fo:border="0.5pt solid #000000"/>
    </style:style>
    <style:style style:name="표51.A2" style:family="table-cell">
      <style:table-cell-properties fo:padding="0.097cm" fo:border-left="0.5pt solid #000000" fo:border-right="none" fo:border-top="none" fo:border-bottom="0.5pt solid #000000"/>
    </style:style>
    <style:style style:name="표51.D2" style:family="table-cell">
      <style:table-cell-properties fo:padding="0.097cm" fo:border-left="0.5pt solid #000000" fo:border-right="0.5pt solid #000000" fo:border-top="none" fo:border-bottom="0.5pt solid #000000"/>
    </style:style>
    <style:style style:name="표52" style:family="table">
      <style:table-properties style:width="17cm" table:align="margins"/>
    </style:style>
    <style:style style:name="표52.A" style:family="table-column">
      <style:table-column-properties style:column-width="5.994cm" style:rel-column-width="3398*"/>
    </style:style>
    <style:style style:name="표52.B" style:family="table-column">
      <style:table-column-properties style:column-width="2.506cm" style:rel-column-width="1421*"/>
    </style:style>
    <style:style style:name="표52.C" style:family="table-column">
      <style:table-column-properties style:column-width="1.401cm" style:rel-column-width="794*"/>
    </style:style>
    <style:style style:name="표52.D" style:family="table-column">
      <style:table-column-properties style:column-width="7.1cm" style:rel-column-width="4025*"/>
    </style:style>
    <style:style style:name="표52.A1" style:family="table-cell">
      <style:table-cell-properties fo:padding="0.097cm" fo:border-left="0.5pt solid #000000" fo:border-right="none" fo:border-top="0.5pt solid #000000" fo:border-bottom="0.5pt solid #000000"/>
    </style:style>
    <style:style style:name="표52.D1" style:family="table-cell">
      <style:table-cell-properties fo:padding="0.097cm" fo:border="0.5pt solid #000000"/>
    </style:style>
    <style:style style:name="표52.A2" style:family="table-cell">
      <style:table-cell-properties fo:padding="0.097cm" fo:border-left="0.5pt solid #000000" fo:border-right="none" fo:border-top="none" fo:border-bottom="0.5pt solid #000000"/>
    </style:style>
    <style:style style:name="표52.D2" style:family="table-cell">
      <style:table-cell-properties fo:padding="0.097cm" fo:border-left="0.5pt solid #000000" fo:border-right="0.5pt solid #000000" fo:border-top="none" fo:border-bottom="0.5pt solid #000000"/>
    </style:style>
    <style:style style:name="표53" style:family="table">
      <style:table-properties style:width="17cm" table:align="margins"/>
    </style:style>
    <style:style style:name="표53.A" style:family="table-column">
      <style:table-column-properties style:column-width="5.994cm" style:rel-column-width="3398*"/>
    </style:style>
    <style:style style:name="표53.B" style:family="table-column">
      <style:table-column-properties style:column-width="2.506cm" style:rel-column-width="1421*"/>
    </style:style>
    <style:style style:name="표53.C" style:family="table-column">
      <style:table-column-properties style:column-width="1.401cm" style:rel-column-width="794*"/>
    </style:style>
    <style:style style:name="표53.D" style:family="table-column">
      <style:table-column-properties style:column-width="7.1cm" style:rel-column-width="4025*"/>
    </style:style>
    <style:style style:name="표53.A1" style:family="table-cell">
      <style:table-cell-properties fo:padding="0.097cm" fo:border-left="0.5pt solid #000000" fo:border-right="none" fo:border-top="0.5pt solid #000000" fo:border-bottom="0.5pt solid #000000"/>
    </style:style>
    <style:style style:name="표53.D1" style:family="table-cell">
      <style:table-cell-properties fo:padding="0.097cm" fo:border="0.5pt solid #000000"/>
    </style:style>
    <style:style style:name="표53.A2" style:family="table-cell">
      <style:table-cell-properties fo:padding="0.097cm" fo:border-left="0.5pt solid #000000" fo:border-right="none" fo:border-top="none" fo:border-bottom="0.5pt solid #000000"/>
    </style:style>
    <style:style style:name="표53.D2" style:family="table-cell">
      <style:table-cell-properties fo:padding="0.097cm" fo:border-left="0.5pt solid #000000" fo:border-right="0.5pt solid #000000" fo:border-top="none" fo:border-bottom="0.5pt solid #000000"/>
    </style:style>
    <style:style style:name="표54" style:family="table">
      <style:table-properties style:width="17cm" table:align="margins"/>
    </style:style>
    <style:style style:name="표54.A" style:family="table-column">
      <style:table-column-properties style:column-width="5.994cm" style:rel-column-width="3398*"/>
    </style:style>
    <style:style style:name="표54.B" style:family="table-column">
      <style:table-column-properties style:column-width="2.506cm" style:rel-column-width="1421*"/>
    </style:style>
    <style:style style:name="표54.C" style:family="table-column">
      <style:table-column-properties style:column-width="1.401cm" style:rel-column-width="794*"/>
    </style:style>
    <style:style style:name="표54.D" style:family="table-column">
      <style:table-column-properties style:column-width="7.1cm" style:rel-column-width="4025*"/>
    </style:style>
    <style:style style:name="표54.A1" style:family="table-cell">
      <style:table-cell-properties fo:padding="0.097cm" fo:border-left="0.5pt solid #000000" fo:border-right="none" fo:border-top="0.5pt solid #000000" fo:border-bottom="0.5pt solid #000000"/>
    </style:style>
    <style:style style:name="표54.D1" style:family="table-cell">
      <style:table-cell-properties fo:padding="0.097cm" fo:border="0.5pt solid #000000"/>
    </style:style>
    <style:style style:name="표54.A2" style:family="table-cell">
      <style:table-cell-properties fo:padding="0.097cm" fo:border-left="0.5pt solid #000000" fo:border-right="none" fo:border-top="none" fo:border-bottom="0.5pt solid #000000"/>
    </style:style>
    <style:style style:name="표54.D2" style:family="table-cell">
      <style:table-cell-properties fo:padding="0.097cm" fo:border-left="0.5pt solid #000000" fo:border-right="0.5pt solid #000000" fo:border-top="none" fo:border-bottom="0.5pt solid #000000"/>
    </style:style>
    <style:style style:name="표55" style:family="table">
      <style:table-properties style:width="17cm" table:align="margins"/>
    </style:style>
    <style:style style:name="표55.A" style:family="table-column">
      <style:table-column-properties style:column-width="5.994cm" style:rel-column-width="3398*"/>
    </style:style>
    <style:style style:name="표55.B" style:family="table-column">
      <style:table-column-properties style:column-width="2.506cm" style:rel-column-width="1421*"/>
    </style:style>
    <style:style style:name="표55.C" style:family="table-column">
      <style:table-column-properties style:column-width="1.401cm" style:rel-column-width="794*"/>
    </style:style>
    <style:style style:name="표55.D" style:family="table-column">
      <style:table-column-properties style:column-width="7.1cm" style:rel-column-width="4025*"/>
    </style:style>
    <style:style style:name="표55.A1" style:family="table-cell">
      <style:table-cell-properties fo:padding="0.097cm" fo:border-left="0.5pt solid #000000" fo:border-right="none" fo:border-top="0.5pt solid #000000" fo:border-bottom="0.5pt solid #000000"/>
    </style:style>
    <style:style style:name="표55.D1" style:family="table-cell">
      <style:table-cell-properties fo:padding="0.097cm" fo:border="0.5pt solid #000000"/>
    </style:style>
    <style:style style:name="표55.A2" style:family="table-cell">
      <style:table-cell-properties fo:padding="0.097cm" fo:border-left="0.5pt solid #000000" fo:border-right="none" fo:border-top="none" fo:border-bottom="0.5pt solid #000000"/>
    </style:style>
    <style:style style:name="표55.D2" style:family="table-cell">
      <style:table-cell-properties fo:padding="0.097cm" fo:border-left="0.5pt solid #000000" fo:border-right="0.5pt solid #000000" fo:border-top="none" fo:border-bottom="0.5pt solid #000000"/>
    </style:style>
    <style:style style:name="표56" style:family="table">
      <style:table-properties style:width="17cm" table:align="margins"/>
    </style:style>
    <style:style style:name="표56.A" style:family="table-column">
      <style:table-column-properties style:column-width="5.994cm" style:rel-column-width="3398*"/>
    </style:style>
    <style:style style:name="표56.B" style:family="table-column">
      <style:table-column-properties style:column-width="2.506cm" style:rel-column-width="1421*"/>
    </style:style>
    <style:style style:name="표56.C" style:family="table-column">
      <style:table-column-properties style:column-width="1.401cm" style:rel-column-width="794*"/>
    </style:style>
    <style:style style:name="표56.D" style:family="table-column">
      <style:table-column-properties style:column-width="7.1cm" style:rel-column-width="4025*"/>
    </style:style>
    <style:style style:name="표56.A1" style:family="table-cell">
      <style:table-cell-properties fo:padding="0.097cm" fo:border-left="0.5pt solid #000000" fo:border-right="none" fo:border-top="0.5pt solid #000000" fo:border-bottom="0.5pt solid #000000"/>
    </style:style>
    <style:style style:name="표56.D1" style:family="table-cell">
      <style:table-cell-properties fo:padding="0.097cm" fo:border="0.5pt solid #000000"/>
    </style:style>
    <style:style style:name="표56.A2" style:family="table-cell">
      <style:table-cell-properties fo:padding="0.097cm" fo:border-left="0.5pt solid #000000" fo:border-right="none" fo:border-top="none" fo:border-bottom="0.5pt solid #000000"/>
    </style:style>
    <style:style style:name="표56.D2" style:family="table-cell">
      <style:table-cell-properties fo:padding="0.097cm" fo:border-left="0.5pt solid #000000" fo:border-right="0.5pt solid #000000" fo:border-top="none" fo:border-bottom="0.5pt solid #000000"/>
    </style:style>
    <style:style style:name="표57" style:family="table">
      <style:table-properties style:width="17cm" table:align="margins"/>
    </style:style>
    <style:style style:name="표57.A" style:family="table-column">
      <style:table-column-properties style:column-width="5.994cm" style:rel-column-width="3398*"/>
    </style:style>
    <style:style style:name="표57.B" style:family="table-column">
      <style:table-column-properties style:column-width="2.506cm" style:rel-column-width="1421*"/>
    </style:style>
    <style:style style:name="표57.C" style:family="table-column">
      <style:table-column-properties style:column-width="1.401cm" style:rel-column-width="794*"/>
    </style:style>
    <style:style style:name="표57.D" style:family="table-column">
      <style:table-column-properties style:column-width="7.1cm" style:rel-column-width="4025*"/>
    </style:style>
    <style:style style:name="표57.A1" style:family="table-cell">
      <style:table-cell-properties fo:padding="0.097cm" fo:border-left="0.5pt solid #000000" fo:border-right="none" fo:border-top="0.5pt solid #000000" fo:border-bottom="0.5pt solid #000000"/>
    </style:style>
    <style:style style:name="표57.D1" style:family="table-cell">
      <style:table-cell-properties fo:padding="0.097cm" fo:border="0.5pt solid #000000"/>
    </style:style>
    <style:style style:name="표57.A2" style:family="table-cell">
      <style:table-cell-properties fo:padding="0.097cm" fo:border-left="0.5pt solid #000000" fo:border-right="none" fo:border-top="none" fo:border-bottom="0.5pt solid #000000"/>
    </style:style>
    <style:style style:name="표57.D2" style:family="table-cell">
      <style:table-cell-properties fo:padding="0.097cm" fo:border-left="0.5pt solid #000000" fo:border-right="0.5pt solid #000000" fo:border-top="none" fo:border-bottom="0.5pt solid #000000"/>
    </style:style>
    <style:style style:name="표58" style:family="table">
      <style:table-properties style:width="17cm" table:align="margins"/>
    </style:style>
    <style:style style:name="표58.A" style:family="table-column">
      <style:table-column-properties style:column-width="5.994cm" style:rel-column-width="3398*"/>
    </style:style>
    <style:style style:name="표58.B" style:family="table-column">
      <style:table-column-properties style:column-width="2.506cm" style:rel-column-width="1421*"/>
    </style:style>
    <style:style style:name="표58.C" style:family="table-column">
      <style:table-column-properties style:column-width="1.401cm" style:rel-column-width="794*"/>
    </style:style>
    <style:style style:name="표58.D" style:family="table-column">
      <style:table-column-properties style:column-width="7.1cm" style:rel-column-width="4025*"/>
    </style:style>
    <style:style style:name="표58.A1" style:family="table-cell">
      <style:table-cell-properties fo:padding="0.097cm" fo:border-left="0.5pt solid #000000" fo:border-right="none" fo:border-top="0.5pt solid #000000" fo:border-bottom="0.5pt solid #000000"/>
    </style:style>
    <style:style style:name="표58.D1" style:family="table-cell">
      <style:table-cell-properties fo:padding="0.097cm" fo:border="0.5pt solid #000000"/>
    </style:style>
    <style:style style:name="표58.A2" style:family="table-cell">
      <style:table-cell-properties fo:padding="0.097cm" fo:border-left="0.5pt solid #000000" fo:border-right="none" fo:border-top="none" fo:border-bottom="0.5pt solid #000000"/>
    </style:style>
    <style:style style:name="표58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paragraph-rsid="002c76f1" style:font-weight-asian="bold" style:font-weight-complex="bold"/>
    </style:style>
    <style:style style:name="P3" style:family="paragraph" style:parent-style-name="Preformatted_20_Text">
      <style:text-properties fo:font-weight="bold" officeooo:paragraph-rsid="0057f189" style:font-weight-asian="bold" style:font-weight-complex="bold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paragraph-rsid="005929b1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normal" officeooo:paragraph-rsid="005929b1" style:font-size-asian="10pt" style:font-weight-asian="normal" style:font-size-complex="12pt" style:font-weight-complex="normal"/>
    </style:style>
    <style:style style:name="P13" style:family="paragraph" style:parent-style-name="Preformatted_20_Text">
      <style:text-properties fo:font-size="12pt" fo:font-weight="normal" officeooo:rsid="005a846b" officeooo:paragraph-rsid="005a846b" style:font-size-asian="10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37af04" style:font-name-asian="Noto Sans Mono CJK KR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38abca" style:font-name-asian="Noto Sans Mono CJK KR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3a91ce" style:font-name-asian="Noto Sans Mono CJK KR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3e8026" style:font-name-asian="Noto Sans Mono CJK KR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2cb31" style:font-name-asian="Noto Sans Mono CJK KR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2dc53" style:font-name-asian="Noto Sans Mono CJK KR" style:font-size-asian="10pt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4ec16" style:font-name-asian="Noto Sans Mono CJK KR" style:font-size-asian="10pt" style:font-weight-asian="bold" style:font-name-complex="Liberation Mono" style:font-size-complex="10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5c3b4" style:font-name-asian="Noto Sans Mono CJK KR" style:font-size-asian="10pt" style:font-weight-asian="bold" style:font-name-complex="Liberation Mono" style:font-size-complex="10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74034" style:font-name-asian="Noto Sans Mono CJK KR" style:font-size-asian="10pt" style:font-weight-asian="bold" style:font-name-complex="Liberation Mono" style:font-size-complex="10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7e62c" style:font-name-asian="Noto Sans Mono CJK KR" style:font-size-asian="10pt" style:font-weight-asian="bold" style:font-name-complex="Liberation Mono" style:font-size-complex="10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93afc" style:font-name-asian="Noto Sans Mono CJK KR" style:font-size-asian="10pt" style:font-weight-asian="bold" style:font-name-complex="Liberation Mono" style:font-size-complex="10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9a1df" style:font-name-asian="Noto Sans Mono CJK KR" style:font-size-asian="10pt" style:font-weight-asian="bold" style:font-name-complex="Liberation Mono" style:font-size-complex="10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b2438" style:font-name-asian="Noto Sans Mono CJK KR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e4ce2" style:font-name-asian="Noto Sans Mono CJK KR" style:font-size-asian="10pt" style:font-weight-asian="bold" style:font-name-complex="Liberation Mono" style:font-size-complex="10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4fa88e" style:font-name-asian="Noto Sans Mono CJK KR" style:font-size-asian="10pt" style:font-weight-asian="bold" style:font-name-complex="Liberation Mono" style:font-size-complex="10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50052f" style:font-name-asian="Noto Sans Mono CJK KR" style:font-size-asian="10pt" style:font-weight-asian="bold" style:font-name-complex="Liberation Mono" style:font-size-complex="10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50711a" style:font-name-asian="Noto Sans Mono CJK KR" style:font-size-asian="10pt" style:font-weight-asian="bold" style:font-name-complex="Liberation Mono" style:font-size-complex="10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50dfd5" style:font-name-asian="Noto Sans Mono CJK KR" style:font-size-asian="10pt" style:font-weight-asian="bold" style:font-name-complex="Liberation Mono" style:font-size-complex="10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paragraph-rsid="0052c95f" style:font-name-asian="Noto Sans Mono CJK KR" style:font-size-asian="10pt" style:font-weight-asian="bold" style:font-name-complex="Liberation Mono" style:font-size-complex="10pt" style:font-weight-complex="bold"/>
    </style:style>
    <style:style style:name="P33" style:family="paragraph" style:parent-style-name="Preformatted_20_Text">
      <style:text-properties style:font-name="Liberation Mono" fo:font-size="10pt" officeooo:paragraph-rsid="002c76f1" style:font-name-asian="Noto Sans Mono CJK KR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paragraph-rsid="002fc71e" style:font-name-asian="Noto Sans Mono CJK KR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paragraph-rsid="00307999" style:font-name-asian="Noto Sans Mono CJK KR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paragraph-rsid="00321b8d" style:font-name-asian="Noto Sans Mono CJK KR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paragraph-rsid="0032d94a" style:font-name-asian="Noto Sans Mono CJK KR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paragraph-rsid="00348d80" style:font-name-asian="Noto Sans Mono CJK KR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36205f" style:font-name-asian="Noto Sans Mono CJK KR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paragraph-rsid="0037af04" style:font-name-asian="Noto Sans Mono CJK KR" style:font-size-asian="10pt" style:font-name-complex="Liberation Mono" style:font-size-complex="10pt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Mono" fo:font-size="10pt" officeooo:paragraph-rsid="0037af04" style:font-name-asian="Noto Sans Mono CJK KR" style:font-size-asian="10pt" style:font-name-complex="Liberation Mono" style:font-size-complex="10pt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Mono" fo:font-size="10pt" officeooo:paragraph-rsid="0042cb31" style:font-name-asian="Noto Sans Mono CJK KR" style:font-size-asian="10pt" style:font-name-complex="Liberation Mono" style:font-size-complex="10pt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Mono" fo:font-size="10pt" officeooo:paragraph-rsid="002c76f1" style:font-name-asian="Noto Sans Mono CJK KR" style:font-size-asian="10pt" style:font-name-complex="Liberation Mono" style:font-size-complex="10pt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2dff49" style:font-name-asian="Noto Sans Mono CJK KR" style:font-size-asian="10pt" style:font-name-complex="Liberation Mono" style:font-size-complex="10pt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Mono" fo:font-size="10pt" officeooo:paragraph-rsid="002fc71e" style:font-name-asian="Noto Sans Mono CJK KR" style:font-size-asian="10pt" style:font-name-complex="Liberation Mono" style:font-size-complex="10pt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321b8d" style:font-name-asian="Noto Sans Mono CJK KR" style:font-size-asian="10pt" style:font-name-complex="Liberation Mono" style:font-size-complex="10pt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32d94a" style:font-name-asian="Noto Sans Mono CJK KR" style:font-size-asian="10pt" style:font-name-complex="Liberation Mono" style:font-size-complex="10pt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36205f" style:font-name-asian="Noto Sans Mono CJK KR" style:font-size-asian="10pt" style:font-name-complex="Liberation Mono" style:font-size-complex="10pt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38abca" style:font-name-asian="Noto Sans Mono CJK KR" style:font-size-asian="10pt" style:font-name-complex="Liberation Mono" style:font-size-complex="10pt"/>
    </style:style>
    <style:style style:name="P50" style:family="paragraph" style:parent-style-name="Preformatted_20_Text">
      <style:paragraph-properties fo:text-align="center" style:justify-single-word="false"/>
      <style:text-properties style:font-name="Liberation Mono" fo:font-size="10pt" officeooo:paragraph-rsid="003a91ce" style:font-name-asian="Noto Sans Mono CJK KR" style:font-size-asian="10pt" style:font-name-complex="Liberation Mono" style:font-size-complex="10pt"/>
    </style:style>
    <style:style style:name="P51" style:family="paragraph" style:parent-style-name="Preformatted_20_Text">
      <style:paragraph-properties fo:text-align="center" style:justify-single-word="false"/>
      <style:text-properties style:font-name="Liberation Mono" fo:font-size="10pt" officeooo:paragraph-rsid="003b077e" style:font-name-asian="Noto Sans Mono CJK KR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paragraph-rsid="0038022f" style:font-name-asian="Noto Sans Mono CJK KR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paragraph-rsid="0038abca" style:font-name-asian="Noto Sans Mono CJK KR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paragraph-rsid="003a91ce" style:font-name-asian="Noto Sans Mono CJK KR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paragraph-rsid="003b077e" style:font-name-asian="Noto Sans Mono CJK KR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paragraph-rsid="003b0d5a" style:font-name-asian="Noto Sans Mono CJK KR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paragraph-rsid="003ce9a5" style:font-name-asian="Noto Sans Mono CJK KR" style:font-size-asian="10pt" style:font-name-complex="Liberation Mono" style:font-size-complex="10pt"/>
    </style:style>
    <style:style style:name="P58" style:family="paragraph" style:parent-style-name="Preformatted_20_Text">
      <style:text-properties style:font-name="Liberation Mono" fo:font-size="10pt" officeooo:paragraph-rsid="003e8026" style:font-name-asian="Noto Sans Mono CJK KR" style:font-size-asian="10pt" style:font-name-complex="Liberation Mono" style:font-size-complex="10pt"/>
    </style:style>
    <style:style style:name="P59" style:family="paragraph" style:parent-style-name="Preformatted_20_Text">
      <style:text-properties style:font-name="Liberation Mono" fo:font-size="10pt" officeooo:paragraph-rsid="003f84a5" style:font-name-asian="Noto Sans Mono CJK KR" style:font-size-asian="10pt" style:font-name-complex="Liberation Mono" style:font-size-complex="10pt"/>
    </style:style>
    <style:style style:name="P60" style:family="paragraph" style:parent-style-name="Preformatted_20_Text">
      <style:text-properties style:font-name="Liberation Mono" fo:font-size="10pt" officeooo:paragraph-rsid="004058b2" style:font-name-asian="Noto Sans Mono CJK KR" style:font-size-asian="10pt" style:font-name-complex="Liberation Mono" style:font-size-complex="10pt"/>
    </style:style>
    <style:style style:name="P61" style:family="paragraph" style:parent-style-name="Preformatted_20_Text">
      <style:text-properties style:font-name="Liberation Mono" fo:font-size="10pt" officeooo:paragraph-rsid="0042cb31" style:font-name-asian="Noto Sans Mono CJK KR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paragraph-rsid="0042dc53" style:font-name-asian="Noto Sans Mono CJK KR" style:font-size-asian="10pt" style:font-name-complex="Liberation Mono" style:font-size-complex="10pt"/>
    </style:style>
    <style:style style:name="P63" style:family="paragraph" style:parent-style-name="Preformatted_20_Text">
      <style:paragraph-properties fo:line-height="115%" fo:text-align="center" style:justify-single-word="false"/>
      <style:text-properties style:font-name="Liberation Mono" fo:font-size="10pt" officeooo:paragraph-rsid="0042cb31" style:font-name-asian="Noto Sans Mono CJK KR" style:font-size-asian="10pt" style:font-name-complex="Liberation Mono" style:font-size-complex="10pt"/>
    </style:style>
    <style:style style:name="P64" style:family="paragraph" style:parent-style-name="Preformatted_20_Text">
      <style:paragraph-properties fo:line-height="115%" fo:text-align="center" style:justify-single-word="false"/>
      <style:text-properties style:font-name="Liberation Mono" fo:font-size="10pt" officeooo:paragraph-rsid="0042dc53" style:font-name-asian="Noto Sans Mono CJK KR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paragraph-rsid="0043ad4a" style:font-name-asian="Noto Sans Mono CJK KR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paragraph-rsid="0044ec16" style:font-name-asian="Noto Sans Mono CJK KR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paragraph-rsid="0045c3b4" style:font-name-asian="Noto Sans Mono CJK KR" style:font-size-asian="10pt" style:font-name-complex="Liberation Mono" style:font-size-complex="10pt"/>
    </style:style>
    <style:style style:name="P68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5c3b4" style:font-name-asian="Noto Sans Mono CJK KR" style:font-size-asian="10pt" style:font-weight-asian="normal" style:font-name-complex="Liberation Mono" style:font-size-complex="10pt" style:font-weight-complex="normal"/>
    </style:style>
    <style:style style:name="P69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74034" style:font-name-asian="Noto Sans Mono CJK KR" style:font-size-asian="10pt" style:font-weight-asian="normal" style:font-name-complex="Liberation Mono" style:font-size-complex="10pt" style:font-weight-complex="normal"/>
    </style:style>
    <style:style style:name="P70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7e62c" style:font-name-asian="Noto Sans Mono CJK KR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8bac5" style:font-name-asian="Noto Sans Mono CJK KR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93afc" style:font-name-asian="Noto Sans Mono CJK KR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9a1df" style:font-name-asian="Noto Sans Mono CJK KR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9c5e5" style:font-name-asian="Noto Sans Mono CJK KR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b2438" style:font-name-asian="Noto Sans Mono CJK KR" style:font-size-asian="10pt" style:font-weight-asian="normal" style:font-name-complex="Liberation Mono" style:font-size-complex="10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e4ce2" style:font-name-asian="Noto Sans Mono CJK KR" style:font-size-asian="10pt" style:font-weight-asian="normal" style:font-name-complex="Liberation Mono" style:font-size-complex="10pt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4fa88e" style:font-name-asian="Noto Sans Mono CJK KR" style:font-size-asian="10pt" style:font-weight-asian="normal" style:font-name-complex="Liberation Mono" style:font-size-complex="10pt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50052f" style:font-name-asian="Noto Sans Mono CJK KR" style:font-size-asian="10pt" style:font-weight-asian="normal" style:font-name-complex="Liberation Mono" style:font-size-complex="10pt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50711a" style:font-name-asian="Noto Sans Mono CJK KR" style:font-size-asian="10pt" style:font-weight-asian="normal" style:font-name-complex="Liberation Mono" style:font-size-complex="10pt" style:font-weight-complex="normal"/>
    </style:style>
    <style:style style:name="P80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50dfd5" style:font-name-asian="Noto Sans Mono CJK KR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52c95f" style:font-name-asian="Noto Sans Mono CJK KR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paragraph-rsid="0054abbf" style:font-name-asian="Noto Sans Mono CJK KR" style:font-size-asian="10pt" style:font-weight-asian="normal" style:font-name-complex="Liberation Mono" style:font-size-complex="10pt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5c3b4" officeooo:paragraph-rsid="0045c3b4" style:font-name-asian="Noto Sans Mono CJK KR" style:font-size-asian="10pt" style:font-weight-asian="normal" style:font-name-complex="Liberation Mono" style:font-size-complex="10pt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5c3b4" officeooo:paragraph-rsid="00474034" style:font-name-asian="Noto Sans Mono CJK KR" style:font-size-asian="10pt" style:font-weight-asian="normal" style:font-name-complex="Liberation Mono" style:font-size-complex="10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5c3b4" officeooo:paragraph-rsid="0047e62c" style:font-name-asian="Noto Sans Mono CJK KR" style:font-size-asian="10pt" style:font-weight-asian="normal" style:font-name-complex="Liberation Mono" style:font-size-complex="10pt" style:font-weight-complex="normal"/>
    </style:style>
    <style:style style:name="P86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5c3b4" officeooo:paragraph-rsid="00493afc" style:font-name-asian="Noto Sans Mono CJK KR" style:font-size-asian="10pt" style:font-weight-asian="normal" style:font-name-complex="Liberation Mono" style:font-size-complex="10pt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5c3b4" officeooo:paragraph-rsid="0049a1df" style:font-name-asian="Noto Sans Mono CJK KR" style:font-size-asian="10pt" style:font-weight-asian="normal" style:font-name-complex="Liberation Mono" style:font-size-complex="10pt" style:font-weight-complex="normal"/>
    </style:style>
    <style:style style:name="P88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5c3b4" officeooo:paragraph-rsid="004b2438" style:font-name-asian="Noto Sans Mono CJK KR" style:font-size-asian="10pt" style:font-weight-asian="normal" style:font-name-complex="Liberation Mono" style:font-size-complex="10pt" style:font-weight-complex="normal"/>
    </style:style>
    <style:style style:name="P89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5c3b4" officeooo:paragraph-rsid="004e4ce2" style:font-name-asian="Noto Sans Mono CJK KR" style:font-size-asian="10pt" style:font-weight-asian="normal" style:font-name-complex="Liberation Mono" style:font-size-complex="10pt" style:font-weight-complex="normal"/>
    </style:style>
    <style:style style:name="P90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74034" officeooo:paragraph-rsid="00474034" style:font-name-asian="Noto Sans Mono CJK KR" style:font-size-asian="10pt" style:font-weight-asian="normal" style:font-name-complex="Liberation Mono" style:font-size-complex="10pt" style:font-weight-complex="normal"/>
    </style:style>
    <style:style style:name="P91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7e62c" officeooo:paragraph-rsid="0047e62c" style:font-name-asian="Noto Sans Mono CJK KR" style:font-size-asian="10pt" style:font-weight-asian="normal" style:font-name-complex="Liberation Mono" style:font-size-complex="10pt" style:font-weight-complex="normal"/>
    </style:style>
    <style:style style:name="P92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7e62c" officeooo:paragraph-rsid="00493afc" style:font-name-asian="Noto Sans Mono CJK KR" style:font-size-asian="10pt" style:font-weight-asian="normal" style:font-name-complex="Liberation Mono" style:font-size-complex="10pt" style:font-weight-complex="normal"/>
    </style:style>
    <style:style style:name="P93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93afc" officeooo:paragraph-rsid="00493afc" style:font-name-asian="Noto Sans Mono CJK KR" style:font-size-asian="10pt" style:font-weight-asian="normal" style:font-name-complex="Liberation Mono" style:font-size-complex="10pt" style:font-weight-complex="normal"/>
    </style:style>
    <style:style style:name="P94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9a1df" officeooo:paragraph-rsid="0049a1df" style:font-name-asian="Noto Sans Mono CJK KR" style:font-size-asian="10pt" style:font-weight-asian="normal" style:font-name-complex="Liberation Mono" style:font-size-complex="10pt" style:font-weight-complex="normal"/>
    </style:style>
    <style:style style:name="P95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9a1df" officeooo:paragraph-rsid="004b2438" style:font-name-asian="Noto Sans Mono CJK KR" style:font-size-asian="10pt" style:font-weight-asian="normal" style:font-name-complex="Liberation Mono" style:font-size-complex="10pt" style:font-weight-complex="normal"/>
    </style:style>
    <style:style style:name="P96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9a1df" officeooo:paragraph-rsid="004e4ce2" style:font-name-asian="Noto Sans Mono CJK KR" style:font-size-asian="10pt" style:font-weight-asian="normal" style:font-name-complex="Liberation Mono" style:font-size-complex="10pt" style:font-weight-complex="normal"/>
    </style:style>
    <style:style style:name="P97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b2438" officeooo:paragraph-rsid="004b2438" style:font-name-asian="Noto Sans Mono CJK KR" style:font-size-asian="10pt" style:font-weight-asian="normal" style:font-name-complex="Liberation Mono" style:font-size-complex="10pt" style:font-weight-complex="normal"/>
    </style:style>
    <style:style style:name="P98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b2438" officeooo:paragraph-rsid="004e4ce2" style:font-name-asian="Noto Sans Mono CJK KR" style:font-size-asian="10pt" style:font-weight-asian="normal" style:font-name-complex="Liberation Mono" style:font-size-complex="10pt" style:font-weight-complex="normal"/>
    </style:style>
    <style:style style:name="P99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e4ce2" officeooo:paragraph-rsid="004e4ce2" style:font-name-asian="Noto Sans Mono CJK KR" style:font-size-asian="10pt" style:font-weight-asian="normal" style:font-name-complex="Liberation Mono" style:font-size-complex="10pt" style:font-weight-complex="normal"/>
    </style:style>
    <style:style style:name="P100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e4ce2" officeooo:paragraph-rsid="004fa88e" style:font-name-asian="Noto Sans Mono CJK KR" style:font-size-asian="10pt" style:font-weight-asian="normal" style:font-name-complex="Liberation Mono" style:font-size-complex="10pt" style:font-weight-complex="normal"/>
    </style:style>
    <style:style style:name="P101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e4ce2" officeooo:paragraph-rsid="0050052f" style:font-name-asian="Noto Sans Mono CJK KR" style:font-size-asian="10pt" style:font-weight-asian="normal" style:font-name-complex="Liberation Mono" style:font-size-complex="10pt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fa88e" officeooo:paragraph-rsid="004fa88e" style:font-name-asian="Noto Sans Mono CJK KR" style:font-size-asian="10pt" style:font-weight-asian="normal" style:font-name-complex="Liberation Mono" style:font-size-complex="10pt" style:font-weight-complex="normal"/>
    </style:style>
    <style:style style:name="P103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4fa88e" officeooo:paragraph-rsid="0050052f" style:font-name-asian="Noto Sans Mono CJK KR" style:font-size-asian="10pt" style:font-weight-asian="normal" style:font-name-complex="Liberation Mono" style:font-size-complex="10pt" style:font-weight-complex="normal"/>
    </style:style>
    <style:style style:name="P104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50052f" officeooo:paragraph-rsid="0050052f" style:font-name-asian="Noto Sans Mono CJK KR" style:font-size-asian="10pt" style:font-weight-asian="normal" style:font-name-complex="Liberation Mono" style:font-size-complex="10pt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50711a" officeooo:paragraph-rsid="0050711a" style:font-name-asian="Noto Sans Mono CJK KR" style:font-size-asian="10pt" style:font-weight-asian="normal" style:font-name-complex="Liberation Mono" style:font-size-complex="10pt" style:font-weight-complex="normal"/>
    </style:style>
    <style:style style:name="P106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50711a" officeooo:paragraph-rsid="0050dfd5" style:font-name-asian="Noto Sans Mono CJK KR" style:font-size-asian="10pt" style:font-weight-asian="normal" style:font-name-complex="Liberation Mono" style:font-size-complex="10pt" style:font-weight-complex="normal"/>
    </style:style>
    <style:style style:name="P107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50711a" officeooo:paragraph-rsid="0052c95f" style:font-name-asian="Noto Sans Mono CJK KR" style:font-size-asian="10pt" style:font-weight-asian="normal" style:font-name-complex="Liberation Mono" style:font-size-complex="10pt" style:font-weight-complex="normal"/>
    </style:style>
    <style:style style:name="P108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52c95f" officeooo:paragraph-rsid="0052c95f" style:font-name-asian="Noto Sans Mono CJK KR" style:font-size-asian="10pt" style:font-weight-asian="normal" style:font-name-complex="Liberation Mono" style:font-size-complex="10pt" style:font-weight-complex="normal"/>
    </style:style>
    <style:style style:name="P109" style:family="paragraph" style:parent-style-name="Preformatted_20_Text">
      <style:text-properties fo:font-size="10pt" fo:font-weight="normal" officeooo:rsid="005a846b" officeooo:paragraph-rsid="005a846b" style:font-size-asian="10pt" style:font-weight-asian="normal" style:font-size-complex="10pt" style:font-weight-complex="normal"/>
    </style:style>
    <style:style style:name="P110" style:family="paragraph" style:parent-style-name="Preformatted_20_Text">
      <style:text-properties officeooo:paragraph-rsid="003e8026"/>
    </style:style>
    <style:style style:name="P111" style:family="paragraph" style:parent-style-name="Preformatted_20_Text">
      <style:text-properties officeooo:rsid="003e8026" officeooo:paragraph-rsid="003e8026"/>
    </style:style>
    <style:style style:name="P112" style:family="paragraph" style:parent-style-name="Preformatted_20_Text">
      <style:paragraph-properties fo:break-before="page"/>
    </style:style>
    <style:style style:name="P113" style:family="paragraph" style:parent-style-name="Preformatted_20_Text">
      <style:text-properties officeooo:paragraph-rsid="0044ec16"/>
    </style:style>
    <style:style style:name="P114" style:family="paragraph" style:parent-style-name="Preformatted_20_Text">
      <style:paragraph-properties fo:text-align="start" style:justify-single-word="false"/>
      <style:text-properties style:font-name="Noto Sans" fo:font-size="10pt" fo:font-weight="normal" officeooo:paragraph-rsid="0048bac5" style:font-name-asian="Noto Sans" style:font-size-asian="10pt" style:font-weight-asian="normal" style:font-name-complex="Liberation Mono" style:font-size-complex="10pt" style:font-weight-complex="normal"/>
    </style:style>
    <style:style style:name="P115" style:family="paragraph" style:parent-style-name="Preformatted_20_Text">
      <style:paragraph-properties fo:text-align="start" style:justify-single-word="false"/>
      <style:text-properties style:font-name="Noto Sans" fo:font-size="10pt" fo:font-weight="normal" officeooo:paragraph-rsid="00493afc" style:font-name-asian="Noto Sans" style:font-size-asian="10pt" style:font-weight-asian="normal" style:font-name-complex="Liberation Mono" style:font-size-complex="10pt" style:font-weight-complex="normal"/>
    </style:style>
    <style:style style:name="P116" style:family="paragraph" style:parent-style-name="Preformatted_20_Text">
      <style:text-properties officeooo:paragraph-rsid="0057f189"/>
    </style:style>
    <style:style style:name="P117" style:family="paragraph" style:parent-style-name="Preformatted_20_Text">
      <style:text-properties officeooo:paragraph-rsid="005a846b"/>
    </style:style>
    <style:style style:name="P118" style:family="paragraph" style:parent-style-name="Preformatted_20_Text">
      <style:text-properties officeooo:rsid="005c3163" officeooo:paragraph-rsid="005c3163"/>
    </style:style>
    <style:style style:name="P119" style:family="paragraph" style:parent-style-name="Standard">
      <style:text-properties officeooo:paragraph-rsid="002c76f1"/>
    </style:style>
    <style:style style:name="P120" style:family="paragraph" style:parent-style-name="Standard">
      <style:text-properties officeooo:paragraph-rsid="002dff49"/>
    </style:style>
    <style:style style:name="P121" style:family="paragraph" style:parent-style-name="Standard">
      <style:text-properties officeooo:paragraph-rsid="0037af04"/>
    </style:style>
    <style:style style:name="P122" style:family="paragraph" style:parent-style-name="Standard">
      <style:text-properties officeooo:paragraph-rsid="0038abca"/>
    </style:style>
    <style:style style:name="P123" style:family="paragraph" style:parent-style-name="Standard">
      <style:text-properties officeooo:paragraph-rsid="003e8026"/>
    </style:style>
    <style:style style:name="P124" style:family="paragraph" style:parent-style-name="Standard">
      <style:text-properties officeooo:paragraph-rsid="0042dc53"/>
    </style:style>
    <style:style style:name="P125" style:family="paragraph" style:parent-style-name="Standard">
      <style:text-properties officeooo:paragraph-rsid="0044ec16"/>
    </style:style>
    <style:style style:name="P126" style:family="paragraph" style:parent-style-name="Standard">
      <style:text-properties officeooo:paragraph-rsid="0045c3b4"/>
    </style:style>
    <style:style style:name="P127" style:family="paragraph" style:parent-style-name="Standard">
      <style:text-properties officeooo:paragraph-rsid="00474034"/>
    </style:style>
    <style:style style:name="P128" style:family="paragraph" style:parent-style-name="Standard">
      <style:text-properties officeooo:paragraph-rsid="0047e62c"/>
    </style:style>
    <style:style style:name="P129" style:family="paragraph" style:parent-style-name="Standard">
      <style:text-properties style:font-name="Noto Sans" officeooo:paragraph-rsid="0048bac5" style:font-name-asian="Noto Sans"/>
    </style:style>
    <style:style style:name="P130" style:family="paragraph" style:parent-style-name="Standard">
      <style:text-properties style:font-name="Noto Sans" officeooo:paragraph-rsid="00493afc" style:font-name-asian="Noto Sans"/>
    </style:style>
    <style:style style:name="P131" style:family="paragraph" style:parent-style-name="Standard">
      <style:text-properties officeooo:paragraph-rsid="00493afc"/>
    </style:style>
    <style:style style:name="P132" style:family="paragraph" style:parent-style-name="Standard">
      <style:text-properties officeooo:paragraph-rsid="0049a1df"/>
    </style:style>
    <style:style style:name="P133" style:family="paragraph" style:parent-style-name="Standard">
      <style:text-properties officeooo:paragraph-rsid="004b2438"/>
    </style:style>
    <style:style style:name="P134" style:family="paragraph" style:parent-style-name="Standard">
      <style:text-properties officeooo:paragraph-rsid="004e4ce2"/>
    </style:style>
    <style:style style:name="P135" style:family="paragraph" style:parent-style-name="Standard">
      <style:text-properties officeooo:paragraph-rsid="004fa88e"/>
    </style:style>
    <style:style style:name="P136" style:family="paragraph" style:parent-style-name="Standard">
      <style:text-properties officeooo:paragraph-rsid="0050052f"/>
    </style:style>
    <style:style style:name="P137" style:family="paragraph" style:parent-style-name="Standard">
      <style:text-properties officeooo:paragraph-rsid="0050dfd5"/>
    </style:style>
    <style:style style:name="P138" style:family="paragraph" style:parent-style-name="Standard">
      <style:text-properties officeooo:paragraph-rsid="0052c95f"/>
    </style:style>
    <style:style style:name="P139" style:family="paragraph" style:parent-style-name="Standard">
      <style:text-properties officeooo:paragraph-rsid="0054abbf"/>
    </style:style>
    <style:style style:name="P140" style:family="paragraph" style:parent-style-name="Table_20_Contents">
      <style:text-properties style:font-name="Liberation Mono" fo:font-size="10pt" style:font-name-asian="Noto Sans Mono CJK KR" style:font-size-asian="10pt" style:font-name-complex="Liberation Mono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Mono" fo:font-size="10pt" officeooo:rsid="002fc71e" officeooo:paragraph-rsid="002fc71e" style:font-name-asian="Noto Sans Mono CJK KR" style:font-size-asian="10pt" style:font-name-complex="Liberation Mono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Mono" fo:font-size="10pt" officeooo:rsid="00321b8d" officeooo:paragraph-rsid="00321b8d" style:font-name-asian="Noto Sans Mono CJK KR" style:font-size-asian="10pt" style:font-name-complex="Liberation Mono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Mono" fo:font-size="10pt" officeooo:rsid="0032d94a" officeooo:paragraph-rsid="0032d94a" style:font-name-asian="Noto Sans Mono CJK KR" style:font-size-asian="10pt" style:font-name-complex="Liberation Mono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Mono" fo:font-size="10pt" officeooo:rsid="0036205f" officeooo:paragraph-rsid="0036205f" style:font-name-asian="Noto Sans Mono CJK KR" style:font-size-asian="10pt" style:font-name-complex="Liberation Mono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Mono" fo:font-size="10pt" officeooo:rsid="003a91ce" officeooo:paragraph-rsid="003a91ce" style:font-name-asian="Noto Sans Mono CJK KR" style:font-size-asian="10pt" style:font-name-complex="Liberation Mono" style:font-size-complex="10pt"/>
    </style:style>
    <style:style style:name="P146" style:family="paragraph" style:parent-style-name="Table_20_Contents">
      <style:text-properties style:font-name="Liberation Mono" fo:font-size="10pt" officeooo:rsid="003b0d5a" officeooo:paragraph-rsid="003b0d5a" style:font-name-asian="Noto Sans Mono CJK KR" style:font-size-asian="10pt" style:font-name-complex="Liberation Mono" style:font-size-complex="10pt"/>
    </style:style>
    <style:style style:name="P147" style:family="paragraph" style:parent-style-name="Table_20_Contents">
      <style:text-properties style:font-name="Liberation Mono" fo:font-size="10pt" officeooo:rsid="003ce9a5" officeooo:paragraph-rsid="003ce9a5" style:font-name-asian="Noto Sans Mono CJK KR" style:font-size-asian="10pt" style:font-name-complex="Liberation Mono" style:font-size-complex="10pt"/>
    </style:style>
    <style:style style:name="P148" style:family="paragraph" style:parent-style-name="Table_20_Contents">
      <style:text-properties style:font-name="Liberation Mono" fo:font-size="10pt" officeooo:rsid="003e8026" officeooo:paragraph-rsid="003e8026" style:font-name-asian="Noto Sans Mono CJK KR" style:font-size-asian="10pt" style:font-name-complex="Liberation Mono" style:font-size-complex="10pt"/>
    </style:style>
    <style:style style:name="P149" style:family="paragraph" style:parent-style-name="Table_20_Contents">
      <style:text-properties style:font-name="Liberation Mono" fo:font-size="10pt" officeooo:rsid="003e8026" officeooo:paragraph-rsid="0042dc53" style:font-name-asian="Noto Sans Mono CJK KR" style:font-size-asian="10pt" style:font-name-complex="Liberation Mono" style:font-size-complex="10pt"/>
    </style:style>
    <style:style style:name="P150" style:family="paragraph" style:parent-style-name="Table_20_Contents">
      <style:text-properties style:font-name="Liberation Mono" fo:font-size="10pt" officeooo:rsid="003e8026" officeooo:paragraph-rsid="0044ec16" style:font-name-asian="Noto Sans Mono CJK KR" style:font-size-asian="10pt" style:font-name-complex="Liberation Mono" style:font-size-complex="10pt"/>
    </style:style>
    <style:style style:name="P151" style:family="paragraph" style:parent-style-name="Table_20_Contents">
      <style:text-properties style:font-name="Liberation Mono" fo:font-size="10pt" officeooo:rsid="0043ad4a" officeooo:paragraph-rsid="0043ad4a" style:font-name-asian="Noto Sans Mono CJK KR" style:font-size-asian="10pt" style:font-name-complex="Liberation Mono" style:font-size-complex="10pt"/>
    </style:style>
    <style:style style:name="P152" style:family="paragraph" style:parent-style-name="Table_20_Contents">
      <style:text-properties style:font-name="Liberation Mono" fo:font-size="10pt" officeooo:rsid="0043ad4a" officeooo:paragraph-rsid="0044ec16" style:font-name-asian="Noto Sans Mono CJK KR" style:font-size-asian="10pt" style:font-name-complex="Liberation Mono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Mono" fo:font-size="10pt" style:font-name-asian="Noto Sans Mono CJK KR" style:font-size-asian="10pt" style:font-name-complex="Liberation Mono" style:font-size-complex="10pt"/>
    </style:style>
    <style:style style:name="P154" style:family="paragraph">
      <loext:graphic-properties draw:fill="none"/>
      <style:text-properties fo:font-size="10pt"/>
    </style:style>
    <style:style style:name="P1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size="12pt" fo:font-style="normal" fo:text-shadow="none" style:text-underline-style="none" fo:font-weight="bold" style:letter-kerning="true" style:font-name-asian="Noto Sans CJK KR1" style:font-size-asian="12pt" style:font-style-asian="normal" style:font-weight-asian="bold" style:font-name-complex="Noto Sans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f189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57f189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5a846b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5a846b" style:font-size-asian="10pt" style:font-weight-asian="normal" style:font-size-complex="12pt" style:font-weight-complex="normal"/>
    </style:style>
    <style:style style:name="T10" style:family="text">
      <style:text-properties officeooo:rsid="002b0595"/>
    </style:style>
    <style:style style:name="T11" style:family="text">
      <style:text-properties style:font-name="Liberation Mono" fo:font-size="10pt" style:font-name-asian="Noto Sans Mono CJK KR" style:font-size-asian="10pt" style:font-name-complex="Liberation Mono" style:font-size-complex="10pt"/>
    </style:style>
    <style:style style:name="T12" style:family="text">
      <style:text-properties officeooo:rsid="00321b8d"/>
    </style:style>
    <style:style style:name="T13" style:family="text">
      <style:text-properties officeooo:rsid="0042dc53"/>
    </style:style>
    <style:style style:name="T14" style:family="text">
      <style:text-properties fo:font-size="10pt" fo:font-weight="normal" style:font-size-asian="10pt" style:font-weight-asian="normal" style:font-name-complex="Liberation Mono" style:font-size-complex="10pt" style:font-weight-complex="normal"/>
    </style:style>
    <style:style style:name="T15" style:family="text">
      <style:text-properties officeooo:rsid="0057f189"/>
    </style:style>
    <style:style style:name="T16" style:family="text">
      <style:text-properties officeooo:rsid="00587820"/>
    </style:style>
    <style:style style:name="T17" style:family="text">
      <style:text-properties officeooo:rsid="005929b1"/>
    </style:style>
    <style:style style:name="T18" style:family="text">
      <style:text-properties officeooo:rsid="005c3163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shadow="hidden" draw:shadow-offset-x="0.199cm" draw:shadow-offset-y="0.199cm" draw:shadow-color="#808080" style:mirror="none" loext:decorative="false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화살촉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7"><text:span text:style-name="T1">AI Consulting Platform - 컨설턴트 입력 워크플로우 가이드</text:span></text:p>
      <text:p text:style-name="P5">프로젝트 생성부터 컨설팅 보고서 도출까지</text:p>
      <text:p text:style-name="P9"/>
      <text:p text:style-name="Preformatted_20_Text"/>
      <text:p text:style-name="Preformatted_20_Text">본 문서는 AI Consulting Platform에서 새 프로젝트를 시작하여 최종 컨설팅 보고서를 도출하기까지 컨설턴트가 입력해야 하는 모든 항목을 워크플로우 순서대로 정리한 것이다.</text:p>
      <text:p text:style-name="Preformatted_20_Text"/>
      <text:p text:style-name="Preformatted_20_Text"/>
      <text:p text:style-name="Preformatted_20_Text"><text:s text:c="29"/><text:span text:style-name="T3"><text:s/></text:span><text:span text:style-name="T4">[ 목 차 ]</text:span></text:p>
      <text:p text:style-name="Preformatted_20_Text"/>
      <text:p text:style-name="Preformatted_20_Text"><text:s text:c="2"/>1. 프로젝트 생성 (Project Creation)</text:p>
      <text:p text:style-name="Preformatted_20_Text"/>
      <text:p text:style-name="Preformatted_20_Text"><text:s text:c="2"/>2. Stage 1: AI 비전 및 전략 수립 (Strategy)</text:p>
      <text:p text:style-name="Preformatted_20_Text"/>
      <text:p text:style-name="Preformatted_20_Text"><text:s text:c="2"/>3. Stage 2: Use Case 및 설계 정의 (Define &amp; Design)</text:p>
      <text:p text:style-name="Preformatted_20_Text"/>
      <text:p text:style-name="Preformatted_20_Text"><text:s text:c="2"/>4. Stage 3: 플랫폼 및 솔루션 구축 (Build &amp; Implement)</text:p>
      <text:p text:style-name="Preformatted_20_Text"/>
      <text:p text:style-name="Preformatted_20_Text"><text:s text:c="2"/>5. Stage 4: 파일럿 및 확산 (Scale &amp; Deploy)</text:p>
      <text:p text:style-name="Preformatted_20_Text"/>
      <text:p text:style-name="Preformatted_20_Text"><text:s text:c="2"/>6. Stage 5: 운영, 모니터링 및 개선 (Operate &amp; Optimize)</text:p>
      <text:p text:style-name="Preformatted_20_Text"/>
      <text:p text:style-name="Preformatted_20_Text"><text:s text:c="2"/>7. 추가 분석: MLOps 기술 표준 (제5장)</text:p>
      <text:p text:style-name="Preformatted_20_Text"/>
      <text:p text:style-name="Preformatted_20_Text"><text:s text:c="2"/>8. 추가 분석: 인력 구성 및 조직 체계 (제6장)</text:p>
      <text:p text:style-name="Preformatted_20_Text"/>
      <text:p text:style-name="Preformatted_20_Text"><text:s text:c="2"/>9. 시나리오 분석 및 선택</text:p>
      <text:p text:style-name="Preformatted_20_Text"/>
      <text:p text:style-name="Preformatted_20_Text"><text:s/>10. 협업 및 검토 (피드백/승인)</text:p>
      <text:p text:style-name="Preformatted_20_Text"/>
      <text:p text:style-name="Preformatted_20_Text"><text:s/>11. 최종 보고서 생성</text:p>
      <text:p text:style-name="Preformatted_20_Text"/>
      <text:p text:style-name="Preformatted_20_Text"/>
      <text:p text:style-name="P4"/>
      <text:p text:style-name="P6">【 STEP 1 】 프로젝트 생성 (Project Creation)</text:p>
      <text:p text:style-name="Preformatted_20_Text"/>
      <text:p text:style-name="Preformatted_20_Text">API 엔드포인트: POST /api/v1/projects</text:p>
      <text:p text:style-name="Preformatted_20_Text">요청 모델: CreateProjectRequest</text:p>
      <text:p text:style-name="Preformatted_20_Text"/>
      <text:p text:style-name="Preformatted_20_Text">본 단계에서는 고객사의 기본 정보와 현황을 입력하여 새로운 컨설팅 프로젝트를 생성한다. 이 정보는 이후 모든 분석의 기초 데이터로 활용된다.</text:p>
      <text:p text:style-name="Preformatted_20_Text"/>
      <text:p text:style-name="P116">1. 모든 필수 항목을 입력한다.</text:p>
      <text:p text:style-name="P116">2. 선택 항목은 해당되는 경우에만 입력한다.</text:p>
      <text:p text:style-name="P116">3. 조직 준비도 슬라이더를 조정하여 현재 수준을 설정한다.</text:p>
      <text:p text:style-name="P116">4. `컨설팅 시작` 버튼을 클릭한다.</text:p>
      <text:p text:style-name="P116">5. 시스템이 입력 정보를 기반으로 초기 AI 성숙도를 자동 산정한다.</text:p>
      <text:p text:style-name="Preformatted_20_Text"/>
      <text:p text:style-name="P8">1.1 기업 기본 정보 (Company Basic Information)</text:p>
      <text:p text:style-name="Preformatted_20_Text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>
          <table:table-cell table:style-name="표1.A1" office:value-type="string">
            <text:p text:style-name="P2">필드명</text:p>
          </table:table-cell>
          <table:table-cell table:style-name="표1.A1" office:value-type="string">
            <text:p text:style-name="P2">데이터 타입</text:p>
          </table:table-cell>
          <table:table-cell table:style-name="표1.A1" office:value-type="string">
            <text:p text:style-name="P2">필수</text:p>
          </table:table-cell>
          <table:table-cell table:style-name="표1.D1" office:value-type="string">
            <text:p text:style-name="P2">설명</text:p>
          </table:table-cell>
        </table:table-row>
        <table:table-row>
          <table:table-cell table:style-name="표1.A2" office:value-type="string">
            <text:p text:style-name="P33">name</text:p>
          </table:table-cell>
          <table:table-cell table:style-name="표1.A2" office:value-type="string">
            <text:p text:style-name="P43">String</text:p>
          </table:table-cell>
          <table:table-cell table:style-name="표1.A2" office:value-type="string">
            <text:p text:style-name="P43">O</text:p>
          </table:table-cell>
          <table:table-cell table:style-name="표1.D2" office:value-type="string">
            <text:p text:style-name="P33">기업명을 입력한다. 공식 법인명</text:p>
            <text:p text:style-name="P33">또는 통용되는 상호명을 기재한다</text:p>
          </table:table-cell>
        </table:table-row>
        <table:table-row>
          <table:table-cell table:style-name="표1.A2" office:value-type="string">
            <text:p text:style-name="P33">industry</text:p>
          </table:table-cell>
          <table:table-cell table:style-name="표1.A2" office:value-type="string">
            <text:p text:style-name="P43">Enum</text:p>
          </table:table-cell>
          <table:table-cell table:style-name="표1.A2" office:value-type="string">
            <text:p text:style-name="P43">O</text:p>
          </table:table-cell>
          <table:table-cell table:style-name="표1.D2" office:value-type="string">
            <text:p text:style-name="P33">산업 분류를 선택한다.</text:p>
            <text:p text:style-name="P119">- manufacturing: 제조업</text:p>
            <text:p text:style-name="P119">- finance: 금융업</text:p>
            <text:p text:style-name="P119">- healthcare: 헬스케어</text:p>
            <text:p text:style-name="P119">- retail: 유통/소매</text:p>
            <text:p text:style-name="P119">- logistics: 물류</text:p>
            <text:p text:style-name="P119">- energy: 에너지</text:p>
            <text:p text:style-name="P119">- telecom: 통신</text:p>
            <text:p text:style-name="P119">- public: 공공</text:p>
            <text:p text:style-name="P119"><text:span text:style-name="T11">-other: 기타</text:span></text:p>
          </table:table-cell>
        </table:table-row>
        <table:table-row>
          <table:table-cell table:style-name="표1.A2" office:value-type="string">
            <text:p text:style-name="P33">company_size</text:p>
          </table:table-cell>
          <table:table-cell table:style-name="표1.A2" office:value-type="string">
            <text:p text:style-name="P44">Enum</text:p>
          </table:table-cell>
          <table:table-cell table:style-name="표1.A2" office:value-type="string">
            <text:p text:style-name="P44">O</text:p>
          </table:table-cell>
          <table:table-cell table:style-name="표1.D2" office:value-type="string">
            <text:p text:style-name="P120">기업 규모를 선택한다.</text:p>
            <text:p text:style-name="P120">- startup: 스타트업 (50인 미만)</text:p>
            <text:p text:style-name="P120">- small: 중소기업 (50-300인)</text:p>
            <text:p text:style-name="P120">- medium: 중견기업 (300-1000인)</text:p>
            <text:p text:style-name="P120">- large: 대기업 (1000인 이상)</text:p>
            <text:p text:style-name="P120"><text:span text:style-name="T11">-enterprise: 대규모 기업집단</text:span></text:p>
          </table:table-cell>
        </table:table-row>
        <table:table-row>
          <table:table-cell table:style-name="표1.A2" office:value-type="string">
            <text:p text:style-name="P33">business_description</text:p>
          </table:table-cell>
          <table:table-cell table:style-name="표1.A2" office:value-type="string">
            <text:p text:style-name="P44">String</text:p>
          </table:table-cell>
          <table:table-cell table:style-name="표1.A2" office:value-type="string">
            <text:p text:style-name="P44">O</text:p>
          </table:table-cell>
          <table:table-cell table:style-name="표1.D2" office:value-type="string">
            <text:p text:style-name="P120">사업 개요를 서술한다. 주요 사업영역, </text:p>
            <text:p text:style-name="P120">핵심 제품/서비스, 시장 <text:span text:style-name="T11">포지션 등을 포함하여 기술한다.</text:span></text:p>
          </table:table-cell>
        </table:table-row>
      </table:table>
      <text:p text:style-name="Preformatted_20_Text"/>
      <text:p text:style-name="Preformatted_20_Text"/>
      <text:p text:style-name="P8">1.2 IT 인프라 정보 (IT Infrastructure)</text:p>
      <text:p text:style-name="Preformatted_20_Text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>
          <table:table-cell table:style-name="표2.A1" office:value-type="string">
            <text:p text:style-name="P2">필드명</text:p>
          </table:table-cell>
          <table:table-cell table:style-name="표2.A1" office:value-type="string">
            <text:p text:style-name="P2">데이터 타입</text:p>
          </table:table-cell>
          <table:table-cell table:style-name="표2.A1" office:value-type="string">
            <text:p text:style-name="P2">필수</text:p>
          </table:table-cell>
          <table:table-cell table:style-name="표2.D1" office:value-type="string">
            <text:p text:style-name="P2">설명</text:p>
          </table:table-cell>
        </table:table-row>
        <table:table-row>
          <table:table-cell table:style-name="표2.A2" office:value-type="string">
            <text:p text:style-name="P34">has_cloud</text:p>
          </table:table-cell>
          <table:table-cell table:style-name="표2.A2" office:value-type="string">
            <text:p text:style-name="P45">Boolean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4">클라우드 환경 보유 여부를 입력한다. 퍼블릭, 프라이빗,하이브리드 클라우드를 포함한다.</text:p>
          </table:table-cell>
        </table:table-row>
        <table:table-row>
          <table:table-cell table:style-name="표2.A2" office:value-type="string">
            <text:p text:style-name="P34">cloud_provider</text:p>
          </table:table-cell>
          <table:table-cell table:style-name="표2.A2" office:value-type="string">
            <text:p text:style-name="P45">String</text:p>
          </table:table-cell>
          <table:table-cell table:style-name="표2.A2" office:value-type="string">
            <text:p text:style-name="P141">-</text:p>
          </table:table-cell>
          <table:table-cell table:style-name="표2.D2" office:value-type="string">
            <text:p text:style-name="P34">클라우드 제공자를 입력한다. (예: AWS, GCP, Azure, NCP 등) has_cloud가 true인 경우 <text:soft-page-break/>기재한다.</text:p>
          </table:table-cell>
        </table:table-row>
        <table:table-row>
          <table:table-cell table:style-name="표2.A2" office:value-type="string">
            <text:p text:style-name="P34">has_data_warehouse</text:p>
          </table:table-cell>
          <table:table-cell table:style-name="표2.A2" office:value-type="string">
            <text:p text:style-name="P45">Boolean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4">데이터 웨어하우스 보유 여부를 입력한다. 구조화된 분석용 데이터 저장소의 존재 여부이다.</text:p>
          </table:table-cell>
        </table:table-row>
        <table:table-row>
          <table:table-cell table:style-name="표2.A2" office:value-type="string">
            <text:p text:style-name="P34">has_data_lake</text:p>
          </table:table-cell>
          <table:table-cell table:style-name="표2.A2" office:value-type="string">
            <text:p text:style-name="P45">Boolean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4">데이터 레이크 보유 여부를 입력한다. 비정형 데이터를 포함한 대용량 저장소이다.</text:p>
          </table:table-cell>
        </table:table-row>
        <table:table-row>
          <table:table-cell table:style-name="표2.A2" office:value-type="string">
            <text:p text:style-name="P34">server_count</text:p>
          </table:table-cell>
          <table:table-cell table:style-name="표2.A2" office:value-type="string">
            <text:p text:style-name="P45">Integer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4">운영 중인 서버 수를 입력한다. 물리 서버와 가상 서버를 모두 포함한 총 수이다.</text:p>
          </table:table-cell>
        </table:table-row>
        <table:table-row>
          <table:table-cell table:style-name="표2.A2" office:value-type="string">
            <text:p text:style-name="P34">gpu_available</text:p>
          </table:table-cell>
          <table:table-cell table:style-name="표2.A2" office:value-type="string">
            <text:p text:style-name="P45">Boolean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4">GPU 서버 보유 여부를 입력한다. AI/ML 학습용 GPU 자원의 가용 여부를 확인한다.</text:p>
          </table:table-cell>
        </table:table-row>
        <table:table-row>
          <table:table-cell table:style-name="표2.A2" office:value-type="string">
            <text:p text:style-name="P34">legacy_system_count</text:p>
          </table:table-cell>
          <table:table-cell table:style-name="표2.A2" office:value-type="string">
            <text:p text:style-name="P45">Integer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5">레거시 시스템 수를 입력한다. 현대화가 필요한 구형 시스템의 수를 파악하여 통합 복잡도를 <text:s text:c="2"/>평가하는 데 활용한다.</text:p>
          </table:table-cell>
        </table:table-row>
        <table:table-row>
          <table:table-cell table:style-name="표2.A2" office:value-type="string">
            <text:p text:style-name="P34">api_capability</text:p>
          </table:table-cell>
          <table:table-cell table:style-name="표2.A2" office:value-type="string">
            <text:p text:style-name="P45">Boolean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5">API 연동 가능 여부를 입력한다. <text:s/>기존 시스템과의 연계를 위한 API 인프라 존재 여부이다.</text:p>
          </table:table-cell>
        </table:table-row>
        <table:table-row>
          <table:table-cell table:style-name="표2.A2" office:value-type="string">
            <text:p text:style-name="P34">security_level</text:p>
          </table:table-cell>
          <table:table-cell table:style-name="표2.A2" office:value-type="string">
            <text:p text:style-name="P45">String</text:p>
          </table:table-cell>
          <table:table-cell table:style-name="표2.A2" office:value-type="string">
            <text:p text:style-name="P141">o</text:p>
          </table:table-cell>
          <table:table-cell table:style-name="표2.D2" office:value-type="string">
            <text:p text:style-name="P35">보안 수준을 선택한다.</text:p>
            <text:p text:style-name="P35">- basic: 기본 보안</text:p>
            <text:p text:style-name="P35">- standard: 표준 보안 체계</text:p>
            <text:p text:style-name="P35">- high: 고수준 보안 (금융권 등)</text:p>
          </table:table-cell>
        </table:table-row>
      </table:table>
      <text:p text:style-name="Preformatted_20_Text"/>
      <text:p text:style-name="Preformatted_20_Text"/>
      <text:p text:style-name="Preformatted_20_Text"><text:span text:style-name="T7">1.3 데이터 자산 정보 (Data Assets)</text:span></text:p>
      <text:p text:style-name="Preformatted_20_Text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row>
          <table:table-cell table:style-name="표3.A1" office:value-type="string">
            <text:p text:style-name="P2">필드명</text:p>
          </table:table-cell>
          <table:table-cell table:style-name="표3.A1" office:value-type="string">
            <text:p text:style-name="P2">데이터 타입</text:p>
          </table:table-cell>
          <table:table-cell table:style-name="표3.A1" office:value-type="string">
            <text:p text:style-name="P2">필수</text:p>
          </table:table-cell>
          <table:table-cell table:style-name="표3.D1" office:value-type="string">
            <text:p text:style-name="P2">설명</text:p>
          </table:table-cell>
        </table:table-row>
        <table:table-row>
          <table:table-cell table:style-name="표3.A2" office:value-type="string">
            <text:p text:style-name="P36">data_volume_tb</text:p>
          </table:table-cell>
          <table:table-cell table:style-name="표3.A2" office:value-type="string">
            <text:p text:style-name="P46">Float</text:p>
          </table:table-cell>
          <table:table-cell table:style-name="표3.A2" office:value-type="string">
            <text:p text:style-name="P142">o</text:p>
          </table:table-cell>
          <table:table-cell table:style-name="표3.D2" office:value-type="string">
            <text:p text:style-name="P36">총 데이터 보유량을 TB 단위로 입력한다. 정형, 비정형 데이터를 모두 포함한 전체 규모이다.</text:p>
          </table:table-cell>
        </table:table-row>
        <table:table-row table:style-name="표3.3">
          <table:table-cell table:style-name="표3.A2" office:value-type="string">
            <text:p text:style-name="P36">structured_ratio</text:p>
          </table:table-cell>
          <table:table-cell table:style-name="표3.A2" office:value-type="string">
            <text:p text:style-name="P46">Float</text:p>
          </table:table-cell>
          <table:table-cell table:style-name="표3.A2" office:value-type="string">
            <text:p text:style-name="P142">o</text:p>
          </table:table-cell>
          <table:table-cell table:style-name="표3.D2" office:value-type="string">
            <text:p text:style-name="P36">정형 데이터 비율을 0~1 사이의 값으로 입력한다.</text:p>
            <text:p text:style-name="P36"><text:span text:style-name="T12">(</text:span>예: 0.7 <text:s/>70%가 정형 데이터)</text:p>
          </table:table-cell>
        </table:table-row>
        <table:table-row>
          <table:table-cell table:style-name="표3.A2" office:value-type="string">
            <text:p text:style-name="P36">data_quality_score</text:p>
          </table:table-cell>
          <table:table-cell table:style-name="표3.A2" office:value-type="string">
            <text:p text:style-name="P46">Float</text:p>
          </table:table-cell>
          <table:table-cell table:style-name="표3.A2" office:value-type="string">
            <text:p text:style-name="P142">o</text:p>
          </table:table-cell>
          <table:table-cell table:style-name="표3.D2" office:value-type="string">
            <text:p text:style-name="P36">데이터 품질 점수를 1~5점 척도로 입력한다.</text:p>
            <text:p text:style-name="P36">- 1: 매우 낮음 (일관성 없음)</text:p>
            <text:p text:style-name="P36">- 2: 낮음 (부분적 품질 관리)</text:p>
            <text:p text:style-name="P36">- 3: 보통 (기본 품질 관리)</text:p>
            <text:p text:style-name="P36">- 4: 높음 (체계적 관리)</text:p>
            <text:p text:style-name="P36">- 5: 매우 높음 (자동화된 관리)</text:p>
          </table:table-cell>
        </table:table-row>
        <table:table-row>
          <table:table-cell table:style-name="표3.A2" office:value-type="string">
            <text:p text:style-name="P36">has_data_governance</text:p>
          </table:table-cell>
          <table:table-cell table:style-name="표3.A2" office:value-type="string">
            <text:p text:style-name="P46">Boolean</text:p>
          </table:table-cell>
          <table:table-cell table:style-name="표3.A2" office:value-type="string">
            <text:p text:style-name="P142">o</text:p>
          </table:table-cell>
          <table:table-cell table:style-name="표3.D2" office:value-type="string">
            <text:p text:style-name="P37">데이터 거버넌스 체계 보유 여부를 입력한다. 데이터 정책, 표준, 품질 관리 프로세스의 존재 여부를 확인한다.</text:p>
          </table:table-cell>
        </table:table-row>
        <table:table-row>
          <table:table-cell table:style-name="표3.A2" office:value-type="string">
            <text:p text:style-name="P36">data_sources</text:p>
          </table:table-cell>
          <table:table-cell table:style-name="표3.A2" office:value-type="string">
            <text:p text:style-name="P46">List[String]</text:p>
          </table:table-cell>
          <table:table-cell table:style-name="표3.A2" office:value-type="string">
            <text:p text:style-name="P142">o</text:p>
          </table:table-cell>
          <table:table-cell table:style-name="표3.D2" office:value-type="string">
            <text:p text:style-name="P37">데이터 소스 목록을 입력한다.</text:p>
            <text:p text:style-name="P37">(예: ERP, CRM, IoT센서, 웹로그, 외부API 등)</text:p>
          </table:table-cell>
        </table:table-row>
        <table:table-row>
          <table:table-cell table:style-name="표3.A2" office:value-type="string">
            <text:p text:style-name="P36">historical_data_years </text:p>
          </table:table-cell>
          <table:table-cell table:style-name="표3.A2" office:value-type="string">
            <text:p text:style-name="P46">Integer</text:p>
          </table:table-cell>
          <table:table-cell table:style-name="표3.A2" office:value-type="string">
            <text:p text:style-name="P142">o</text:p>
          </table:table-cell>
          <table:table-cell table:style-name="표3.D2" office:value-type="string">
            <text:p text:style-name="P37">축적된 히스토리 데이터 기간을 연 단위로 입력한다. ML 모델 학습에 활용 가능한 과거 데이터 축적 기간이다.</text:p>
          </table:table-cell>
        </table:table-row>
      </table:table>
      <text:p text:style-name="P8"><text:soft-page-break/>1.4 인적 자원 정보 (Human Resources)</text:p>
      <text:p text:style-name="Preformatted_20_Text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>
          <table:table-cell table:style-name="표4.A1" office:value-type="string">
            <text:p text:style-name="P2">필드명</text:p>
          </table:table-cell>
          <table:table-cell table:style-name="표4.A1" office:value-type="string">
            <text:p text:style-name="P2">데이터 타입</text:p>
          </table:table-cell>
          <table:table-cell table:style-name="표4.A1" office:value-type="string">
            <text:p text:style-name="P2">필수</text:p>
          </table:table-cell>
          <table:table-cell table:style-name="표4.D1" office:value-type="string">
            <text:p text:style-name="P2">설명</text:p>
          </table:table-cell>
        </table:table-row>
        <table:table-row>
          <table:table-cell table:style-name="표4.A2" office:value-type="string">
            <text:p text:style-name="P37">total_employees</text:p>
          </table:table-cell>
          <table:table-cell table:style-name="표4.A2" office:value-type="string">
            <text:p text:style-name="P47">Integer</text:p>
          </table:table-cell>
          <table:table-cell table:style-name="표4.A2" office:value-type="string">
            <text:p text:style-name="P143">o</text:p>
          </table:table-cell>
          <table:table-cell table:style-name="표4.D2" office:value-type="string">
            <text:p text:style-name="P37">총 직원 수를 입력한다.</text:p>
            <text:p text:style-name="P37">전체 임직원 규모를 파악한다.</text:p>
          </table:table-cell>
        </table:table-row>
        <table:table-row>
          <table:table-cell table:style-name="표4.A2" office:value-type="string">
            <text:p text:style-name="P37">it_staff_count</text:p>
          </table:table-cell>
          <table:table-cell table:style-name="표4.A2" office:value-type="string">
            <text:p text:style-name="P47">Integer</text:p>
          </table:table-cell>
          <table:table-cell table:style-name="표4.A2" office:value-type="string">
            <text:p text:style-name="P143">o</text:p>
          </table:table-cell>
          <table:table-cell table:style-name="표4.D2" office:value-type="string">
            <text:p text:style-name="P37">IT 인력 수를 입력한다.</text:p>
            <text:p text:style-name="P37">IT 부서 및 관련 기술 인력의 총 인원이다.</text:p>
          </table:table-cell>
        </table:table-row>
        <table:table-row>
          <table:table-cell table:style-name="표4.A2" office:value-type="string">
            <text:p text:style-name="P37">data_scientist_count</text:p>
          </table:table-cell>
          <table:table-cell table:style-name="표4.A2" office:value-type="string">
            <text:p text:style-name="P47">Integer</text:p>
          </table:table-cell>
          <table:table-cell table:style-name="표4.A2" office:value-type="string">
            <text:p text:style-name="P143">o</text:p>
          </table:table-cell>
          <table:table-cell table:style-name="표4.D2" office:value-type="string">
            <text:p text:style-name="P37">데이터 사이언티스트 수를 입력한다. 데이터 분석 및 모델링 전문 인력이다.</text:p>
          </table:table-cell>
        </table:table-row>
        <table:table-row>
          <table:table-cell table:style-name="표4.A2" office:value-type="string">
            <text:p text:style-name="P37">ml_engineer_count</text:p>
          </table:table-cell>
          <table:table-cell table:style-name="표4.A2" office:value-type="string">
            <text:p text:style-name="P47">Integer</text:p>
          </table:table-cell>
          <table:table-cell table:style-name="표4.A2" office:value-type="string">
            <text:p text:style-name="P143">o</text:p>
          </table:table-cell>
          <table:table-cell table:style-name="표4.D2" office:value-type="string">
            <text:p text:style-name="P37">ML 엔지니어 수를 입력한다.</text:p>
            <text:p text:style-name="P37">모델 개발, 배포, 운영을 담당하는 엔지니어이다.</text:p>
          </table:table-cell>
        </table:table-row>
        <table:table-row>
          <table:table-cell table:style-name="표4.A2" office:value-type="string">
            <text:p text:style-name="P37">data_engineer_count</text:p>
          </table:table-cell>
          <table:table-cell table:style-name="표4.A2" office:value-type="string">
            <text:p text:style-name="P47">Integer</text:p>
          </table:table-cell>
          <table:table-cell table:style-name="표4.A2" office:value-type="string">
            <text:p text:style-name="P143">o</text:p>
          </table:table-cell>
          <table:table-cell table:style-name="표4.D2" office:value-type="string">
            <text:p text:style-name="P37">데이터 엔지니어 수를 입력한다.</text:p>
            <text:p text:style-name="P37">데이터 파이프라인 구축 및 담당하는 엔지니어이다.</text:p>
          </table:table-cell>
        </table:table-row>
        <table:table-row>
          <table:table-cell table:style-name="표4.A2" office:value-type="string">
            <text:p text:style-name="P37">ai_experience_projects</text:p>
          </table:table-cell>
          <table:table-cell table:style-name="표4.A2" office:value-type="string">
            <text:p text:style-name="P47">Integer</text:p>
          </table:table-cell>
          <table:table-cell table:style-name="표4.A2" office:value-type="string">
            <text:p text:style-name="P143">o</text:p>
          </table:table-cell>
          <table:table-cell table:style-name="표4.D2" office:value-type="string">
            <text:p text:style-name="P37">AI 프로젝트 경험 수를 입력한다.</text:p>
            <text:p text:style-name="P37">조직 내에서 수행한 AI/ML 프로젝트의 누적 건수이다.</text:p>
          </table:table-cell>
        </table:table-row>
        <table:table-row>
          <table:table-cell table:style-name="표4.A2" office:value-type="string">
            <text:p text:style-name="P37">training_budget_ratio</text:p>
          </table:table-cell>
          <table:table-cell table:style-name="표4.A2" office:value-type="string">
            <text:p text:style-name="P47">Float</text:p>
          </table:table-cell>
          <table:table-cell table:style-name="표4.A2" office:value-type="string">
            <text:p text:style-name="P143">o</text:p>
          </table:table-cell>
          <table:table-cell table:style-name="표4.D2" office:value-type="string">
            <text:p text:style-name="P37">교육 예산 비율을 입력한다.</text:p>
            <text:p text:style-name="P37">전체 인건비 대비 교육 투자 비율을 백분율로 기재한다.</text:p>
          </table:table-cell>
        </table:table-row>
      </table:table>
      <text:p text:style-name="Preformatted_20_Text"/>
      <text:p text:style-name="Preformatted_20_Text"/>
      <text:p text:style-name="Preformatted_20_Text"><text:span text:style-name="T7">1.5 재무 자원 정보 (Financial Resources)</text:span></text:p>
      <text:p text:style-name="Preformatted_20_Text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row>
          <table:table-cell table:style-name="표5.A1" office:value-type="string">
            <text:p text:style-name="P2">필드명</text:p>
          </table:table-cell>
          <table:table-cell table:style-name="표5.A1" office:value-type="string">
            <text:p text:style-name="P2">데이터 타입</text:p>
          </table:table-cell>
          <table:table-cell table:style-name="표5.A1" office:value-type="string">
            <text:p text:style-name="P2">필수</text:p>
          </table:table-cell>
          <table:table-cell table:style-name="표5.D1" office:value-type="string">
            <text:p text:style-name="P2">설명</text:p>
          </table:table-cell>
        </table:table-row>
        <table:table-row>
          <table:table-cell table:style-name="표5.A2" office:value-type="string">
            <text:p text:style-name="P37">annual_revenue_billion</text:p>
          </table:table-cell>
          <table:table-cell table:style-name="표5.A2" office:value-type="string">
            <text:p text:style-name="P47">Float</text:p>
          </table:table-cell>
          <table:table-cell table:style-name="표5.A2" office:value-type="string">
            <text:p text:style-name="P143">o</text:p>
          </table:table-cell>
          <table:table-cell table:style-name="표5.D2" office:value-type="string">
            <text:p text:style-name="P37">연 매출을 억원 단위로 입력한다.</text:p>
            <text:p text:style-name="P37">가장 최근 회계연도 기준의 총 매출액이다.</text:p>
          </table:table-cell>
        </table:table-row>
        <table:table-row>
          <table:table-cell table:style-name="표5.A2" office:value-type="string">
            <text:p text:style-name="P37">it_budget_ratio</text:p>
          </table:table-cell>
          <table:table-cell table:style-name="표5.A2" office:value-type="string">
            <text:p text:style-name="P47">Float</text:p>
          </table:table-cell>
          <table:table-cell table:style-name="표5.A2" office:value-type="string">
            <text:p text:style-name="P143">o</text:p>
          </table:table-cell>
          <table:table-cell table:style-name="표5.D2" office:value-type="string">
            <text:p text:style-name="P37">IT 예산 비율을 입력한다.</text:p>
            <text:p text:style-name="P37">전체 예산 대비 IT 투자 비율을 백분율로 기재한다.</text:p>
          </table:table-cell>
        </table:table-row>
        <table:table-row>
          <table:table-cell table:style-name="표5.A2" office:value-type="string">
            <text:p text:style-name="P37">ai_investment_budget</text:p>
          </table:table-cell>
          <table:table-cell table:style-name="표5.A2" office:value-type="string">
            <text:p text:style-name="P47">Float</text:p>
          </table:table-cell>
          <table:table-cell table:style-name="표5.A2" office:value-type="string">
            <text:p text:style-name="P143">o</text:p>
          </table:table-cell>
          <table:table-cell table:style-name="표5.D2" office:value-type="string">
            <text:p text:style-name="P38">AI 투자 가능 예산을 억원 단위로 입력한다. 향후 AI 프로젝트에 할당 가능한 예산 규모이다.</text:p>
          </table:table-cell>
        </table:table-row>
        <table:table-row>
          <table:table-cell table:style-name="표5.A2" office:value-type="string">
            <text:p text:style-name="P37">roi_expectation_period</text:p>
          </table:table-cell>
          <table:table-cell table:style-name="표5.A2" office:value-type="string">
            <text:p text:style-name="P47">Integer</text:p>
          </table:table-cell>
          <table:table-cell table:style-name="표5.A2" office:value-type="string">
            <text:p text:style-name="P143">o</text:p>
          </table:table-cell>
          <table:table-cell table:style-name="표5.D2" office:value-type="string">
            <text:p text:style-name="P38">ROI 기대 기간을 개월 단위로 입력한다. 투자 회수를 기대하는 목표 기간이다.</text:p>
          </table:table-cell>
        </table:table-row>
      </table:table>
      <text:p text:style-name="Preformatted_20_Text"/>
      <text:p text:style-name="Preformatted_20_Text"><text:span text:style-name="T7"/></text:p>
      <text:p text:style-name="Preformatted_20_Text"><text:span text:style-name="T7"/></text:p>
      <text:p text:style-name="P112"><text:span text:style-name="T7">1.6 조직 준비도 정보 (Organizational Readiness)</text:span></text:p>
      <text:p text:style-name="Preformatted_20_Text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>
          <table:table-cell table:style-name="표6.A1" office:value-type="string">
            <text:p text:style-name="P2">필드명</text:p>
          </table:table-cell>
          <table:table-cell table:style-name="표6.A1" office:value-type="string">
            <text:p text:style-name="P2">데이터 타입</text:p>
          </table:table-cell>
          <table:table-cell table:style-name="표6.A1" office:value-type="string">
            <text:p text:style-name="P2">필수</text:p>
          </table:table-cell>
          <table:table-cell table:style-name="표6.D1" office:value-type="string">
            <text:p text:style-name="P2">설명</text:p>
          </table:table-cell>
        </table:table-row>
        <table:table-row>
          <table:table-cell table:style-name="표6.A2" office:value-type="string">
            <text:p text:style-name="P39">executive_support</text:p>
          </table:table-cell>
          <table:table-cell table:style-name="표6.A2" office:value-type="string">
            <text:p text:style-name="P48">Integer (1-5)</text:p>
          </table:table-cell>
          <table:table-cell table:style-name="표6.A2" office:value-type="string">
            <text:p text:style-name="P144">o</text:p>
          </table:table-cell>
          <table:table-cell table:style-name="표6.D2" office:value-type="string">
            <text:p text:style-name="P39">경영진 지원도를 1~5점으로 평가한다.</text:p>
            <text:p text:style-name="P39">- 1: AI에 대한 관심 없음</text:p>
            <text:p text:style-name="P39">- 2: 제한적 관심</text:p>
            <text:p text:style-name="P39">- 3: 보통 수준의 지원</text:p>
            <text:p text:style-name="P39">- 4: 적극적 지원</text:p>
            <text:p text:style-name="P39">- 5: 최고 경영진의 전폭 지원</text:p>
          </table:table-cell>
        </table:table-row>
        <table:table-row>
          <table:table-cell table:style-name="표6.A2" office:value-type="string">
            <text:p text:style-name="P39">change_management_</text:p>
            <text:p text:style-name="P39">capability</text:p>
          </table:table-cell>
          <table:table-cell table:style-name="표6.A2" office:value-type="string">
            <text:p text:style-name="P48">Integer (1-5)</text:p>
          </table:table-cell>
          <table:table-cell table:style-name="표6.A2" office:value-type="string">
            <text:p text:style-name="P144">o</text:p>
          </table:table-cell>
          <table:table-cell table:style-name="표6.D2" office:value-type="string">
            <text:p text:style-name="P39">변화 관리 역량을 1~5점으로 평가한다.</text:p>
            <text:p text:style-name="P39">- 1: 변화 관리 경험 없음</text:p>
            <text:p text:style-name="P39">- 2: 제한적 경험</text:p>
            <text:p text:style-name="P39">- 3: 기본적 역량 보유</text:p>
            <text:p text:style-name="P39">- 4: 체계적 역량 보유</text:p>
            <text:p text:style-name="P39">- 5: 선진화된 변화 관리 체계</text:p>
          </table:table-cell>
        </table:table-row>
        <table:table-row>
          <table:table-cell table:style-name="표6.A2" office:value-type="string">
            <text:p text:style-name="P39">innovation_culture</text:p>
          </table:table-cell>
          <table:table-cell table:style-name="표6.A2" office:value-type="string">
            <text:p text:style-name="P48">Integer (1-5)</text:p>
          </table:table-cell>
          <table:table-cell table:style-name="표6.A2" office:value-type="string">
            <text:p text:style-name="P144">o</text:p>
          </table:table-cell>
          <table:table-cell table:style-name="표6.D2" office:value-type="string">
            <text:p text:style-name="P39">혁신 문화 수준을 1~5점으로 평가한다.</text:p>
            <text:p text:style-name="P39">- 1: 보수적 문화</text:p>
            <text:p text:style-name="P39">- 2: 제한적 혁신</text:p>
            <text:p text:style-name="P39">- 3: 보통 수준</text:p>
            <text:p text:style-name="P39">- 4: 혁신 지향적</text:p>
            <text:p text:style-name="P39">- 5: 선도적 혁신 문화</text:p>
          </table:table-cell>
        </table:table-row>
        <table:table-row>
          <table:table-cell table:style-name="표6.A2" office:value-type="string">
            <text:p text:style-name="P39">cross_functional_</text:p>
            <text:p text:style-name="P39">collaboration</text:p>
          </table:table-cell>
          <table:table-cell table:style-name="표6.A2" office:value-type="string">
            <text:p text:style-name="P48">Integer (1-5)</text:p>
          </table:table-cell>
          <table:table-cell table:style-name="표6.A2" office:value-type="string">
            <text:p text:style-name="P144">o</text:p>
          </table:table-cell>
          <table:table-cell table:style-name="표6.D2" office:value-type="string">
            <text:p text:style-name="P39">부서간 협업 수준을 1~5점으로 평가한다.</text:p>
            <text:p text:style-name="P39">- 1: 사일로 구조</text:p>
            <text:p text:style-name="P39">- 2: 제한적 협업</text:p>
            <text:p text:style-name="P39">- 3: 보통 수준</text:p>
            <text:p text:style-name="P39">- 4: 원활한 협업</text:p>
            <text:p text:style-name="P39">- 5: 완전 통합된 협업 체계</text:p>
          </table:table-cell>
        </table:table-row>
        <table:table-row>
          <table:table-cell table:style-name="표6.A2" office:value-type="string">
            <text:p text:style-name="P39">risk_tolerance</text:p>
          </table:table-cell>
          <table:table-cell table:style-name="표6.A2" office:value-type="string">
            <text:p text:style-name="P48">Integer (1-5)</text:p>
          </table:table-cell>
          <table:table-cell table:style-name="표6.A2" office:value-type="string">
            <text:p text:style-name="P144">o</text:p>
          </table:table-cell>
          <table:table-cell table:style-name="표6.D2" office:value-type="string">
            <text:p text:style-name="P39">리스크 허용도를 1~5점으로 평가한다.</text:p>
            <text:p text:style-name="P39">- 1: 매우 보수적</text:p>
            <text:p text:style-name="P39">- 2: 보수적</text:p>
            <text:p text:style-name="P39">- 3: 중립적</text:p>
            <text:p text:style-name="P39">- 4: 리스크 수용적</text:p>
            <text:p text:style-name="P39">- 5: 적극적 리스크 추구</text:p>
          </table:table-cell>
        </table:table-row>
      </table:table>
      <text:p text:style-name="Preformatted_20_Text"/>
      <text:p text:style-name="Preformatted_20_Text"/>
      <text:p text:style-name="Preformatted_20_Text"><text:span text:style-name="T1">【프로젝트 생성 입력 항목 합계: 약 35개 필드】</text:span></text:p>
      <text:p text:style-name="Preformatted_20_Text"/>
      <text:p text:style-name="P116"><text:span text:style-name="T5"/></text:p>
      <text:p text:style-name="P3"><text:span text:style-name="T5">1.</text:span><text:span text:style-name="T6">7</text:span><text:span text:style-name="T5"> <text:s/>컨설팅 방법론 개요</text:span></text:p>
      <text:p text:style-name="P3"><text:span text:style-name="T5"/></text:p>
      <text:p text:style-name="P3"><text:span text:style-name="T5">AI 컨설팅 방법론의 전체 체계와 단계별 접근 방식을 설명하는 페이지이다. 본 페이지에서는 컨설팅 프레임워크의 이론적 기반과 적용 원칙을 확인할 수 있다.</text:span></text:p>
      <text:p text:style-name="P6">【 STEP 2 】 Stage 1: AI 비전 및 전략 수립 (Strategy)</text:p>
      <text:p text:style-name="Preformatted_20_Text"/>
      <text:p text:style-name="Preformatted_20_Text"/>
      <text:p text:style-name="Preformatted_20_Text">Stage 1은 고객사의 AI 성숙도를 진단하고, AI 적용 기회를 발굴하며, 중장기 AI 로드맵을 수립하는 전략 단계이다. <text:span text:style-name="T1">성숙도 </text:span><text:span text:style-name="T2">5단계, 진단 영역, 진단 절차</text:span><text:span text:style-name="T15">는 AI 성숙도 진단 방법론에 대한 세부 지침을 설명한다.</text:span></text:p>
      <text:p text:style-name="Preformatted_20_Text"/>
      <text:p text:style-name="Preformatted_20_Text"><text:span text:style-name="T16">4가지 세션의 상세 </text:span>성숙도 평가를 통해 <text:span text:style-name="T16">Gap 분석을 생성할 수 있다.</text:span></text:p>
      <text:p text:style-name="Preformatted_20_Text"/>
      <text:p text:style-name="Preformatted_20_Text"/>
      <text:p text:style-name="P8">2.1 AI 성숙도 진단 (Maturity Assessment)</text:p>
      <text:p text:style-name="Preformatted_20_Text"/>
      <text:p text:style-name="Preformatted_20_Text">API 엔드포인트: POST /api/v1/framework/projects/{project_id}/stage1/maturity-assessment</text:p>
      <text:p text:style-name="Preformatted_20_Text">요청 모델: MaturityAssessmentInput</text:p>
      <text:p text:style-name="Preformatted_20_Text"/>
      <text:p text:style-name="Preformatted_20_Text">4대 영역에 대해 각각 4개 항목을 1~5점 척도로 평가한다.</text:p>
      <text:p text:style-name="Preformatted_20_Text"/>
      <text:p text:style-name="P1">【영역 1: 전략 및 비전 (Strategy)】</text:p>
      <text:p text:style-name="Preformatted_20_Text"/>
      <table:table table:name="표7" table:style-name="표7">
        <table:table-column table:style-name="표7.A"/>
        <table:table-column table:style-name="표7.B"/>
        <table:table-column table:style-name="표7.C"/>
        <table:table-row>
          <table:table-cell table:style-name="표7.A1" office:value-type="string">
            <text:p text:style-name="P14">평가 항목</text:p>
          </table:table-cell>
          <table:table-cell table:style-name="표7.A1" office:value-type="string">
            <text:p text:style-name="P14">점수범위</text:p>
          </table:table-cell>
          <table:table-cell table:style-name="표7.C1" office:value-type="string">
            <text:p text:style-name="P14">설명</text:p>
          </table:table-cell>
        </table:table-row>
        <table:table-row>
          <table:table-cell table:style-name="표7.A2" office:value-type="string">
            <text:p text:style-name="P40">ai_vision_clarity</text:p>
          </table:table-cell>
          <table:table-cell table:style-name="표7.A2" office:value-type="string">
            <text:p text:style-name="P41">1-5</text:p>
          </table:table-cell>
          <table:table-cell table:style-name="표7.C2" office:value-type="string">
            <text:p text:style-name="P40">AI 비전 및 목표의 명확성을 평가한다. 조직 전체에 공유된 AI 비전의 존재 여부와 명확성을 확인한다.</text:p>
          </table:table-cell>
        </table:table-row>
        <table:table-row>
          <table:table-cell table:style-name="표7.A2" office:value-type="string">
            <text:p text:style-name="P40">ai_investment_management</text:p>
          </table:table-cell>
          <table:table-cell table:style-name="표7.A2" office:value-type="string">
            <text:p text:style-name="P41">1-5</text:p>
          </table:table-cell>
          <table:table-cell table:style-name="표7.C2" office:value-type="string">
            <text:p text:style-name="P40"><text:s/>AI 투자 및 예산 관리 체계를 평가한다. 체계적인 AI 투자 계획 및 예산 관리 프로세스의 존재 여부이다.</text:p>
          </table:table-cell>
        </table:table-row>
        <table:table-row>
          <table:table-cell table:style-name="표7.A2" office:value-type="string">
            <text:p text:style-name="P40">usecase_portfolio_management</text:p>
          </table:table-cell>
          <table:table-cell table:style-name="표7.A2" office:value-type="string">
            <text:p text:style-name="P41">1-5</text:p>
          </table:table-cell>
          <table:table-cell table:style-name="표7.C2" office:value-type="string">
            <text:p text:style-name="P40">AI 활용 사례 포트폴리오 관리를 평가한다. Use Case 발굴, 우선순위화, 관리 체계의 성숙도이다.</text:p>
          </table:table-cell>
        </table:table-row>
        <table:table-row>
          <table:table-cell table:style-name="표7.A2" office:value-type="string">
            <text:p text:style-name="P40">ai_roi_measurement</text:p>
          </table:table-cell>
          <table:table-cell table:style-name="표7.A2" office:value-type="string">
            <text:p text:style-name="P41">1-5</text:p>
          </table:table-cell>
          <table:table-cell table:style-name="표7.C2" office:value-type="string">
            <text:p text:style-name="P40">AI ROI 측정 체계를 평가한다.</text:p>
            <text:p text:style-name="P40">AI 투자 대비 효과 측정 체계 및 지표 관리 수준이다.</text:p>
          </table:table-cell>
        </table:table-row>
      </table:table>
      <text:p text:style-name="Preformatted_20_Text"/>
      <text:p text:style-name="Preformatted_20_Text"/>
      <text:p text:style-name="P1">【영역 2: 조직 및 역량 (Organization)】</text:p>
      <text:p text:style-name="Preformatted_20_Text"/>
      <table:table table:name="표8" table:style-name="표8">
        <table:table-column table:style-name="표8.A"/>
        <table:table-column table:style-name="표8.B"/>
        <table:table-column table:style-name="표8.C"/>
        <table:table-row>
          <table:table-cell table:style-name="표8.A1" office:value-type="string">
            <text:p text:style-name="P14">평가 항목</text:p>
          </table:table-cell>
          <table:table-cell table:style-name="표8.A1" office:value-type="string">
            <text:p text:style-name="P14">점수범위</text:p>
          </table:table-cell>
          <table:table-cell table:style-name="표8.C1" office:value-type="string">
            <text:p text:style-name="P14">설명</text:p>
          </table:table-cell>
        </table:table-row>
        <table:table-row>
          <table:table-cell table:style-name="표8.A2" office:value-type="string">
            <text:p text:style-name="P40">ai_organization_structure</text:p>
          </table:table-cell>
          <table:table-cell table:style-name="표8.A2" office:value-type="string">
            <text:p text:style-name="P41">1-5</text:p>
          </table:table-cell>
          <table:table-cell table:style-name="표8.C2" office:value-type="string">
            <text:p text:style-name="P40">AI 전담 조직 및 역할 정의를 평가한다. CoE(Center of Excellence) 등 전담 조직의 존재 및 역할 명확성이다.</text:p>
          </table:table-cell>
        </table:table-row>
        <table:table-row>
          <table:table-cell table:style-name="표8.A2" office:value-type="string">
            <text:p text:style-name="P40">ai_talent_capability</text:p>
          </table:table-cell>
          <table:table-cell table:style-name="표8.A2" office:value-type="string">
            <text:p text:style-name="P41">1-5</text:p>
          </table:table-cell>
          <table:table-cell table:style-name="표8.C2" office:value-type="string">
            <text:p text:style-name="P40">AI 인력 확보 및 역량 수준을 평가한다. 핵심 AI 인재의 확보 현황 및 역량 수준이다.</text:p>
          </table:table-cell>
        </table:table-row>
        <table:table-row>
          <table:table-cell table:style-name="표8.A2" office:value-type="string">
            <text:p text:style-name="P40">ai_training_program</text:p>
          </table:table-cell>
          <table:table-cell table:style-name="표8.A2" office:value-type="string">
            <text:p text:style-name="P41">1-5</text:p>
          </table:table-cell>
          <table:table-cell table:style-name="표8.C2" office:value-type="string">
            <text:p text:style-name="P40">AI 교육 및 역량 개발 프로그램을 평가한다. 체계적인 AI 역량 교육 프로그램의 운영 여부이다.</text:p>
          </table:table-cell>
        </table:table-row>
        <table:table-row table:style-name="표8.5">
          <table:table-cell table:style-name="표8.A2" office:value-type="string">
            <text:p text:style-name="P40">ai_change_culture</text:p>
          </table:table-cell>
          <table:table-cell table:style-name="표8.A2" office:value-type="string">
            <text:p text:style-name="P41">1-5</text:p>
          </table:table-cell>
          <table:table-cell table:style-name="표8.C2" office:value-type="string">
            <text:p text:style-name="P40">변화 관리 및 AI 문화를 평가한다. AI 도입에 따른 변화 수용 문화 및 관리 역량이다.</text:p>
          </table:table-cell>
        </table:table-row>
      </table:table>
      <text:p text:style-name="P121"/>
      <text:p text:style-name="Preformatted_20_Text"/>
      <text:p text:style-name="Preformatted_20_Text"><text:span text:style-name="T1"/></text:p>
      <text:p text:style-name="P112"><text:span text:style-name="T1">【영역 3: 데이터 및 기술 (Data &amp; Technology)】</text:span></text:p>
      <text:p text:style-name="Preformatted_20_Text"/>
      <table:table table:name="표9" table:style-name="표9">
        <table:table-column table:style-name="표9.A"/>
        <table:table-column table:style-name="표9.B"/>
        <table:table-column table:style-name="표9.C"/>
        <table:table-row>
          <table:table-cell table:style-name="표9.A1" office:value-type="string">
            <text:p text:style-name="P14">평가 항목</text:p>
          </table:table-cell>
          <table:table-cell table:style-name="표9.A1" office:value-type="string">
            <text:p text:style-name="P14">점수범위</text:p>
          </table:table-cell>
          <table:table-cell table:style-name="표9.C1" office:value-type="string">
            <text:p text:style-name="P14">설명</text:p>
          </table:table-cell>
        </table:table-row>
        <table:table-row>
          <table:table-cell table:style-name="표9.A2" office:value-type="string">
            <text:p text:style-name="P40">data_infrastructure</text:p>
          </table:table-cell>
          <table:table-cell table:style-name="표9.A2" office:value-type="string">
            <text:p text:style-name="P41">1-5</text:p>
          </table:table-cell>
          <table:table-cell table:style-name="표9.C2" office:value-type="string">
            <text:p text:style-name="P40">데이터 인프라 및 접근성을 평가한다. 데이터 수집, 저장, 처리를 위한 인프라 수준이다.</text:p>
          </table:table-cell>
        </table:table-row>
        <table:table-row>
          <table:table-cell table:style-name="표9.A2" office:value-type="string">
            <text:p text:style-name="P40">data_quality_governance</text:p>
          </table:table-cell>
          <table:table-cell table:style-name="표9.A2" office:value-type="string">
            <text:p text:style-name="P41">1-5</text:p>
          </table:table-cell>
          <table:table-cell table:style-name="표9.C2" office:value-type="string">
            <text:p text:style-name="P52">데이터 품질 및 거버넌스를 평가한다. 데이터 품질 관리 및 거버넌스 체계의 성숙도이다.</text:p>
          </table:table-cell>
        </table:table-row>
        <table:table-row table:style-name="표9.4">
          <table:table-cell table:style-name="표9.A2" office:value-type="string">
            <text:p text:style-name="P40">mlops_platform </text:p>
          </table:table-cell>
          <table:table-cell table:style-name="표9.A2" office:value-type="string">
            <text:p text:style-name="P41">1-5</text:p>
          </table:table-cell>
          <table:table-cell table:style-name="표9.C2" office:value-type="string">
            <text:p text:style-name="P52">MLOps 플랫폼 활용 수준을 평가한다. ML 모델 개발, 배포, 운영을 위한 플랫폼 성숙도이다.</text:p>
          </table:table-cell>
        </table:table-row>
        <table:table-row table:style-name="표9.5">
          <table:table-cell table:style-name="표9.A2" office:value-type="string">
            <text:p text:style-name="P40">cloud_scalability</text:p>
          </table:table-cell>
          <table:table-cell table:style-name="표9.A2" office:value-type="string">
            <text:p text:style-name="P41">1-5</text:p>
          </table:table-cell>
          <table:table-cell table:style-name="표9.C2" office:value-type="string">
            <text:p text:style-name="P52">클라우드 활용 및 확장성을 평가한다. 클라우드 기반 AI 워크로드 처리 역량이다.</text:p>
          </table:table-cell>
        </table:table-row>
      </table:table>
      <text:p text:style-name="P121"/>
      <text:p text:style-name="Preformatted_20_Text"/>
      <text:p text:style-name="P1">【영역 4: 프로세스 및 거버넌스 (Process &amp; Governance)】</text:p>
      <text:p text:style-name="Preformatted_20_Text"/>
      <table:table table:name="표10" table:style-name="표10">
        <table:table-column table:style-name="표10.A"/>
        <table:table-column table:style-name="표10.B"/>
        <table:table-column table:style-name="표10.C"/>
        <table:table-row>
          <table:table-cell table:style-name="표10.A1" office:value-type="string">
            <text:p text:style-name="P15">평가 항목</text:p>
          </table:table-cell>
          <table:table-cell table:style-name="표10.A1" office:value-type="string">
            <text:p text:style-name="P15">점수범위</text:p>
          </table:table-cell>
          <table:table-cell table:style-name="표10.C1" office:value-type="string">
            <text:p text:style-name="P15">설명</text:p>
          </table:table-cell>
        </table:table-row>
        <table:table-row>
          <table:table-cell table:style-name="표10.A2" office:value-type="string">
            <text:p text:style-name="P53">ai_development_methodology</text:p>
          </table:table-cell>
          <table:table-cell table:style-name="표10.A2" office:value-type="string">
            <text:p text:style-name="P49">1-5</text:p>
          </table:table-cell>
          <table:table-cell table:style-name="표10.C2" office:value-type="string">
            <text:p text:style-name="P53">AI 개발 방법론 표준화를 평가한다. 체계적인 AI 개발 방법론 및 프로세스 존재 여부이다.</text:p>
          </table:table-cell>
        </table:table-row>
        <table:table-row>
          <table:table-cell table:style-name="표10.A2" office:value-type="string">
            <text:p text:style-name="P53">model_validation_process</text:p>
          </table:table-cell>
          <table:table-cell table:style-name="표10.A2" office:value-type="string">
            <text:p text:style-name="P49">1-5</text:p>
          </table:table-cell>
          <table:table-cell table:style-name="표10.C2" office:value-type="string">
            <text:p text:style-name="P53">모델 검증 및 배포 승인 절차를 평가한다. 모델 품질 검증 및 배포 승인 프로세스의 체계성이다.</text:p>
          </table:table-cell>
        </table:table-row>
        <table:table-row table:style-name="표10.4">
          <table:table-cell table:style-name="표10.A2" office:value-type="string">
            <text:p text:style-name="P53">ai_ethics_risk_management</text:p>
          </table:table-cell>
          <table:table-cell table:style-name="표10.A2" office:value-type="string">
            <text:p text:style-name="P49">1-5</text:p>
          </table:table-cell>
          <table:table-cell table:style-name="표10.C2" office:value-type="string">
            <text:p text:style-name="P53">AI 윤리 및 리스크 관리를 평가한다. AI 윤리 정책 및 리스크 관리 프레임워크의 존재 여부이다. <text:s/></text:p>
          </table:table-cell>
        </table:table-row>
        <table:table-row table:style-name="표10.5">
          <table:table-cell table:style-name="표10.A2" office:value-type="string">
            <text:p text:style-name="P53">ai_monitoring_operation</text:p>
          </table:table-cell>
          <table:table-cell table:style-name="표10.A2" office:value-type="string">
            <text:p text:style-name="P49">1-5</text:p>
          </table:table-cell>
          <table:table-cell table:style-name="표10.C2" office:value-type="string">
            <text:p text:style-name="P53">모니터링 및 운영 체계를 평가한다. 배포된 모델의 성능 모니터링 및 운영 관리 체계이다.</text:p>
          </table:table-cell>
        </table:table-row>
      </table:table>
      <text:p text:style-name="P122"/>
      <text:p text:style-name="Preformatted_20_Text"/>
      <text:p text:style-name="Preformatted_20_Text">【추가 입력】</text:p>
      <text:p text:style-name="Preformatted_20_Text"/>
      <table:table table:name="표11" table:style-name="표11">
        <table:table-column table:style-name="표11.A"/>
        <table:table-column table:style-name="표11.B"/>
        <table:table-column table:style-name="표11.C"/>
        <table:table-row>
          <table:table-cell table:style-name="표11.A1" office:value-type="string">
            <text:p text:style-name="P15">평가 항목</text:p>
          </table:table-cell>
          <table:table-cell table:style-name="표11.A1" office:value-type="string">
            <text:p text:style-name="P15">점수범위</text:p>
          </table:table-cell>
          <table:table-cell table:style-name="표11.C1" office:value-type="string">
            <text:p text:style-name="P15">설명</text:p>
          </table:table-cell>
        </table:table-row>
        <table:table-row>
          <table:table-cell table:style-name="표11.A2" office:value-type="string">
            <text:p text:style-name="P53">notes</text:p>
          </table:table-cell>
          <table:table-cell table:style-name="표11.A2" office:value-type="string">
            <text:p text:style-name="P49">1-5</text:p>
          </table:table-cell>
          <table:table-cell table:style-name="표11.C2" office:value-type="string">
            <text:p text:style-name="P53">비고 사항을 자유 형식으로 기술한다. 특이사항이나 추가 <text:s text:c="2"/>설명이 필요한 경우 기재한다.</text:p>
          </table:table-cell>
        </table:table-row>
      </table:table>
      <text:p text:style-name="P122"/>
      <text:p text:style-name="Preformatted_20_Text"/>
      <text:p text:style-name="P1">【성숙도 진단 입력 항목 합계: 16개 평가 항목 + 1개 텍스트 필드】</text:p>
      <text:p text:style-name="Preformatted_20_Text"/>
      <text:p text:style-name="Preformatted_20_Text"/>
      <text:p text:style-name="P11">2.1.<text:span text:style-name="T17">1</text:span> AI 성숙도 분석 결과</text:p>
      <text:p text:style-name="P11"/>
      <text:p text:style-name="P12">종합 성숙도 레벨, 영역별 성숙도 점수, <text:span text:style-name="T17">AI 분석 권장 사항, 주요 강점을 확인할 수 있다.</text:span></text:p>
      <text:p text:style-name="P10">2.2 AI 기회 발굴 (Opportunity Discovery)</text:p>
      <text:p text:style-name="Preformatted_20_Text"/>
      <text:p text:style-name="Preformatted_20_Text">API 엔드포인트: POST /api/v1/framework/projects/{project_id}/stage1/opportunities</text:p>
      <text:p text:style-name="Preformatted_20_Text">요청 모델: OpportunityInput</text:p>
      <text:p text:style-name="Preformatted_20_Text"/>
      <text:p text:style-name="Preformatted_20_Text">각 AI 적용 기회에 대해 아래 항목을 입력한다. <text:span text:style-name="T1">일반적으로 5~10개의 기회를 발굴하여 입력한다.</text:span></text:p>
      <text:p text:style-name="Preformatted_20_Text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row>
          <table:table-cell table:style-name="표12.A1" office:value-type="string">
            <text:p text:style-name="P16">필드명</text:p>
          </table:table-cell>
          <table:table-cell table:style-name="표12.A1" office:value-type="string">
            <text:p text:style-name="P16">데이터 타입</text:p>
          </table:table-cell>
          <table:table-cell table:style-name="표12.A1" office:value-type="string">
            <text:p text:style-name="P16">필수</text:p>
          </table:table-cell>
          <table:table-cell table:style-name="표12.D1" office:value-type="string">
            <text:p text:style-name="P16">설명</text:p>
          </table:table-cell>
        </table:table-row>
        <table:table-row>
          <table:table-cell table:style-name="표12.A2" office:value-type="string">
            <text:p text:style-name="P54">name</text:p>
          </table:table-cell>
          <table:table-cell table:style-name="표12.A2" office:value-type="string">
            <text:p text:style-name="P50">String</text:p>
          </table:table-cell>
          <table:table-cell table:style-name="표12.A2" office:value-type="string">
            <text:p text:style-name="P50">O</text:p>
          </table:table-cell>
          <table:table-cell table:style-name="표12.D2" office:value-type="string">
            <text:p text:style-name="P54">기회명을 입력한다.</text:p>
            <text:p text:style-name="P54">(예: "고객 이탈 예측 시스템","제조 품질 예측 모델" 등)</text:p>
          </table:table-cell>
        </table:table-row>
        <table:table-row>
          <table:table-cell table:style-name="표12.A2" office:value-type="string">
            <text:p text:style-name="P54">description</text:p>
          </table:table-cell>
          <table:table-cell table:style-name="표12.A2" office:value-type="string">
            <text:p text:style-name="P50">String</text:p>
          </table:table-cell>
          <table:table-cell table:style-name="표12.A2" office:value-type="string">
            <text:p text:style-name="P145">o</text:p>
          </table:table-cell>
          <table:table-cell table:style-name="표12.D2" office:value-type="string">
            <text:p text:style-name="P54">기회에 대한 상세 설명을 입력한다. 해당 AI 적용 사례의 개요와 목적을 기술한다.</text:p>
          </table:table-cell>
        </table:table-row>
        <table:table-row>
          <table:table-cell table:style-name="표12.A2" office:value-type="string">
            <text:p text:style-name="P54">business_area</text:p>
          </table:table-cell>
          <table:table-cell table:style-name="표12.A2" office:value-type="string">
            <text:p text:style-name="P50">String</text:p>
          </table:table-cell>
          <table:table-cell table:style-name="표12.A2" office:value-type="string">
            <text:p text:style-name="P145">o</text:p>
          </table:table-cell>
          <table:table-cell table:style-name="표12.D2" office:value-type="string">
            <text:p text:style-name="P54">비즈니스 영역을 선택한다. </text:p>
            <text:p text:style-name="P54">(예: 영업, 마케팅, 생산, 물류, 고객서비스, 재무, HR 등)</text:p>
          </table:table-cell>
        </table:table-row>
        <table:table-row>
          <table:table-cell table:style-name="표12.A2" office:value-type="string">
            <text:p text:style-name="P54">priority_quadrant</text:p>
          </table:table-cell>
          <table:table-cell table:style-name="표12.A2" office:value-type="string">
            <text:p text:style-name="P50">Enum</text:p>
          </table:table-cell>
          <table:table-cell table:style-name="표12.A2" office:value-type="string">
            <text:p text:style-name="P145">o</text:p>
          </table:table-cell>
          <table:table-cell table:style-name="표12.D2" office:value-type="string">
            <text:p text:style-name="P54">우선순위 사분면을 선택한다.</text:p>
            <text:p text:style-name="P54">- quick_win: 빠른 성과 (높은 효과 + 쉬운 구현)</text:p>
            <text:p text:style-name="P54">- strategic: 전략적 과제 (높은 효과 + 어려운 구현)</text:p>
            <text:p text:style-name="P54">- fill_in: 보완 과제 (낮은 효과 + 쉬운 구현)</text:p>
            <text:p text:style-name="P54">- reconsider: 재검토 (낮은 효과 + 어려운 구현)</text:p>
          </table:table-cell>
        </table:table-row>
        <table:table-row>
          <table:table-cell table:style-name="표12.A2" office:value-type="string">
            <text:p text:style-name="P54">expected_impact</text:p>
          </table:table-cell>
          <table:table-cell table:style-name="표12.A2" office:value-type="string">
            <text:p text:style-name="P50">String</text:p>
          </table:table-cell>
          <table:table-cell table:style-name="표12.A2" office:value-type="string">
            <text:p text:style-name="P145">o</text:p>
          </table:table-cell>
          <table:table-cell table:style-name="표12.D2" office:value-type="string">
            <text:p text:style-name="P54">기대 효과를 기술한다.</text:p>
            <text:p text:style-name="P55">정량적 효과(비용절감, 매출증대 등)와 정성적 효과를 모두 포함하여 서술한다.</text:p>
          </table:table-cell>
        </table:table-row>
        <table:table-row>
          <table:table-cell table:style-name="표12.A2" office:value-type="string">
            <text:p text:style-name="P55">implementation_difficulty</text:p>
          </table:table-cell>
          <table:table-cell table:style-name="표12.A2" office:value-type="string">
            <text:p text:style-name="P51">Enum</text:p>
          </table:table-cell>
          <table:table-cell table:style-name="표12.A2" office:value-type="string">
            <text:p text:style-name="P145">o</text:p>
          </table:table-cell>
          <table:table-cell table:style-name="표12.D2" office:value-type="string">
            <text:p text:style-name="P55">구현 난이도를 선택한다.</text:p>
            <text:p text:style-name="P55">- low: 낮음 (기존 기술 활용)</text:p>
            <text:p text:style-name="P55">- medium: 보통 (일부 신규 개발)</text:p>
            <text:p text:style-name="P55">- high: 높음 (신기술 필요)</text:p>
          </table:table-cell>
        </table:table-row>
        <table:table-row>
          <table:table-cell table:style-name="표12.A2" office:value-type="string">
            <text:p text:style-name="P55">estimated_timeline</text:p>
          </table:table-cell>
          <table:table-cell table:style-name="표12.A2" office:value-type="string">
            <text:p text:style-name="P51">String</text:p>
          </table:table-cell>
          <table:table-cell table:style-name="표12.A2" office:value-type="string">
            <text:p text:style-name="P145">o</text:p>
          </table:table-cell>
          <table:table-cell table:style-name="표12.D2" office:value-type="string">
            <text:p text:style-name="P55">예상 소요 기간을 입력한다.</text:p>
            <text:p text:style-name="P55">(예: "3개월", "6-9개월" 등)</text:p>
          </table:table-cell>
        </table:table-row>
        <table:table-row>
          <table:table-cell table:style-name="표12.A2" office:value-type="string">
            <text:p text:style-name="P55">required_resources</text:p>
          </table:table-cell>
          <table:table-cell table:style-name="표12.A2" office:value-type="string">
            <text:p text:style-name="P51">String</text:p>
          </table:table-cell>
          <table:table-cell table:style-name="표12.A2" office:value-type="string">
            <text:p text:style-name="P145">o</text:p>
          </table:table-cell>
          <table:table-cell table:style-name="표12.D2" office:value-type="string">
            <text:p text:style-name="P55">필요 자원을 기술한다.</text:p>
            <text:p text:style-name="P55">인력, 인프라, 데이터, 외부협력 등 필요한 자원을 나열한다.</text:p>
          </table:table-cell>
        </table:table-row>
      </table:table>
      <text:p text:style-name="Preformatted_20_Text"/>
      <text:p text:style-name="Preformatted_20_Text"/>
      <text:p text:style-name="P1">【기회 발굴 입력 항목 합계: 기회당 8개 필드 × N개 기회】</text:p>
      <text:p text:style-name="Preformatted_20_Text"/>
      <text:p text:style-name="P117"><text:span text:style-name="T7"/></text:p>
      <text:p text:style-name="P117"><text:span text:style-name="T7">2.2.</text:span><text:span text:style-name="T8">1</text:span><text:span text:style-name="T7"> AI 기회 발굴 분석 결과</text:span></text:p>
      <text:p text:style-name="P117"><text:span text:style-name="T7"/></text:p>
      <text:p text:style-name="P109">AI 분석을 통해 고 우선순위 기회, 우선 순위 메트릭스를 확인할 수 있으며, 종합적인 권장 사항, 전체 분석 결과를 도출해 냅니다.</text:p>
      <text:p text:style-name="P10">2.3 AI 로드맵 수립 (Roadmap Development)</text:p>
      <text:p text:style-name="Preformatted_20_Text"/>
      <text:p text:style-name="Preformatted_20_Text">API 엔드포인트: POST /api/v1/framework/projects/{project_id}/stage1/roadmap</text:p>
      <text:p text:style-name="Preformatted_20_Text">요청 모델: RoadmapInput</text:p>
      <text:p text:style-name="Preformatted_20_Text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row>
          <table:table-cell table:style-name="표13.A1" office:value-type="string">
            <text:p text:style-name="P16">필드명</text:p>
          </table:table-cell>
          <table:table-cell table:style-name="표13.A1" office:value-type="string">
            <text:p text:style-name="P16">데이터 타입</text:p>
          </table:table-cell>
          <table:table-cell table:style-name="표13.A1" office:value-type="string">
            <text:p text:style-name="P16">필수</text:p>
          </table:table-cell>
          <table:table-cell table:style-name="표13.D1" office:value-type="string">
            <text:p text:style-name="P16">설명</text:p>
          </table:table-cell>
        </table:table-row>
        <table:table-row>
          <table:table-cell table:style-name="표13.A2" office:value-type="string">
            <text:p text:style-name="P56">vision</text:p>
          </table:table-cell>
          <table:table-cell table:style-name="표13.A2" office:value-type="string">
            <text:p text:style-name="P56">String</text:p>
          </table:table-cell>
          <table:table-cell table:style-name="표13.A2" office:value-type="string">
            <text:p text:style-name="P146">o</text:p>
          </table:table-cell>
          <table:table-cell table:style-name="표13.D2" office:value-type="string">
            <text:p text:style-name="P56">AI 비전 선언문을 작성한다.</text:p>
            <text:p text:style-name="P56">조직의 AI 활용 목표와 방향성을 1~2문단으로 명확하게 선언한다.</text:p>
            <text:p text:style-name="P56">(예: "2027년까지 AI 기반 스마트 팩토리 구현으로 생산 효율 30% 향상")</text:p>
          </table:table-cell>
        </table:table-row>
        <table:table-row>
          <table:table-cell table:style-name="표13.A2" office:value-type="string">
            <text:p text:style-name="P56">goals</text:p>
          </table:table-cell>
          <table:table-cell table:style-name="표13.A2" office:value-type="string">
            <text:p text:style-name="P56">List[Object]</text:p>
          </table:table-cell>
          <table:table-cell table:style-name="표13.A2" office:value-type="string">
            <text:p text:style-name="P146">o</text:p>
          </table:table-cell>
          <table:table-cell table:style-name="표13.D2" office:value-type="string">
            <text:p text:style-name="P56">전략적 목표를 목록으로 입력한다. 각 목표는 아래 하위 필드를 포함한다:</text:p>
            <text:p text:style-name="P56">- goal_name: 목표명</text:p>
            <text:p text:style-name="P56">- target_value: 목표값</text:p>
            <text:p text:style-name="P56">- achievement_period: 달성 기간</text:p>
          </table:table-cell>
        </table:table-row>
        <table:table-row>
          <table:table-cell table:style-name="표13.A2" office:value-type="string">
            <text:p text:style-name="P56">kpis</text:p>
          </table:table-cell>
          <table:table-cell table:style-name="표13.A2" office:value-type="string">
            <text:p text:style-name="P56">List[Object]</text:p>
          </table:table-cell>
          <table:table-cell table:style-name="표13.A2" office:value-type="string">
            <text:p text:style-name="P146">o</text:p>
          </table:table-cell>
          <table:table-cell table:style-name="표13.D2" office:value-type="string">
            <text:p text:style-name="P57">핵심 성과 지표(KPI)를 목록으로 입력한다. 각 KPI는 아래 하위 필드를 포함한다:</text:p>
            <text:p text:style-name="P57">- kpi_name: 지표명</text:p>
            <text:p text:style-name="P57">- target_value: 목표값</text:p>
            <text:p text:style-name="P57">- current_value: 현재값</text:p>
            <text:p text:style-name="P57">- measurement_cycle: 측정 주기</text:p>
          </table:table-cell>
        </table:table-row>
        <table:table-row>
          <table:table-cell table:style-name="표13.A2" office:value-type="string">
            <text:p text:style-name="P56">phases</text:p>
          </table:table-cell>
          <table:table-cell table:style-name="표13.A2" office:value-type="string">
            <text:p text:style-name="P56">List[Object]</text:p>
          </table:table-cell>
          <table:table-cell table:style-name="표13.A2" office:value-type="string">
            <text:p text:style-name="P146">o</text:p>
          </table:table-cell>
          <table:table-cell table:style-name="표13.D2" office:value-type="string">
            <text:p text:style-name="P57">단계별 계획을 입력한다.</text:p>
            <text:p text:style-name="P57">일반적으로 3~5개 Phase로 구성:</text:p>
            <text:p text:style-name="P57">- phase_name: 단계명</text:p>
            <text:p text:style-name="P57">- duration: 기간</text:p>
            <text:p text:style-name="P57">- key_tasks: 주요 과제 목록</text:p>
            <text:p text:style-name="P57">- expected_investment: 예상 투자</text:p>
            <text:p text:style-name="P57">- expected_outcome: 기대 성과</text:p>
          </table:table-cell>
        </table:table-row>
      </table:table>
      <text:p text:style-name="Preformatted_20_Text"/>
      <text:p text:style-name="Preformatted_20_Text"/>
      <text:p text:style-name="P1">【로드맵 수립 입력 항목 합계: 4개 주요 필드 (내부에 다수 하위 항목 포함)】</text:p>
      <text:p text:style-name="Preformatted_20_Text"/>
      <text:p text:style-name="P117"><text:span text:style-name="T7"/></text:p>
      <text:p text:style-name="P117"><text:span text:style-name="T7">2.3.</text:span><text:span text:style-name="T8">1</text:span><text:span text:style-name="T7"> AI 로드맵 분석 결과 </text:span></text:p>
      <text:p text:style-name="P117"><text:span text:style-name="T7"/></text:p>
      <text:p text:style-name="P117"><text:span text:style-name="T9">AI 분석을 통해 로드맵 완성도, </text:span>단계별 로드맵 분석, 기회 발굴-로드맵 연계성 분석을 통해 강점과 종합 권장 사항을 도출해 냅니다.</text:p>
      <text:p text:style-name="P117"/>
      <text:p text:style-name="P13"/>
      <text:p text:style-name="P6">【 STEP 3 】 Stage 2: Use Case 및 설계 정의 (Define &amp; Design)</text:p>
      <text:p text:style-name="Preformatted_20_Text"/>
      <text:p text:style-name="Preformatted_20_Text"/>
      <text:p text:style-name="Preformatted_20_Text">Stage 2에서는 Stage 1에서 발굴한 AI 기회 중 우선순위가 높은 Use Case에 대해 상세 요건을 정의하고, 기술 아키텍처 및 거버넌스 체계를 설계한다.</text:p>
      <text:p text:style-name="Preformatted_20_Text"/>
      <text:p text:style-name="P8">3.1 상세 요건 정의 (Requirements Definition)</text:p>
      <text:p text:style-name="Preformatted_20_Text"/>
      <text:p text:style-name="Preformatted_20_Text">API 엔드포인트: POST /api/v1/framework/projects/{project_id}/stage2/requirements</text:p>
      <text:p text:style-name="Preformatted_20_Text">요청 모델: RequirementsInput</text:p>
      <text:p text:style-name="Preformatted_20_Text"/>
      <text:p text:style-name="Preformatted_20_Text">각 Use Case에 대해 다음 항목을 입력한다.</text:p>
      <text:p text:style-name="Preformatted_20_Text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row>
          <table:table-cell table:style-name="표14.A1" office:value-type="string">
            <text:p text:style-name="P16">필드명</text:p>
          </table:table-cell>
          <table:table-cell table:style-name="표14.A1" office:value-type="string">
            <text:p text:style-name="P16">데이터 타입</text:p>
          </table:table-cell>
          <table:table-cell table:style-name="표14.A1" office:value-type="string">
            <text:p text:style-name="P16">필수</text:p>
          </table:table-cell>
          <table:table-cell table:style-name="표14.D1" office:value-type="string">
            <text:p text:style-name="P16">설명</text:p>
          </table:table-cell>
        </table:table-row>
        <table:table-row>
          <table:table-cell table:style-name="표14.A2" office:value-type="string">
            <text:p text:style-name="P57">use_case_name</text:p>
          </table:table-cell>
          <table:table-cell table:style-name="표14.A2" office:value-type="string">
            <text:p text:style-name="P57">String</text:p>
          </table:table-cell>
          <table:table-cell table:style-name="표14.A2" office:value-type="string">
            <text:p text:style-name="P147">o</text:p>
          </table:table-cell>
          <table:table-cell table:style-name="표14.D2" office:value-type="string">
            <text:p text:style-name="P57">Use Case명을 입력한다.</text:p>
            <text:p text:style-name="P57">Stage 1에서 발굴한 기회 중 선정된 Use Case명이다.</text:p>
          </table:table-cell>
        </table:table-row>
        <table:table-row>
          <table:table-cell table:style-name="표14.A2" office:value-type="string">
            <text:p text:style-name="P57">business_requirements</text:p>
          </table:table-cell>
          <table:table-cell table:style-name="표14.A2" office:value-type="string">
            <text:p text:style-name="P57">String</text:p>
          </table:table-cell>
          <table:table-cell table:style-name="표14.A2" office:value-type="string">
            <text:p text:style-name="P147">o</text:p>
          </table:table-cell>
          <table:table-cell table:style-name="표14.D2" office:value-type="string">
            <text:p text:style-name="P57">비즈니스 요구사항을 기술한다.</text:p>
            <text:p text:style-name="P57">- 비즈니스 목표 및 기대 효과</text:p>
            <text:p text:style-name="P57">- 현재 Pain Point</text:p>
            <text:p text:style-name="P57">- 이해관계자 요구사항</text:p>
            <text:p text:style-name="P57">- 성공 정의</text:p>
          </table:table-cell>
        </table:table-row>
        <table:table-row>
          <table:table-cell table:style-name="표14.A2" office:value-type="string">
            <text:p text:style-name="P57">functional_requirements</text:p>
          </table:table-cell>
          <table:table-cell table:style-name="표14.A2" office:value-type="string">
            <text:p text:style-name="P57">String</text:p>
          </table:table-cell>
          <table:table-cell table:style-name="표14.A2" office:value-type="string">
            <text:p text:style-name="P147">o</text:p>
          </table:table-cell>
          <table:table-cell table:style-name="표14.D2" office:value-type="string">
            <text:p text:style-name="P57">기능 요구사항을 기술한다.</text:p>
            <text:p text:style-name="P57">- 핵심 기능 목록</text:p>
            <text:p text:style-name="P57">- 입력/출력 정의</text:p>
            <text:p text:style-name="P57">- 사용자 시나리오</text:p>
            <text:p text:style-name="P57">- 인터페이스 요구사항</text:p>
          </table:table-cell>
        </table:table-row>
        <table:table-row>
          <table:table-cell table:style-name="표14.A2" office:value-type="string">
            <text:p text:style-name="P57">non_functional_</text:p>
            <text:p text:style-name="P57">requirements</text:p>
          </table:table-cell>
          <table:table-cell table:style-name="표14.A2" office:value-type="string">
            <text:p text:style-name="P57">String</text:p>
          </table:table-cell>
          <table:table-cell table:style-name="표14.A2" office:value-type="string">
            <text:p text:style-name="P147">o</text:p>
          </table:table-cell>
          <table:table-cell table:style-name="표14.D2" office:value-type="string">
            <text:p text:style-name="P57">비기능 요구사항을 기술한다.</text:p>
            <text:p text:style-name="P57">- 성능 요구사항 (응답시간,처리량 등)</text:p>
            <text:p text:style-name="P57">- 보안 요구사항</text:p>
            <text:p text:style-name="P57">- 가용성 요구사항</text:p>
            <text:p text:style-name="P57">- 확장성 요구사항</text:p>
          </table:table-cell>
        </table:table-row>
        <table:table-row>
          <table:table-cell table:style-name="표14.A2" office:value-type="string">
            <text:p text:style-name="P57">data_requirements</text:p>
          </table:table-cell>
          <table:table-cell table:style-name="표14.A2" office:value-type="string">
            <text:p text:style-name="P57">String</text:p>
          </table:table-cell>
          <table:table-cell table:style-name="표14.A2" office:value-type="string">
            <text:p text:style-name="P147">o</text:p>
          </table:table-cell>
          <table:table-cell table:style-name="표14.D2" office:value-type="string">
            <text:p text:style-name="P57">데이터 요구사항을 기술한다.</text:p>
            <text:p text:style-name="P57">- 필요 데이터 항목</text:p>
            <text:p text:style-name="P57">- 데이터 특성 (크기, 형식 등)</text:p>
            <text:p text:style-name="P57">- 데이터 품질 기준</text:p>
            <text:p text:style-name="P57">- 데이터 수집/처리 방안</text:p>
          </table:table-cell>
        </table:table-row>
        <table:table-row>
          <table:table-cell table:style-name="표14.A2" office:value-type="string">
            <text:p text:style-name="P57">constraints</text:p>
          </table:table-cell>
          <table:table-cell table:style-name="표14.A2" office:value-type="string">
            <text:p text:style-name="P57">String</text:p>
          </table:table-cell>
          <table:table-cell table:style-name="표14.A2" office:value-type="string">
            <text:p text:style-name="P147">o</text:p>
          </table:table-cell>
          <table:table-cell table:style-name="표14.D2" office:value-type="string">
            <text:p text:style-name="P57">제약사항을 기술한다.</text:p>
            <text:p text:style-name="P57">- 기술적 제약</text:p>
            <text:p text:style-name="P57">- 조직/프로세스 제약</text:p>
            <text:p text:style-name="P57">- 일정/예산 제약</text:p>
            <text:p text:style-name="P57">- 규제/컴플라이언스 제약</text:p>
          </table:table-cell>
        </table:table-row>
        <table:table-row>
          <table:table-cell table:style-name="표14.A2" office:value-type="string">
            <text:p text:style-name="P57">success_criteria</text:p>
          </table:table-cell>
          <table:table-cell table:style-name="표14.A2" office:value-type="string">
            <text:p text:style-name="P57">String</text:p>
          </table:table-cell>
          <table:table-cell table:style-name="표14.A2" office:value-type="string">
            <text:p text:style-name="P147">o</text:p>
          </table:table-cell>
          <table:table-cell table:style-name="표14.D2" office:value-type="string">
            <text:p text:style-name="P57">성공 기준을 정의한다.</text:p>
            <text:p text:style-name="P57">- 정량적 성공 지표</text:p>
            <text:p text:style-name="P58">- 정성적 성공 기준</text:p>
            <text:p text:style-name="P123">- 검증 방법</text:p>
          </table:table-cell>
        </table:table-row>
      </table:table>
      <text:p text:style-name="Preformatted_20_Text"><text:span text:style-name="T1">【요건 정의 입력 항목 합계: Use Case당 7개 필드】</text:span></text:p>
      <text:p text:style-name="P8"><text:soft-page-break/>3.2 아키텍처 설계 (Architecture Design)</text:p>
      <text:p text:style-name="Preformatted_20_Text"/>
      <text:p text:style-name="Preformatted_20_Text">API 엔드포인트: POST /api/v1/framework/projects/{project_id}/stage2/architecture</text:p>
      <text:p text:style-name="Preformatted_20_Text">요청 모델: ArchitectureInput</text:p>
      <text:p text:style-name="P111"/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able:table-row>
          <table:table-cell table:style-name="표15.A1" office:value-type="string">
            <text:p text:style-name="P16">필드명</text:p>
          </table:table-cell>
          <table:table-cell table:style-name="표15.A1" office:value-type="string">
            <text:p text:style-name="P16">데이터 타입</text:p>
          </table:table-cell>
          <table:table-cell table:style-name="표15.A1" office:value-type="string">
            <text:p text:style-name="P16">필수</text:p>
          </table:table-cell>
          <table:table-cell table:style-name="표15.D1" office:value-type="string">
            <text:p text:style-name="P16">설명</text:p>
          </table:table-cell>
        </table:table-row>
        <table:table-row>
          <table:table-cell table:style-name="표15.A2" office:value-type="string">
            <text:p text:style-name="P58">data_architecture</text:p>
          </table:table-cell>
          <table:table-cell table:style-name="표15.A2" office:value-type="string">
            <text:p text:style-name="P58">Dict</text:p>
          </table:table-cell>
          <table:table-cell table:style-name="표15.A2" office:value-type="string">
            <text:p text:style-name="P148">o</text:p>
          </table:table-cell>
          <table:table-cell table:style-name="표15.D2" office:value-type="string">
            <text:p text:style-name="P58">데이터 아키텍처를 정의한다. 아래 하위 항목을 포함한다:</text:p>
            <text:p text:style-name="P58"><text:s/>- data_sources: 데이터 소스</text:p>
            <text:p text:style-name="P58"><text:s/>- etl_approach: ETL/ELT 방식</text:p>
            <text:p text:style-name="P58"><text:s/>- storage_type: 저장소 유형</text:p>
            <text:p text:style-name="P58">- processing_method: 처리 방식</text:p>
          </table:table-cell>
        </table:table-row>
        <table:table-row>
          <table:table-cell table:style-name="표15.A2" office:value-type="string">
            <text:p text:style-name="P58">ml_architecture</text:p>
          </table:table-cell>
          <table:table-cell table:style-name="표15.A2" office:value-type="string">
            <text:p text:style-name="P58">Dict</text:p>
          </table:table-cell>
          <table:table-cell table:style-name="표15.A2" office:value-type="string">
            <text:p text:style-name="P148">o</text:p>
          </table:table-cell>
          <table:table-cell table:style-name="표15.D2" office:value-type="string">
            <text:p text:style-name="P58">ML 아키텍처를 정의한다. 아래 하위 항목을 포함한다:</text:p>
            <text:p text:style-name="P58">- model_type: 모델 유형</text:p>
            <text:p text:style-name="P58">- training_approach: 학습 방식</text:p>
            <text:p text:style-name="P58">- deployment_method: 배포 방식</text:p>
            <text:p text:style-name="P58">- inference_endpoint: 추론 방식</text:p>
          </table:table-cell>
        </table:table-row>
        <table:table-row>
          <table:table-cell table:style-name="표15.A2" office:value-type="string">
            <text:p text:style-name="P58">tech_stack</text:p>
          </table:table-cell>
          <table:table-cell table:style-name="표15.A2" office:value-type="string">
            <text:p text:style-name="P58">Dict</text:p>
          </table:table-cell>
          <table:table-cell table:style-name="표15.A2" office:value-type="string">
            <text:p text:style-name="P148">o</text:p>
          </table:table-cell>
          <table:table-cell table:style-name="표15.D2" office:value-type="string">
            <text:p text:style-name="P58">기술 스택을 정의한다.</text:p>
            <text:p text:style-name="P58">각 계층별 기술을 명시한다:</text:p>
            <text:p text:style-name="P58">- infrastructure: 인프라 계층</text:p>
            <text:p text:style-name="P58"><text:s text:c="2"/>(AWS/GCP/Azure/On-Premise)</text:p>
            <text:p text:style-name="P58">- data_layer: 데이터 계층</text:p>
            <text:p text:style-name="P58"><text:s/>(Spark, Airflow, Kafka 등)</text:p>
            <text:p text:style-name="P58">- ml_layer: ML 계층</text:p>
            <text:p text:style-name="P58"><text:s/>(TensorFlow, PyTorch 등)</text:p>
            <text:p text:style-name="P58">- serving_layer: 서빙 계층</text:p>
            <text:p text:style-name="P58"><text:s/>(FastAPI, Triton 등)</text:p>
            <text:p text:style-name="P58">- monitoring: 모니터링 계층</text:p>
            <text:p text:style-name="P58">(Prometheus, Grafana 등)</text:p>
          </table:table-cell>
        </table:table-row>
        <table:table-row>
          <table:table-cell table:style-name="표15.A2" office:value-type="string">
            <text:p text:style-name="P58">integration_points</text:p>
          </table:table-cell>
          <table:table-cell table:style-name="표15.A2" office:value-type="string">
            <text:p text:style-name="P58">String</text:p>
          </table:table-cell>
          <table:table-cell table:style-name="표15.A2" office:value-type="string">
            <text:p text:style-name="P148">o</text:p>
          </table:table-cell>
          <table:table-cell table:style-name="표15.D2" office:value-type="string">
            <text:p text:style-name="P58">통합 포인트를 기술한다.</text:p>
            <text:p text:style-name="P58">기존 시스템과의 연결점, API 명세, 데이터 흐름을 정의한다.</text:p>
          </table:table-cell>
        </table:table-row>
      </table:table>
      <text:p text:style-name="P110"/>
      <text:p text:style-name="Preformatted_20_Text"/>
      <text:p text:style-name="P1">【아키텍처 설계 입력 항목 합계: 4개 주요 필드 (다수 하위 항목 포함)】</text:p>
      <text:p text:style-name="Preformatted_20_Text"/>
      <text:p text:style-name="Preformatted_20_Text"/>
      <text:p text:style-name="P8"/>
      <text:p text:style-name="P10">3.3 거버넌스 체계 (Governance Framework)</text:p>
      <text:p text:style-name="Preformatted_20_Text"/>
      <text:p text:style-name="Preformatted_20_Text">API 엔드포인트: POST /api/v1/framework/projects/{project_id}/stage2/governance</text:p>
      <text:p text:style-name="Preformatted_20_Text">요청 모델: GovernanceInput</text:p>
      <text:p text:style-name="Preformatted_20_Text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17">필드명</text:p>
          </table:table-cell>
          <table:table-cell table:style-name="표16.A1" office:value-type="string">
            <text:p text:style-name="P17">데이터 타입</text:p>
          </table:table-cell>
          <table:table-cell table:style-name="표16.A1" office:value-type="string">
            <text:p text:style-name="P17">필수</text:p>
          </table:table-cell>
          <table:table-cell table:style-name="표16.D1" office:value-type="string">
            <text:p text:style-name="P17">설명</text:p>
          </table:table-cell>
        </table:table-row>
        <table:table-row>
          <table:table-cell table:style-name="표16.A2" office:value-type="string">
            <text:p text:style-name="P58">privacy</text:p>
          </table:table-cell>
          <table:table-cell table:style-name="표16.A2" office:value-type="string">
            <text:p text:style-name="P58">Dict</text:p>
          </table:table-cell>
          <table:table-cell table:style-name="표16.A2" office:value-type="string">
            <text:p text:style-name="P148">o</text:p>
          </table:table-cell>
          <table:table-cell table:style-name="표16.D2" office:value-type="string">
            <text:p text:style-name="P60">프라이버시 정책을 정의한다.</text:p>
            <text:p text:style-name="P60">- data_protection: 데이터 보호</text:p>
            <text:p text:style-name="P60">- minimization: 최소화 원칙</text:p>
            <text:p text:style-name="P60">- retention_policy: 보유 기간</text:p>
            <text:p text:style-name="P60">- consent_management: 동의 관리</text:p>
          </table:table-cell>
        </table:table-row>
        <table:table-row>
          <table:table-cell table:style-name="표16.A2" office:value-type="string">
            <text:p text:style-name="P58">ethics</text:p>
          </table:table-cell>
          <table:table-cell table:style-name="표16.A2" office:value-type="string">
            <text:p text:style-name="P58">Dict</text:p>
          </table:table-cell>
          <table:table-cell table:style-name="표16.A2" office:value-type="string">
            <text:p text:style-name="P148">o</text:p>
          </table:table-cell>
          <table:table-cell table:style-name="표16.D2" office:value-type="string">
            <text:p text:style-name="P60">윤리 정책을 정의한다.</text:p>
            <text:p text:style-name="P60">- bias_detection: 편향성 검증</text:p>
            <text:p text:style-name="P60">- fairness_evaluation: 공정성</text:p>
            <text:p text:style-name="P60">- transparency: 투명성 보장</text:p>
            <text:p text:style-name="P60">- accountability: 책임성</text:p>
          </table:table-cell>
        </table:table-row>
        <table:table-row>
          <table:table-cell table:style-name="표16.A2" office:value-type="string">
            <text:p text:style-name="P59">compliance</text:p>
          </table:table-cell>
          <table:table-cell table:style-name="표16.A2" office:value-type="string">
            <text:p text:style-name="P58">Dict</text:p>
          </table:table-cell>
          <table:table-cell table:style-name="표16.A2" office:value-type="string">
            <text:p text:style-name="P148">o</text:p>
          </table:table-cell>
          <table:table-cell table:style-name="표16.D2" office:value-type="string">
            <text:p text:style-name="P60">규제 준수 사항을 정의한다.</text:p>
            <text:p text:style-name="P60">- gdpr_compliance: GDPR 준수</text:p>
            <text:p text:style-name="P60">- industry_regulations: 산업규제</text:p>
            <text:p text:style-name="P60">- audit_framework: 감사 체계</text:p>
            <text:p text:style-name="P60">- documentation: 문서화</text:p>
          </table:table-cell>
        </table:table-row>
        <table:table-row>
          <table:table-cell table:style-name="표16.A2" office:value-type="string">
            <text:p text:style-name="P59">notes</text:p>
          </table:table-cell>
          <table:table-cell table:style-name="표16.A2" office:value-type="string">
            <text:p text:style-name="P58">String</text:p>
          </table:table-cell>
          <table:table-cell table:style-name="표16.A2" office:value-type="string">
            <text:p text:style-name="P148">-</text:p>
          </table:table-cell>
          <table:table-cell table:style-name="표16.D2" office:value-type="string">
            <text:p text:style-name="P60">비고 사항을 기술한다.</text:p>
          </table:table-cell>
        </table:table-row>
      </table:table>
      <text:p text:style-name="P123"/>
      <text:p text:style-name="Preformatted_20_Text"/>
      <text:p text:style-name="P1">【거버넌스 체계 입력 항목 합계: 4개 주요 필드】</text:p>
      <text:p text:style-name="Preformatted_20_Text"/>
      <text:p text:style-name="Preformatted_20_Text"/>
      <text:p text:style-name="Preformatted_20_Text"/>
      <text:p text:style-name="P4"/>
      <text:p text:style-name="P6">【 STEP 4 】 Stage 3: 플랫폼 및 솔루션 구축 (Build &amp; Implement)</text:p>
      <text:p text:style-name="Preformatted_20_Text"/>
      <text:p text:style-name="Preformatted_20_Text"/>
      <text:p text:style-name="Preformatted_20_Text">Stage 3에서는 PoC(Proof of Concept)를 수행하고, AI 플랫폼을 구축하며, 기존 시스템과의 통합을 설계한다.</text:p>
      <text:p text:style-name="Preformatted_20_Text"/>
      <text:p text:style-name="Preformatted_20_Text"/>
      <text:p text:style-name="P8">4.1 PoC 계획 (PoC Planning)</text:p>
      <text:p text:style-name="Preformatted_20_Text"/>
      <text:p text:style-name="Preformatted_20_Text">API 엔드포인트: POST /api/v1/framework/projects/{project_id}/stage3/poc</text:p>
      <text:p text:style-name="Preformatted_20_Text">요청 모델: PoCInput</text:p>
      <text:p text:style-name="Preformatted_20_Text"/>
      <text:p text:style-name="Preformatted_20_Text"/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>
          <table:table-cell table:style-name="표27.A1" office:value-type="string">
            <text:p text:style-name="P19">필드명</text:p>
          </table:table-cell>
          <table:table-cell table:style-name="표27.A1" office:value-type="string">
            <text:p text:style-name="P19">데이터 타입</text:p>
          </table:table-cell>
          <table:table-cell table:style-name="표27.A1" office:value-type="string">
            <text:p text:style-name="P19">필수</text:p>
          </table:table-cell>
          <table:table-cell table:style-name="표27.D1" office:value-type="string">
            <text:p text:style-name="P19">설명</text:p>
          </table:table-cell>
        </table:table-row>
        <table:table-row>
          <table:table-cell table:style-name="표27.A2" office:value-type="string">
            <text:p text:style-name="P62">poc_name</text:p>
          </table:table-cell>
          <table:table-cell table:style-name="표27.A2" office:value-type="string">
            <text:p text:style-name="P65">String</text:p>
          </table:table-cell>
          <table:table-cell table:style-name="표27.A2" office:value-type="string">
            <text:p text:style-name="P149">o</text:p>
          </table:table-cell>
          <table:table-cell table:style-name="표27.D2" office:value-type="string">
            <text:p text:style-name="P65">PoC 명칭을 입력한다.</text:p>
            <text:p text:style-name="P65">검증하고자 하는 핵심 가설이나 기능을 반영한 명칭이다.</text:p>
          </table:table-cell>
        </table:table-row>
        <table:table-row>
          <table:table-cell table:style-name="표27.A2" office:value-type="string">
            <text:p text:style-name="P62">objectives</text:p>
          </table:table-cell>
          <table:table-cell table:style-name="표27.A2" office:value-type="string">
            <text:p text:style-name="P65">String</text:p>
          </table:table-cell>
          <table:table-cell table:style-name="표27.A2" office:value-type="string">
            <text:p text:style-name="P149">o</text:p>
          </table:table-cell>
          <table:table-cell table:style-name="표27.D2" office:value-type="string">
            <text:p text:style-name="P65">PoC 목표를 기술한다.</text:p>
            <text:p text:style-name="P65">- 검증하고자 하는 가설</text:p>
            <text:p text:style-name="P65">- 기술적 타당성 확인 항목</text:p>
            <text:p text:style-name="P65">- 비즈니스 가치 검증 항목</text:p>
          </table:table-cell>
        </table:table-row>
        <table:table-row>
          <table:table-cell table:style-name="표27.A2" office:value-type="string">
            <text:p text:style-name="P65">scope </text:p>
          </table:table-cell>
          <table:table-cell table:style-name="표27.A2" office:value-type="string">
            <text:p text:style-name="P65">String</text:p>
          </table:table-cell>
          <table:table-cell table:style-name="표27.A2" office:value-type="string">
            <text:p text:style-name="P149">o</text:p>
          </table:table-cell>
          <table:table-cell table:style-name="표27.D2" office:value-type="string">
            <text:p text:style-name="P65">PoC 범위를 정의한다.</text:p>
            <text:p text:style-name="P65">- 포함 범위 (In-scope)</text:p>
            <text:p text:style-name="P65">- 제외 범위 (Out-of-scope)</text:p>
            <text:p text:style-name="P65">- 대상 데이터 및 시스템</text:p>
          </table:table-cell>
        </table:table-row>
        <table:table-row>
          <table:table-cell table:style-name="표27.A2" office:value-type="string">
            <text:p text:style-name="P65">success_metrics</text:p>
          </table:table-cell>
          <table:table-cell table:style-name="표27.A2" office:value-type="string">
            <text:p text:style-name="P62">String</text:p>
          </table:table-cell>
          <table:table-cell table:style-name="표27.A2" office:value-type="string">
            <text:p text:style-name="P151">o</text:p>
          </table:table-cell>
          <table:table-cell table:style-name="표27.D2" office:value-type="string">
            <text:p text:style-name="P65">성공 지표를 정의한다.</text:p>
            <text:p text:style-name="P65">- 기술 성능 지표 (정확도 등)</text:p>
            <text:p text:style-name="P65">- 비즈니스 성과 지표</text:p>
            <text:p text:style-name="P65">- Go/No-Go 판단 기준</text:p>
          </table:table-cell>
        </table:table-row>
        <table:table-row>
          <table:table-cell table:style-name="표27.A2" office:value-type="string">
            <text:p text:style-name="P65">timeline </text:p>
          </table:table-cell>
          <table:table-cell table:style-name="표27.A2" office:value-type="string">
            <text:p text:style-name="P65">String</text:p>
          </table:table-cell>
          <table:table-cell table:style-name="표27.A2" office:value-type="string">
            <text:p text:style-name="P151">o</text:p>
          </table:table-cell>
          <table:table-cell table:style-name="표27.D2" office:value-type="string">
            <text:p text:style-name="P65">PoC 일정을 입력한다.</text:p>
            <text:p text:style-name="P65">- 전체 기간</text:p>
            <text:p text:style-name="P65">- 주요 마일스톤</text:p>
            <text:p text:style-name="P65">- 체크포인트</text:p>
          </table:table-cell>
        </table:table-row>
        <table:table-row>
          <table:table-cell table:style-name="표27.A2" office:value-type="string">
            <text:p text:style-name="P65">resources</text:p>
          </table:table-cell>
          <table:table-cell table:style-name="표27.A2" office:value-type="string">
            <text:p text:style-name="P65">String</text:p>
          </table:table-cell>
          <table:table-cell table:style-name="표27.A2" office:value-type="string">
            <text:p text:style-name="P151">o</text:p>
          </table:table-cell>
          <table:table-cell table:style-name="표27.D2" office:value-type="string">
            <text:p text:style-name="P65">필요 리소스를 기술한다.</text:p>
            <text:p text:style-name="P65">- 투입 인력 및 역할</text:p>
            <text:p text:style-name="P65">- 인프라 자원</text:p>
            <text:p text:style-name="P65">- 예산</text:p>
          </table:table-cell>
        </table:table-row>
        <table:table-row>
          <table:table-cell table:style-name="표27.A2" office:value-type="string">
            <text:p text:style-name="P65">risks </text:p>
          </table:table-cell>
          <table:table-cell table:style-name="표27.A2" office:value-type="string">
            <text:p text:style-name="P65">String</text:p>
          </table:table-cell>
          <table:table-cell table:style-name="표27.A2" office:value-type="string">
            <text:p text:style-name="P151">o</text:p>
          </table:table-cell>
          <table:table-cell table:style-name="표27.D2" office:value-type="string">
            <text:p text:style-name="P65">리스크를 식별한다.</text:p>
            <text:p text:style-name="P65">- 기술적 리스크</text:p>
            <text:p text:style-name="P65">- 일정 리스크</text:p>
            <text:p text:style-name="P65">- 자원 리스크</text:p>
            <text:p text:style-name="P65">- 완화 방안</text:p>
          </table:table-cell>
        </table:table-row>
      </table:table>
      <text:p text:style-name="P124"/>
      <text:p text:style-name="Preformatted_20_Text"><text:span text:style-name="T1"/></text:p>
      <text:p text:style-name="Preformatted_20_Text"><text:span text:style-name="T1">【PoC 계획 입력 항목 합계: 7개 필드】</text:span></text:p>
      <text:p text:style-name="Preformatted_20_Text"/>
      <text:p text:style-name="Preformatted_20_Text"/>
      <text:p text:style-name="P8"/>
      <text:p text:style-name="P8"><text:soft-page-break/>4.2 <text:span text:style-name="T10">AI </text:span>플랫폼 구축 계획 (Platform Building Plan)</text:p>
      <text:p text:style-name="Preformatted_20_Text"/>
      <text:p text:style-name="Preformatted_20_Text">API 엔드포인트: POST /api/v1/framework/projects/{project_id}/stage3/platform</text:p>
      <text:p text:style-name="Preformatted_20_Text">요청 모델: PlatformInput</text:p>
      <text:p text:style-name="Preformatted_20_Text"/>
      <text:p text:style-name="P113"/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row>
          <table:table-cell table:style-name="표28.A1" office:value-type="string">
            <text:p text:style-name="P20">필드명</text:p>
          </table:table-cell>
          <table:table-cell table:style-name="표28.A1" office:value-type="string">
            <text:p text:style-name="P20">데이터 타입</text:p>
          </table:table-cell>
          <table:table-cell table:style-name="표28.A1" office:value-type="string">
            <text:p text:style-name="P20">필수</text:p>
          </table:table-cell>
          <table:table-cell table:style-name="표28.D1" office:value-type="string">
            <text:p text:style-name="P20">설명</text:p>
          </table:table-cell>
        </table:table-row>
        <table:table-row>
          <table:table-cell table:style-name="표28.A2" office:value-type="string">
            <text:p text:style-name="P66">components</text:p>
          </table:table-cell>
          <table:table-cell table:style-name="표28.A2" office:value-type="string">
            <text:p text:style-name="P66">Dict</text:p>
          </table:table-cell>
          <table:table-cell table:style-name="표28.A2" office:value-type="string">
            <text:p text:style-name="P150">o</text:p>
          </table:table-cell>
          <table:table-cell table:style-name="표28.D2" office:value-type="string">
            <text:p text:style-name="P66">플랫폼 구성요소를 정의한다.</text:p>
            <text:p text:style-name="P66">- data_pipeline: 데이터 파이프라인</text:p>
            <text:p text:style-name="P66">- feature_store: 피처 스토어</text:p>
            <text:p text:style-name="P66">- model_registry: 모델 레지스트리</text:p>
            <text:p text:style-name="P66">- serving_infra: 서빙 인프라</text:p>
            <text:p text:style-name="P66">- monitoring: 모니터링 구성</text:p>
          </table:table-cell>
        </table:table-row>
        <table:table-row>
          <table:table-cell table:style-name="표28.A2" office:value-type="string">
            <text:p text:style-name="P66">infrastructure</text:p>
          </table:table-cell>
          <table:table-cell table:style-name="표28.A2" office:value-type="string">
            <text:p text:style-name="P66">String</text:p>
          </table:table-cell>
          <table:table-cell table:style-name="표28.A2" office:value-type="string">
            <text:p text:style-name="P150">o</text:p>
          </table:table-cell>
          <table:table-cell table:style-name="표28.D2" office:value-type="string">
            <text:p text:style-name="P66">인프라 구성을 기술한다.</text:p>
            <text:p text:style-name="P66">- 컴퓨팅 자원 (CPU/GPU)</text:p>
            <text:p text:style-name="P66">- 스토리지 구성</text:p>
            <text:p text:style-name="P66">- 네트워크 구성</text:p>
            <text:p text:style-name="P66">- 클라우드/온프레미스 구성</text:p>
          </table:table-cell>
        </table:table-row>
        <table:table-row>
          <table:table-cell table:style-name="표28.A2" office:value-type="string">
            <text:p text:style-name="P66">security_config</text:p>
          </table:table-cell>
          <table:table-cell table:style-name="표28.A2" office:value-type="string">
            <text:p text:style-name="P66">String</text:p>
          </table:table-cell>
          <table:table-cell table:style-name="표28.A2" office:value-type="string">
            <text:p text:style-name="P150">o</text:p>
          </table:table-cell>
          <table:table-cell table:style-name="표28.D2" office:value-type="string">
            <text:p text:style-name="P66">보안 설정을 기술한다.</text:p>
            <text:p text:style-name="P66">- 접근 제어 정책</text:p>
            <text:p text:style-name="P66">- 암호화 정책</text:p>
            <text:p text:style-name="P66">- 네트워크 보안</text:p>
            <text:p text:style-name="P66">- 감사 로깅</text:p>
          </table:table-cell>
        </table:table-row>
        <table:table-row>
          <table:table-cell table:style-name="표28.A2" office:value-type="string">
            <text:p text:style-name="P66">scalability_plan</text:p>
          </table:table-cell>
          <table:table-cell table:style-name="표28.A2" office:value-type="string">
            <text:p text:style-name="P66">String</text:p>
          </table:table-cell>
          <table:table-cell table:style-name="표28.A2" office:value-type="string">
            <text:p text:style-name="P152">o</text:p>
          </table:table-cell>
          <table:table-cell table:style-name="표28.D2" office:value-type="string">
            <text:p text:style-name="P66">확장성 계획을 기술한다.</text:p>
            <text:p text:style-name="P66">- 수평 확장 전략</text:p>
            <text:p text:style-name="P66">- 오토스케일링 정책</text:p>
            <text:p text:style-name="P66">- 용량 계획</text:p>
          </table:table-cell>
        </table:table-row>
      </table:table>
      <text:p text:style-name="P125"/>
      <text:p text:style-name="Preformatted_20_Text"/>
      <text:p text:style-name="Preformatted_20_Text">【<text:span text:style-name="T1">플랫폼 구축 입력 항목 합계: 4개 주요 필드】</text:span></text:p>
      <text:p text:style-name="Preformatted_20_Text"/>
      <text:p text:style-name="Preformatted_20_Text"/>
      <text:p text:style-name="P8"/>
      <text:p text:style-name="P10">4.3 솔루션 개발 및 시스템 통합 (System Integration)</text:p>
      <text:p text:style-name="Preformatted_20_Text"/>
      <text:p text:style-name="Preformatted_20_Text">API 엔드포인트: POST /api/v1/framework/projects/{project_id}/stage3/integration</text:p>
      <text:p text:style-name="Preformatted_20_Text">요청 모델: IntegrationInput</text:p>
      <text:p text:style-name="Preformatted_20_Text"/>
      <text:p text:style-name="P113"/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>
          <table:table-cell table:style-name="표29.A1" office:value-type="string">
            <text:p text:style-name="P20">필드명</text:p>
          </table:table-cell>
          <table:table-cell table:style-name="표29.A1" office:value-type="string">
            <text:p text:style-name="P20">데이터 타입</text:p>
          </table:table-cell>
          <table:table-cell table:style-name="표29.A1" office:value-type="string">
            <text:p text:style-name="P20">필수</text:p>
          </table:table-cell>
          <table:table-cell table:style-name="표29.D1" office:value-type="string">
            <text:p text:style-name="P20">설명</text:p>
          </table:table-cell>
        </table:table-row>
        <table:table-row>
          <table:table-cell table:style-name="표29.A2" office:value-type="string">
            <text:p text:style-name="P66">target_systems</text:p>
          </table:table-cell>
          <table:table-cell table:style-name="표29.A2" office:value-type="string">
            <text:p text:style-name="P66">String</text:p>
          </table:table-cell>
          <table:table-cell table:style-name="표29.A2" office:value-type="string">
            <text:p text:style-name="P150">o</text:p>
          </table:table-cell>
          <table:table-cell table:style-name="표29.D2" office:value-type="string">
            <text:p text:style-name="P66">대상 시스템을 기술한다.</text:p>
            <text:p text:style-name="P66">통합 대상이 되는 기존 시스템</text:p>
            <text:p text:style-name="P66">목록과 특성을 나열한다.</text:p>
          </table:table-cell>
        </table:table-row>
        <table:table-row>
          <table:table-cell table:style-name="표29.A2" office:value-type="string">
            <text:p text:style-name="P66">api_specifications </text:p>
          </table:table-cell>
          <table:table-cell table:style-name="표29.A2" office:value-type="string">
            <text:p text:style-name="P66">String</text:p>
          </table:table-cell>
          <table:table-cell table:style-name="표29.A2" office:value-type="string">
            <text:p text:style-name="P150">o</text:p>
          </table:table-cell>
          <table:table-cell table:style-name="표29.D2" office:value-type="string">
            <text:p text:style-name="P66">API 명세를 기술한다.</text:p>
            <text:p text:style-name="P66">- API 엔드포인트 정의</text:p>
            <text:p text:style-name="P66">- 요청/응답 형식</text:p>
            <text:p text:style-name="P66">- 인증 방식</text:p>
            <text:p text:style-name="P66">- 에러 처리</text:p>
          </table:table-cell>
        </table:table-row>
        <table:table-row>
          <table:table-cell table:style-name="표29.A2" office:value-type="string">
            <text:p text:style-name="P66">data_flow</text:p>
          </table:table-cell>
          <table:table-cell table:style-name="표29.A2" office:value-type="string">
            <text:p text:style-name="P66">String</text:p>
          </table:table-cell>
          <table:table-cell table:style-name="표29.A2" office:value-type="string">
            <text:p text:style-name="P150">o</text:p>
          </table:table-cell>
          <table:table-cell table:style-name="표29.D2" office:value-type="string">
            <text:p text:style-name="P67">데이터 흐름을 기술한다.</text:p>
            <text:p text:style-name="P67">- 입력 데이터 흐름</text:p>
            <text:p text:style-name="P67">- 처리 데이터 흐름</text:p>
            <text:p text:style-name="P67">- 출력 데이터 흐름</text:p>
            <text:p text:style-name="P67">- 실시간/배치 구분</text:p>
          </table:table-cell>
        </table:table-row>
        <table:table-row>
          <table:table-cell table:style-name="표29.A2" office:value-type="string">
            <text:p text:style-name="P66">testing_plan</text:p>
          </table:table-cell>
          <table:table-cell table:style-name="표29.A2" office:value-type="string">
            <text:p text:style-name="P66">String</text:p>
          </table:table-cell>
          <table:table-cell table:style-name="표29.A2" office:value-type="string">
            <text:p text:style-name="P152">o</text:p>
          </table:table-cell>
          <table:table-cell table:style-name="표29.D2" office:value-type="string">
            <text:p text:style-name="P67">테스트 계획을 기술한다.</text:p>
            <text:p text:style-name="P67">- 단위 테스트 범위</text:p>
            <text:p text:style-name="P67">- 통합 테스트 시나리오</text:p>
            <text:p text:style-name="P67">- 성능 테스트 계획</text:p>
            <text:p text:style-name="P67">- UAT 계획</text:p>
          </table:table-cell>
        </table:table-row>
      </table:table>
      <text:p text:style-name="P125"/>
      <text:p text:style-name="Preformatted_20_Text"/>
      <text:p text:style-name="P1">【시스템 통합 입력 항목 합계: 4개 필드】</text:p>
      <text:p text:style-name="Preformatted_20_Text"/>
      <text:p text:style-name="Preformatted_20_Text"/>
      <text:p text:style-name="Preformatted_20_Text"/>
      <text:p text:style-name="P4"/>
      <text:p text:style-name="P6">【 STEP 5 】 Stage 4: 파일럿 및 확산 (Scale &amp; Deploy)</text:p>
      <text:p text:style-name="Preformatted_20_Text"/>
      <text:p text:style-name="Preformatted_20_Text"/>
      <text:p text:style-name="Preformatted_20_Text">Stage 4에서는 파일럿 운영을 수행하고, 변화 관리 계획을 수립하며, 전사 확산을 준비한다.</text:p>
      <text:p text:style-name="Preformatted_20_Text"/>
      <text:p text:style-name="Preformatted_20_Text"/>
      <text:p text:style-name="P8">5.1 파일럿 계획 (Pilot Planning)</text:p>
      <text:p text:style-name="Preformatted_20_Text"/>
      <text:p text:style-name="Preformatted_20_Text">API 엔드포인트: POST /api/v1/framework/projects/{project_id}/stage4/pilot</text:p>
      <text:p text:style-name="Preformatted_20_Text">요청 모델: PilotInput</text:p>
      <text:p text:style-name="Preformatted_20_Text"/>
      <text:p text:style-name="Preformatted_20_Text"/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>
          <table:table-cell table:style-name="표30.A1" office:value-type="string">
            <text:p text:style-name="P21">필드명</text:p>
          </table:table-cell>
          <table:table-cell table:style-name="표30.A1" office:value-type="string">
            <text:p text:style-name="P21">데이터 타입</text:p>
          </table:table-cell>
          <table:table-cell table:style-name="표30.A1" office:value-type="string">
            <text:p text:style-name="P21">필수</text:p>
          </table:table-cell>
          <table:table-cell table:style-name="표30.D1" office:value-type="string">
            <text:p text:style-name="P21">설명</text:p>
          </table:table-cell>
        </table:table-row>
        <table:table-row>
          <table:table-cell table:style-name="표30.A2" office:value-type="string">
            <text:p text:style-name="P68">pilot_name </text:p>
          </table:table-cell>
          <table:table-cell table:style-name="표30.A2" office:value-type="string">
            <text:p text:style-name="P68">String</text:p>
          </table:table-cell>
          <table:table-cell table:style-name="표30.A2" office:value-type="string">
            <text:p text:style-name="P83">o</text:p>
          </table:table-cell>
          <table:table-cell table:style-name="표30.D2" office:value-type="string">
            <text:p text:style-name="P68">파일럿 명칭을 입력한다.</text:p>
          </table:table-cell>
        </table:table-row>
        <table:table-row>
          <table:table-cell table:style-name="표30.A2" office:value-type="string">
            <text:p text:style-name="P68">target_department</text:p>
          </table:table-cell>
          <table:table-cell table:style-name="표30.A2" office:value-type="string">
            <text:p text:style-name="P68">String</text:p>
          </table:table-cell>
          <table:table-cell table:style-name="표30.A2" office:value-type="string">
            <text:p text:style-name="P83">o</text:p>
          </table:table-cell>
          <table:table-cell table:style-name="표30.D2" office:value-type="string">
            <text:p text:style-name="P68">대상 부서를 입력한다.</text:p>
            <text:p text:style-name="P68">파일럿을 수행할 부서나 조직 단위를 명시한다.</text:p>
          </table:table-cell>
        </table:table-row>
        <table:table-row>
          <table:table-cell table:style-name="표30.A2" office:value-type="string">
            <text:p text:style-name="P68">pilot_scope</text:p>
          </table:table-cell>
          <table:table-cell table:style-name="표30.A2" office:value-type="string">
            <text:p text:style-name="P68">String</text:p>
          </table:table-cell>
          <table:table-cell table:style-name="표30.A2" office:value-type="string">
            <text:p text:style-name="P83">o</text:p>
          </table:table-cell>
          <table:table-cell table:style-name="표30.D2" office:value-type="string">
            <text:p text:style-name="P68">파일럿 범위를 정의한다.</text:p>
            <text:p text:style-name="P68">- 적용 업무 범위</text:p>
            <text:p text:style-name="P68">- 대상 사용자 수</text:p>
            <text:p text:style-name="P68">- 기능 범위</text:p>
          </table:table-cell>
        </table:table-row>
        <table:table-row>
          <table:table-cell table:style-name="표30.A2" office:value-type="string">
            <text:p text:style-name="P68">duration</text:p>
          </table:table-cell>
          <table:table-cell table:style-name="표30.A2" office:value-type="string">
            <text:p text:style-name="P68">String</text:p>
          </table:table-cell>
          <table:table-cell table:style-name="표30.A2" office:value-type="string">
            <text:p text:style-name="P83">o</text:p>
          </table:table-cell>
          <table:table-cell table:style-name="표30.D2" office:value-type="string">
            <text:p text:style-name="P68">파일럿 기간을 입력한다.</text:p>
            <text:p text:style-name="P68">(예: "3개월", "2023.10-2023.12")</text:p>
          </table:table-cell>
        </table:table-row>
        <table:table-row>
          <table:table-cell table:style-name="표30.A2" office:value-type="string">
            <text:p text:style-name="P68">success_criteria</text:p>
          </table:table-cell>
          <table:table-cell table:style-name="표30.A2" office:value-type="string">
            <text:p text:style-name="P68">String</text:p>
          </table:table-cell>
          <table:table-cell table:style-name="표30.A2" office:value-type="string">
            <text:p text:style-name="P83">o</text:p>
          </table:table-cell>
          <table:table-cell table:style-name="표30.D2" office:value-type="string">
            <text:p text:style-name="P68">성공 기준을 정의한다.</text:p>
            <text:p text:style-name="P68">- 기술 성능 지표</text:p>
            <text:p text:style-name="P68">- 사용자 만족도 지표</text:p>
            <text:p text:style-name="P68">- 비즈니스 성과 지표</text:p>
            <text:p text:style-name="P68">- 본격 확산 판단 기준</text:p>
          </table:table-cell>
        </table:table-row>
        <table:table-row>
          <table:table-cell table:style-name="표30.A2" office:value-type="string">
            <text:p text:style-name="P68">support_plan</text:p>
          </table:table-cell>
          <table:table-cell table:style-name="표30.A2" office:value-type="string">
            <text:p text:style-name="P68">String</text:p>
          </table:table-cell>
          <table:table-cell table:style-name="표30.A2" office:value-type="string">
            <text:p text:style-name="P83">o</text:p>
          </table:table-cell>
          <table:table-cell table:style-name="표30.D2" office:value-type="string">
            <text:p text:style-name="P68">지원 계획을 기술한다.</text:p>
            <text:p text:style-name="P68">- 기술 지원 체계</text:p>
            <text:p text:style-name="P68">- 사용자 교육 계획</text:p>
            <text:p text:style-name="P68">- 이슈 대응 체계</text:p>
          </table:table-cell>
        </table:table-row>
      </table:table>
      <text:p text:style-name="P126"/>
      <text:p text:style-name="Preformatted_20_Text"/>
      <text:p text:style-name="P1">【파일럿 계획 입력 항목 합계: 6개 필드】</text:p>
      <text:p text:style-name="Preformatted_20_Text"/>
      <text:p text:style-name="Preformatted_20_Text"/>
      <text:p text:style-name="P8"/>
      <text:p text:style-name="P10">5.2 변화 관리 (Change Management)</text:p>
      <text:p text:style-name="Preformatted_20_Text"/>
      <text:p text:style-name="Preformatted_20_Text">API 엔드포인트: POST /api/v1/framework/projects/{project_id}/stage4/change-management</text:p>
      <text:p text:style-name="Preformatted_20_Text">요청 모델: ChangeManagementInput</text:p>
      <text:p text:style-name="Preformatted_20_Text"/>
      <text:p text:style-name="Preformatted_20_Text"/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row>
          <table:table-cell table:style-name="표31.A1" office:value-type="string">
            <text:p text:style-name="P21">필드명</text:p>
          </table:table-cell>
          <table:table-cell table:style-name="표31.A1" office:value-type="string">
            <text:p text:style-name="P21">데이터 타입</text:p>
          </table:table-cell>
          <table:table-cell table:style-name="표31.A1" office:value-type="string">
            <text:p text:style-name="P21">필수</text:p>
          </table:table-cell>
          <table:table-cell table:style-name="표31.D1" office:value-type="string">
            <text:p text:style-name="P21">설명</text:p>
          </table:table-cell>
        </table:table-row>
        <table:table-row>
          <table:table-cell table:style-name="표31.A2" office:value-type="string">
            <text:p text:style-name="P68">awareness</text:p>
          </table:table-cell>
          <table:table-cell table:style-name="표31.A2" office:value-type="string">
            <text:p text:style-name="P68">Dict</text:p>
          </table:table-cell>
          <table:table-cell table:style-name="표31.A2" office:value-type="string">
            <text:p text:style-name="P83">o</text:p>
          </table:table-cell>
          <table:table-cell table:style-name="표31.D2" office:value-type="string">
            <text:p text:style-name="P68">인식 제고 계획을 정의한다.</text:p>
            <text:p text:style-name="P68">- communication_plan: 소통 계획</text:p>
            <text:p text:style-name="P68">- stakeholder_engagement:</text:p>
            <text:p text:style-name="P68"><text:s text:c="2"/>이해관계자 참여</text:p>
            <text:p text:style-name="P68">- benefit_messaging: 혜택 전달</text:p>
          </table:table-cell>
        </table:table-row>
        <table:table-row>
          <table:table-cell table:style-name="표31.A2" office:value-type="string">
            <text:p text:style-name="P68">capability </text:p>
          </table:table-cell>
          <table:table-cell table:style-name="표31.A2" office:value-type="string">
            <text:p text:style-name="P68">Dict</text:p>
          </table:table-cell>
          <table:table-cell table:style-name="표31.A2" office:value-type="string">
            <text:p text:style-name="P83">o</text:p>
          </table:table-cell>
          <table:table-cell table:style-name="표31.D2" office:value-type="string">
            <text:p text:style-name="P69">역량 강화 계획을 정의한다.</text:p>
            <text:p text:style-name="P69">- training_program: 교육 프로그램</text:p>
            <text:p text:style-name="P69">- skill_development: 스킬 개발</text:p>
            <text:p text:style-name="P69">- certification: 인증 체계</text:p>
          </table:table-cell>
        </table:table-row>
        <table:table-row>
          <table:table-cell table:style-name="표31.A2" office:value-type="string">
            <text:p text:style-name="P68">engagement</text:p>
          </table:table-cell>
          <table:table-cell table:style-name="표31.A2" office:value-type="string">
            <text:p text:style-name="P68">Dict</text:p>
          </table:table-cell>
          <table:table-cell table:style-name="표31.A2" office:value-type="string">
            <text:p text:style-name="P83">o</text:p>
          </table:table-cell>
          <table:table-cell table:style-name="표31.D2" office:value-type="string">
            <text:p text:style-name="P69">참여 유도 계획을 정의한다.</text:p>
            <text:p text:style-name="P69">- champion_program: 챔피언 프로그램</text:p>
            <text:p text:style-name="P69">- feedback_mechanism: 피드백 체계</text:p>
            <text:p text:style-name="P69">- incentive_program: 인센티브</text:p>
          </table:table-cell>
        </table:table-row>
        <table:table-row>
          <table:table-cell table:style-name="표31.A2" office:value-type="string">
            <text:p text:style-name="P68">success_sharing </text:p>
          </table:table-cell>
          <table:table-cell table:style-name="표31.A2" office:value-type="string">
            <text:p text:style-name="P68">Dict</text:p>
          </table:table-cell>
          <table:table-cell table:style-name="표31.A2" office:value-type="string">
            <text:p text:style-name="P83">o</text:p>
          </table:table-cell>
          <table:table-cell table:style-name="표31.D2" office:value-type="string">
            <text:p text:style-name="P69">성과 공유 계획을 정의한다.</text:p>
            <text:p text:style-name="P69">- success_metrics: 성과 지표</text:p>
            <text:p text:style-name="P69">- sharing_platform: 공유 플랫폼</text:p>
            <text:p text:style-name="P69">- recognition_program: 인정 프로그램</text:p>
          </table:table-cell>
        </table:table-row>
        <table:table-row>
          <table:table-cell table:style-name="표31.A2" office:value-type="string">
            <text:p text:style-name="P68">notes</text:p>
          </table:table-cell>
          <table:table-cell table:style-name="표31.A2" office:value-type="string">
            <text:p text:style-name="P68">String</text:p>
          </table:table-cell>
          <table:table-cell table:style-name="표31.A2" office:value-type="string">
            <text:p text:style-name="P83">-</text:p>
          </table:table-cell>
          <table:table-cell table:style-name="표31.D2" office:value-type="string">
            <text:p text:style-name="P69">비고 사항을 기술한다.</text:p>
          </table:table-cell>
        </table:table-row>
      </table:table>
      <text:p text:style-name="P126"/>
      <text:p text:style-name="Preformatted_20_Text"/>
      <text:p text:style-name="Preformatted_20_Text"/>
      <text:p text:style-name="P1">【변화 관리 입력 항목 합계: 5개 주요 필드】</text:p>
      <text:p text:style-name="Preformatted_20_Text"/>
      <text:p text:style-name="Preformatted_20_Text"/>
      <text:p text:style-name="P8">5.3 전사 확산 계획 (Scale-up Planning)</text:p>
      <text:p text:style-name="Preformatted_20_Text"/>
      <text:p text:style-name="Preformatted_20_Text">API 엔드포인트: POST /api/v1/framework/projects/{project_id}/stage4/scale</text:p>
      <text:p text:style-name="Preformatted_20_Text">요청 모델: ScaleInput</text:p>
      <text:p text:style-name="Preformatted_20_Text"/>
      <text:p text:style-name="Preformatted_20_Text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>
          <table:table-cell table:style-name="표32.A1" office:value-type="string">
            <text:p text:style-name="P22">필드명</text:p>
          </table:table-cell>
          <table:table-cell table:style-name="표32.A1" office:value-type="string">
            <text:p text:style-name="P22">데이터 타입</text:p>
          </table:table-cell>
          <table:table-cell table:style-name="표32.A1" office:value-type="string">
            <text:p text:style-name="P22">필수</text:p>
          </table:table-cell>
          <table:table-cell table:style-name="표32.D1" office:value-type="string">
            <text:p text:style-name="P22">설명</text:p>
          </table:table-cell>
        </table:table-row>
        <table:table-row>
          <table:table-cell table:style-name="표32.A2" office:value-type="string">
            <text:p text:style-name="P69">rollout_phases</text:p>
          </table:table-cell>
          <table:table-cell table:style-name="표32.A2" office:value-type="string">
            <text:p text:style-name="P69">List</text:p>
            <text:p text:style-name="P69">[Object]</text:p>
          </table:table-cell>
          <table:table-cell table:style-name="표32.A2" office:value-type="string">
            <text:p text:style-name="P84">o</text:p>
          </table:table-cell>
          <table:table-cell table:style-name="표32.D2" office:value-type="string">
            <text:p text:style-name="P69">단계별 롤아웃 계획을 입력한다.</text:p>
            <text:p text:style-name="P69">각 단계별로 아래 항목을 포함:</text:p>
            <text:p text:style-name="P69">- phase_name: 단계명</text:p>
            <text:p text:style-name="P69">- target_scope: 대상 범위</text:p>
            <text:p text:style-name="P69">- timeline: 일정</text:p>
            <text:p text:style-name="P69">- resources: 필요 자원</text:p>
          </table:table-cell>
        </table:table-row>
        <table:table-row>
          <table:table-cell table:style-name="표32.A2" office:value-type="string">
            <text:p text:style-name="P69">target_coverage</text:p>
          </table:table-cell>
          <table:table-cell table:style-name="표32.A2" office:value-type="string">
            <text:p text:style-name="P69">String</text:p>
          </table:table-cell>
          <table:table-cell table:style-name="표32.A2" office:value-type="string">
            <text:p text:style-name="P90">o</text:p>
          </table:table-cell>
          <table:table-cell table:style-name="표32.D2" office:value-type="string">
            <text:p text:style-name="P69">목표 커버리지를 정의한다.</text:p>
            <text:p text:style-name="P69">최종 확산 목표 범위를 기술한다.</text:p>
            <text:p text:style-name="P69"><text:soft-page-break/>(예: "전사 100% 적용")</text:p>
          </table:table-cell>
        </table:table-row>
        <table:table-row>
          <table:table-cell table:style-name="표32.A2" office:value-type="string">
            <text:p text:style-name="P69">timeline</text:p>
          </table:table-cell>
          <table:table-cell table:style-name="표32.A2" office:value-type="string">
            <text:p text:style-name="P69">String</text:p>
          </table:table-cell>
          <table:table-cell table:style-name="표32.A2" office:value-type="string">
            <text:p text:style-name="P90">o</text:p>
          </table:table-cell>
          <table:table-cell table:style-name="표32.D2" office:value-type="string">
            <text:p text:style-name="P69">전체 일정을 입력한다.</text:p>
            <text:p text:style-name="P69">확산 완료 목표 일정이다.</text:p>
          </table:table-cell>
        </table:table-row>
        <table:table-row>
          <table:table-cell table:style-name="표32.A2" office:value-type="string">
            <text:p text:style-name="P69">resource_plan</text:p>
          </table:table-cell>
          <table:table-cell table:style-name="표32.A2" office:value-type="string">
            <text:p text:style-name="P69">String</text:p>
          </table:table-cell>
          <table:table-cell table:style-name="표32.A2" office:value-type="string">
            <text:p text:style-name="P90">o</text:p>
          </table:table-cell>
          <table:table-cell table:style-name="표32.D2" office:value-type="string">
            <text:p text:style-name="P69">자원 계획을 기술한다.</text:p>
            <text:p text:style-name="P69">- 인력 투입 계획</text:p>
            <text:p text:style-name="P69">- 인프라 확장 계획</text:p>
            <text:p text:style-name="P69">- 예산 계획</text:p>
          </table:table-cell>
        </table:table-row>
        <table:table-row>
          <table:table-cell table:style-name="표32.A2" office:value-type="string">
            <text:p text:style-name="P69">risk_mitigation</text:p>
          </table:table-cell>
          <table:table-cell table:style-name="표32.A2" office:value-type="string">
            <text:p text:style-name="P69">String</text:p>
          </table:table-cell>
          <table:table-cell table:style-name="표32.A2" office:value-type="string">
            <text:p text:style-name="P90">o</text:p>
          </table:table-cell>
          <table:table-cell table:style-name="표32.D2" office:value-type="string">
            <text:p text:style-name="P69">리스크 완화 방안을 기술한다.</text:p>
            <text:p text:style-name="P69">확산 과정에서 예상되는 리스크와 완화 방안을 정의한다.</text:p>
          </table:table-cell>
        </table:table-row>
      </table:table>
      <text:p text:style-name="P127"/>
      <text:p text:style-name="Preformatted_20_Text"><text:span text:style-name="T1">【확산 계획 입력 항목 합계: 5개 필드】</text:span></text:p>
      <text:p text:style-name="Preformatted_20_Text"/>
      <text:p text:style-name="Preformatted_20_Text"/>
      <text:p text:style-name="Preformatted_20_Text"><text:span text:style-name="T4">【 STEP 6 】 Stage 5: 운영, 모니터링 및 개선 (Operate &amp; Optimize)</text:span></text:p>
      <text:p text:style-name="Preformatted_20_Text"/>
      <text:p text:style-name="Preformatted_20_Text"/>
      <text:p text:style-name="Preformatted_20_Text">Stage 5에서는 운영 중인 AI 시스템의 모니터링 체계를 구축하고,지속적 개선을 위한 계획을 수립하며, 거버넌스를 정기 검토한다.</text:p>
      <text:p text:style-name="Preformatted_20_Text"/>
      <text:p text:style-name="Preformatted_20_Text"/>
      <text:p text:style-name="P8">6.1 모니터링 설정 (Monitoring Setup)</text:p>
      <text:p text:style-name="Preformatted_20_Text"/>
      <text:p text:style-name="Preformatted_20_Text">API 엔드포인트: POST /api/v1/framework/projects/{project_id}/stage5/monitoring</text:p>
      <text:p text:style-name="Preformatted_20_Text">요청 모델: MonitoringInput</text:p>
      <text:p text:style-name="Preformatted_20_Text"/>
      <text:p text:style-name="Preformatted_20_Text"/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>
          <table:table-cell table:style-name="표33.A1" office:value-type="string">
            <text:p text:style-name="P23">필드명</text:p>
          </table:table-cell>
          <table:table-cell table:style-name="표33.A1" office:value-type="string">
            <text:p text:style-name="P23">데이터 타입</text:p>
          </table:table-cell>
          <table:table-cell table:style-name="표33.A1" office:value-type="string">
            <text:p text:style-name="P23">필수</text:p>
          </table:table-cell>
          <table:table-cell table:style-name="표33.D1" office:value-type="string">
            <text:p text:style-name="P23">설명</text:p>
          </table:table-cell>
        </table:table-row>
        <table:table-row>
          <table:table-cell table:style-name="표33.A2" office:value-type="string">
            <text:p text:style-name="P70">metrics</text:p>
          </table:table-cell>
          <table:table-cell table:style-name="표33.A2" office:value-type="string">
            <text:p text:style-name="P70">Dict</text:p>
          </table:table-cell>
          <table:table-cell table:style-name="표33.A2" office:value-type="string">
            <text:p text:style-name="P85">o</text:p>
          </table:table-cell>
          <table:table-cell table:style-name="표33.D2" office:value-type="string">
            <text:p text:style-name="P70">모니터링 지표를 정의한다.</text:p>
            <text:p text:style-name="P70">- technical_metrics: 기술 지표</text:p>
            <text:p text:style-name="P70"><text:s/>(지연시간, 처리량, 에러율 등)</text:p>
            <text:p text:style-name="P70">- business_metrics: 비즈니스 지표</text:p>
            <text:p text:style-name="P70"><text:s/>(정확도, 활용률 등)</text:p>
            <text:p text:style-name="P70">- model_metrics: 모델 지표</text:p>
            <text:p text:style-name="P70">(드리프트, 성능 저하 등)</text:p>
          </table:table-cell>
        </table:table-row>
        <table:table-row>
          <table:table-cell table:style-name="표33.A2" office:value-type="string">
            <text:p text:style-name="P70">alert_thresholds</text:p>
          </table:table-cell>
          <table:table-cell table:style-name="표33.A2" office:value-type="string">
            <text:p text:style-name="P70">String</text:p>
          </table:table-cell>
          <table:table-cell table:style-name="표33.A2" office:value-type="string">
            <text:p text:style-name="P91">o</text:p>
          </table:table-cell>
          <table:table-cell table:style-name="표33.D2" office:value-type="string">
            <text:p text:style-name="P70">알림 임계값을 정의한다.</text:p>
            <text:p text:style-name="P70">각 지표별 경고/위험 임계치를 설정한다.</text:p>
          </table:table-cell>
        </table:table-row>
        <table:table-row>
          <table:table-cell table:style-name="표33.A2" office:value-type="string">
            <text:p text:style-name="P70">dashboard_config</text:p>
          </table:table-cell>
          <table:table-cell table:style-name="표33.A2" office:value-type="string">
            <text:p text:style-name="P70">String</text:p>
          </table:table-cell>
          <table:table-cell table:style-name="표33.A2" office:value-type="string">
            <text:p text:style-name="P91">o</text:p>
          </table:table-cell>
          <table:table-cell table:style-name="표33.D2" office:value-type="string">
            <text:p text:style-name="P70">대시보드 설정을 기술한다.</text:p>
            <text:p text:style-name="P70">- 모니터링 대시보드 구성</text:p>
            <text:p text:style-name="P70">- 시각화 항목</text:p>
            <text:p text:style-name="P70">- 접근 권한</text:p>
          </table:table-cell>
        </table:table-row>
        <table:table-row>
          <table:table-cell table:style-name="표33.A2" office:value-type="string">
            <text:p text:style-name="P70">reporting_frequency</text:p>
          </table:table-cell>
          <table:table-cell table:style-name="표33.A2" office:value-type="string">
            <text:p text:style-name="P70">String</text:p>
          </table:table-cell>
          <table:table-cell table:style-name="표33.A2" office:value-type="string">
            <text:p text:style-name="P91">o</text:p>
          </table:table-cell>
          <table:table-cell table:style-name="표33.D2" office:value-type="string">
            <text:p text:style-name="P70">보고 주기를 정의한다.</text:p>
            <text:p text:style-name="P70"><text:s/>(예: "실시간", "일별", "주별")</text:p>
          </table:table-cell>
        </table:table-row>
      </table:table>
      <text:p text:style-name="P128"/>
      <text:p text:style-name="Preformatted_20_Text"/>
      <text:p text:style-name="P1">【모니터링 설정 입력 항목 합계: 4개 필드】</text:p>
      <text:p text:style-name="Preformatted_20_Text"><text:soft-page-break/><text:span text:style-name="T7">6.2 개선 계획 (Improvement Planning)</text:span></text:p>
      <text:p text:style-name="Preformatted_20_Text"/>
      <text:p text:style-name="Preformatted_20_Text">API 엔드포인트: POST /api/v1/framework/projects/{project_id}/stage5/improvement</text:p>
      <text:p text:style-name="Preformatted_20_Text">요청 모델: ImprovementInput</text:p>
      <text:p text:style-name="Preformatted_20_Text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>
          <table:table-cell table:style-name="표34.A1" office:value-type="string">
            <text:p text:style-name="P23">필드명</text:p>
          </table:table-cell>
          <table:table-cell table:style-name="표34.A1" office:value-type="string">
            <text:p text:style-name="P23">데이터 타입</text:p>
          </table:table-cell>
          <table:table-cell table:style-name="표34.A1" office:value-type="string">
            <text:p text:style-name="P23">필수</text:p>
          </table:table-cell>
          <table:table-cell table:style-name="표34.D1" office:value-type="string">
            <text:p text:style-name="P23">설명</text:p>
          </table:table-cell>
        </table:table-row>
        <table:table-row>
          <table:table-cell table:style-name="표34.A2" office:value-type="string">
            <text:p text:style-name="P70">improvement_cycle <text:s/></text:p>
          </table:table-cell>
          <table:table-cell table:style-name="표34.A2" office:value-type="string">
            <text:p text:style-name="P70">String</text:p>
          </table:table-cell>
          <table:table-cell table:style-name="표34.A2" office:value-type="string">
            <text:p text:style-name="P85">o</text:p>
          </table:table-cell>
          <table:table-cell table:style-name="표34.D2" office:value-type="string">
            <text:p text:style-name="P70">개선 사이클을 정의한다.</text:p>
            <text:p text:style-name="P70">지속적 개선을 위한 주기 및 프로세스를 기술한다.</text:p>
            <text:p text:style-name="P70">(예: "월별 리뷰", "분기별 개선")</text:p>
          </table:table-cell>
        </table:table-row>
        <table:table-row>
          <table:table-cell table:style-name="표34.A2" office:value-type="string">
            <text:p text:style-name="P70">feedback_sources </text:p>
          </table:table-cell>
          <table:table-cell table:style-name="표34.A2" office:value-type="string">
            <text:p text:style-name="P70">String </text:p>
          </table:table-cell>
          <table:table-cell table:style-name="표34.A2" office:value-type="string">
            <text:p text:style-name="P91">o</text:p>
          </table:table-cell>
          <table:table-cell table:style-name="표34.D2" office:value-type="string">
            <text:p text:style-name="P70">피드백 소스를 정의한다.</text:p>
            <text:p text:style-name="P70">개선을 위한 피드백 수집 경로를 나열한다.</text:p>
            <text:p text:style-name="P70">(예: 사용자 피드백, 모니터링 데이터, A/B 테스트 결과 등)</text:p>
          </table:table-cell>
        </table:table-row>
        <table:table-row>
          <table:table-cell table:style-name="표34.A2" office:value-type="string">
            <text:p text:style-name="P70">prioritization_criteria</text:p>
          </table:table-cell>
          <table:table-cell table:style-name="표34.A2" office:value-type="string">
            <text:p text:style-name="P70">String </text:p>
          </table:table-cell>
          <table:table-cell table:style-name="표34.A2" office:value-type="string">
            <text:p text:style-name="P91">o</text:p>
          </table:table-cell>
          <table:table-cell table:style-name="표34.D2" office:value-type="string">
            <text:p text:style-name="P70">우선순위 기준을 정의한다.</text:p>
            <text:p text:style-name="P70">개선 과제의 우선순위 결정 기준을 기술한다.</text:p>
          </table:table-cell>
        </table:table-row>
        <table:table-row>
          <table:table-cell table:style-name="표34.A2" office:value-type="string">
            <text:p text:style-name="P70">experiment_framework</text:p>
          </table:table-cell>
          <table:table-cell table:style-name="표34.A2" office:value-type="string">
            <text:p text:style-name="P70">String </text:p>
          </table:table-cell>
          <table:table-cell table:style-name="표34.A2" office:value-type="string">
            <text:p text:style-name="P91">o</text:p>
          </table:table-cell>
          <table:table-cell table:style-name="표34.D2" office:value-type="string">
            <text:p text:style-name="P70">실험 프레임워크를 정의한다.</text:p>
            <text:p text:style-name="P70">A/B 테스트, 다변량 테스트 등 실험 방법론을 기술한다.</text:p>
          </table:table-cell>
        </table:table-row>
        <table:table-row>
          <table:table-cell table:style-name="표34.A2" office:value-type="string">
            <text:p text:style-name="P70">success_metrics</text:p>
          </table:table-cell>
          <table:table-cell table:style-name="표34.A2" office:value-type="string">
            <text:p text:style-name="P70">String </text:p>
          </table:table-cell>
          <table:table-cell table:style-name="표34.A2" office:value-type="string">
            <text:p text:style-name="P91">o</text:p>
          </table:table-cell>
          <table:table-cell table:style-name="표34.D2" office:value-type="string">
            <text:p text:style-name="P70">성공 지표를 정의한다.</text:p>
            <text:p text:style-name="P70">개선 효과 측정을 위한 지표를 정의한다.</text:p>
          </table:table-cell>
        </table:table-row>
      </table:table>
      <text:p text:style-name="P128"/>
      <text:p text:style-name="Preformatted_20_Text"/>
      <text:p text:style-name="P1">【개선 계획 입력 항목 합계: 5개 필드】</text:p>
      <text:p text:style-name="Preformatted_20_Text"/>
      <text:p text:style-name="Preformatted_20_Text"/>
      <text:p text:style-name="P8">6.3 거버넌스 검토 (Governance Review)</text:p>
      <text:p text:style-name="Preformatted_20_Text"/>
      <text:p text:style-name="Preformatted_20_Text">API 엔드포인트: POST /api/v1/framework/projects/{project_id}/stage5/governance-review</text:p>
      <text:p text:style-name="Preformatted_20_Text">요청 모델: GovernanceReviewInput</text:p>
      <text:p text:style-name="Preformatted_20_Text"/>
      <text:p text:style-name="Preformatted_20_Text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>
          <table:table-cell table:style-name="표35.A1" office:value-type="string">
            <text:p text:style-name="P23">필드명</text:p>
          </table:table-cell>
          <table:table-cell table:style-name="표35.A1" office:value-type="string">
            <text:p text:style-name="P23">데이터 타입</text:p>
          </table:table-cell>
          <table:table-cell table:style-name="표35.A1" office:value-type="string">
            <text:p text:style-name="P23">필수</text:p>
          </table:table-cell>
          <table:table-cell table:style-name="표35.D1" office:value-type="string">
            <text:p text:style-name="P23">설명</text:p>
          </table:table-cell>
        </table:table-row>
        <table:table-row>
          <table:table-cell table:style-name="표35.A2" office:value-type="string">
            <text:p text:style-name="P70">review_frequency <text:s/></text:p>
          </table:table-cell>
          <table:table-cell table:style-name="표35.A2" office:value-type="string">
            <text:p text:style-name="P70">String</text:p>
          </table:table-cell>
          <table:table-cell table:style-name="표35.A2" office:value-type="string">
            <text:p text:style-name="P85">o</text:p>
          </table:table-cell>
          <table:table-cell table:style-name="표35.D2" office:value-type="string">
            <text:p text:style-name="P70">검토 주기를 정의한다.</text:p>
            <text:p text:style-name="P70">(예: "분기별", "반기별", "연간")</text:p>
          </table:table-cell>
        </table:table-row>
        <table:table-row>
          <table:table-cell table:style-name="표35.A2" office:value-type="string">
            <text:p text:style-name="P70">review_scope </text:p>
          </table:table-cell>
          <table:table-cell table:style-name="표35.A2" office:value-type="string">
            <text:p text:style-name="P70">String </text:p>
          </table:table-cell>
          <table:table-cell table:style-name="표35.A2" office:value-type="string">
            <text:p text:style-name="P91">o</text:p>
          </table:table-cell>
          <table:table-cell table:style-name="표35.D2" office:value-type="string">
            <text:p text:style-name="P70">검토 범위를 정의한다.</text:p>
            <text:p text:style-name="P70">- 기술 거버넌스 검토 항목</text:p>
            <text:p text:style-name="P71">- 윤리 거버넌스 검토 항목A/B 테스트 </text:p>
            <text:p text:style-name="P71">- 리스크 거버넌스 검토 항목</text:p>
          </table:table-cell>
        </table:table-row>
        <table:table-row>
          <table:table-cell table:style-name="표35.A2" office:value-type="string">
            <text:p text:style-name="P70">audit_checklist </text:p>
          </table:table-cell>
          <table:table-cell table:style-name="표35.A2" office:value-type="string">
            <text:p text:style-name="P70">String </text:p>
          </table:table-cell>
          <table:table-cell table:style-name="표35.A2" office:value-type="string">
            <text:p text:style-name="P91">o</text:p>
          </table:table-cell>
          <table:table-cell table:style-name="표35.D2" office:value-type="string">
            <text:p text:style-name="P71">감사 체크리스트를 정의한다.</text:p>
            <text:p text:style-name="P71">정기 감사 시 확인해야 할 <text:s/>항목 목록이다.</text:p>
          </table:table-cell>
        </table:table-row>
        <table:table-row>
          <table:table-cell table:style-name="표35.A2" office:value-type="string">
            <text:p text:style-name="P70">compliance_updates </text:p>
          </table:table-cell>
          <table:table-cell table:style-name="표35.A2" office:value-type="string">
            <text:p text:style-name="P70">String </text:p>
          </table:table-cell>
          <table:table-cell table:style-name="표35.A2" office:value-type="string">
            <text:p text:style-name="P91">o</text:p>
          </table:table-cell>
          <table:table-cell table:style-name="표35.D2" office:value-type="string">
            <text:p text:style-name="P114">규제 업데이트를 기술한다.</text:p>
            <text:p text:style-name="P129">관련 규제/법규의 변경 사항을 <text:span text:style-name="T14">추적하고 대응 방안을 기술한다.</text:span> <text:span text:style-name="T14"><text:s/></text:span></text:p>
          </table:table-cell>
        </table:table-row>
        <text:soft-page-break/>
        <table:table-row>
          <table:table-cell table:style-name="표35.A2" office:value-type="string">
            <text:p text:style-name="P70">policy_revisions </text:p>
          </table:table-cell>
          <table:table-cell table:style-name="표35.A2" office:value-type="string">
            <text:p text:style-name="P70">String </text:p>
          </table:table-cell>
          <table:table-cell table:style-name="표35.A2" office:value-type="string">
            <text:p text:style-name="P91">o</text:p>
          </table:table-cell>
          <table:table-cell table:style-name="표35.D2" office:value-type="string">
            <text:p text:style-name="P71">정책 개정 사항을 기술한다.</text:p>
            <text:p text:style-name="P71">검토 결과에 따른 정책 개정 필요 사항을 기록한다.</text:p>
          </table:table-cell>
        </table:table-row>
      </table:table>
      <text:p text:style-name="P128"/>
      <text:p text:style-name="Preformatted_20_Text"/>
      <text:p text:style-name="P1">【거버넌스 검토 입력 항목 합계: 5개 필드】</text:p>
      <text:p text:style-name="Preformatted_20_Text"/>
      <text:p text:style-name="Preformatted_20_Text"/>
      <text:p text:style-name="Preformatted_20_Text"/>
      <text:p text:style-name="P4">【 STEP 7 】 추가 분석: MLOps 기술 표준 (제5장)</text:p>
      <text:p text:style-name="Preformatted_20_Text"/>
      <text:p text:style-name="Preformatted_20_Text">API 엔드포인트: POST /api/v1/projects/{project_id}/mlops-standards</text:p>
      <text:p text:style-name="Preformatted_20_Text">요청 모델: SaveMLOpsStandardsRequest</text:p>
      <text:p text:style-name="Preformatted_20_Text"/>
      <text:p text:style-name="Preformatted_20_Text">MLOps 기술 표준은 AI 플랫폼 구축 시 적용할 기술 표준을 정의한다. 각 섹션별로 상세 입력 항목이 존재한다.</text:p>
      <text:p text:style-name="Preformatted_20_Text"/>
      <text:p text:style-name="P8"/>
      <text:p text:style-name="P8">7.1 데이터 관리 및 준비 (Section 5.2)</text:p>
      <text:p text:style-name="Preformatted_20_Text"/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row>
          <table:table-cell table:style-name="표36.A1" office:value-type="string">
            <text:p text:style-name="P24">필드명</text:p>
          </table:table-cell>
          <table:table-cell table:style-name="표36.A1" office:value-type="string">
            <text:p text:style-name="P24">데이터 타입</text:p>
          </table:table-cell>
          <table:table-cell table:style-name="표36.A1" office:value-type="string">
            <text:p text:style-name="P24">필수</text:p>
          </table:table-cell>
          <table:table-cell table:style-name="표36.D1" office:value-type="string">
            <text:p text:style-name="P24">설명</text:p>
          </table:table-cell>
        </table:table-row>
        <table:table-row>
          <table:table-cell table:style-name="표36.A2" office:value-type="string">
            <text:p text:style-name="P72">data_collection_api_type</text:p>
          </table:table-cell>
          <table:table-cell table:style-name="표36.A2" office:value-type="string">
            <text:p text:style-name="P72">String</text:p>
          </table:table-cell>
          <table:table-cell table:style-name="표36.A2" office:value-type="string">
            <text:p text:style-name="P86">o</text:p>
          </table:table-cell>
          <table:table-cell table:style-name="표36.D2" office:value-type="string">
            <text:p text:style-name="P72">데이터 수집 API/커넥터 유형을 선택한다. (예: REST API, JDBC, Kafka Connector 등)</text:p>
          </table:table-cell>
        </table:table-row>
        <table:table-row>
          <table:table-cell table:style-name="표36.A2" office:value-type="string">
            <text:p text:style-name="P72">data_lake_warehouse_type</text:p>
          </table:table-cell>
          <table:table-cell table:style-name="표36.A2" office:value-type="string">
            <text:p text:style-name="P72">String </text:p>
          </table:table-cell>
          <table:table-cell table:style-name="표36.A2" office:value-type="string">
            <text:p text:style-name="P92">o</text:p>
          </table:table-cell>
          <table:table-cell table:style-name="표36.D2" office:value-type="string">
            <text:p text:style-name="P72">데이터 레이크/웨어하우스 유형을 선택한다.</text:p>
            <text:p text:style-name="P72"><text:s/>(예: Delta Lake, Snowflake, <text:s/>BigQuery 등)</text:p>
          </table:table-cell>
        </table:table-row>
        <table:table-row>
          <table:table-cell table:style-name="표36.A2" office:value-type="string">
            <text:p text:style-name="P72">data_pipeline_tool <text:s/></text:p>
          </table:table-cell>
          <table:table-cell table:style-name="표36.A2" office:value-type="string">
            <text:p text:style-name="P72">String </text:p>
          </table:table-cell>
          <table:table-cell table:style-name="표36.A2" office:value-type="string">
            <text:p text:style-name="P92">o</text:p>
          </table:table-cell>
          <table:table-cell table:style-name="표36.D2" office:value-type="string">
            <text:p text:style-name="P72">데이터 파이프라인 도구를 선택한다.</text:p>
            <text:p text:style-name="P72">(예: Airflow, Spark, Prefect, Dagster 등)</text:p>
          </table:table-cell>
        </table:table-row>
        <table:table-row>
          <table:table-cell table:style-name="표36.A2" office:value-type="string">
            <text:p text:style-name="P72">data_validation_enabled</text:p>
          </table:table-cell>
          <table:table-cell table:style-name="표36.A2" office:value-type="string">
            <text:p text:style-name="P72">String </text:p>
          </table:table-cell>
          <table:table-cell table:style-name="표36.A2" office:value-type="string">
            <text:p text:style-name="P92">o</text:p>
          </table:table-cell>
          <table:table-cell table:style-name="표36.D2" office:value-type="string">
            <text:p text:style-name="P115">규제 업데이트를 기술한다.</text:p>
            <text:p text:style-name="P130">관련 규제/법규의 변경 사항을 <text:span text:style-name="T14">추적하고 대응 방안을 기술한다.</text:span> <text:span text:style-name="T14"><text:s/></text:span></text:p>
          </table:table-cell>
        </table:table-row>
        <table:table-row>
          <table:table-cell table:style-name="표36.A2" office:value-type="string">
            <text:p text:style-name="P72">data_validation_enabled </text:p>
          </table:table-cell>
          <table:table-cell table:style-name="표36.A2" office:value-type="string">
            <text:p text:style-name="P72">Boolean </text:p>
          </table:table-cell>
          <table:table-cell table:style-name="표36.A2" office:value-type="string">
            <text:p text:style-name="P92">o</text:p>
          </table:table-cell>
          <table:table-cell table:style-name="표36.D2" office:value-type="string">
            <text:p text:style-name="P72">데이터 검증 자동화 활성화 여부를 선택한다.</text:p>
          </table:table-cell>
        </table:table-row>
        <table:table-row>
          <table:table-cell table:style-name="표36.A2" office:value-type="string">
            <text:p text:style-name="P72">schema_validation</text:p>
          </table:table-cell>
          <table:table-cell table:style-name="표36.A2" office:value-type="string">
            <text:p text:style-name="P72">Boolean</text:p>
          </table:table-cell>
          <table:table-cell table:style-name="표36.A2" office:value-type="string">
            <text:p text:style-name="P93">o</text:p>
          </table:table-cell>
          <table:table-cell table:style-name="표36.D2" office:value-type="string">
            <text:p text:style-name="P72">스키마 검증 활성화 여부를 선택한다.</text:p>
          </table:table-cell>
        </table:table-row>
        <table:table-row>
          <table:table-cell table:style-name="표36.A2" office:value-type="string">
            <text:p text:style-name="P72">statistical_validation</text:p>
          </table:table-cell>
          <table:table-cell table:style-name="표36.A2" office:value-type="string">
            <text:p text:style-name="P72">Boolean</text:p>
          </table:table-cell>
          <table:table-cell table:style-name="표36.A2" office:value-type="string">
            <text:p text:style-name="P93">o</text:p>
          </table:table-cell>
          <table:table-cell table:style-name="표36.D2" office:value-type="string">
            <text:p text:style-name="P72">통계적 분포 검증 활성화 여부를 선택한다</text:p>
          </table:table-cell>
        </table:table-row>
        <table:table-row>
          <table:table-cell table:style-name="표36.A2" office:value-type="string">
            <text:p text:style-name="P72">quality_threshold</text:p>
          </table:table-cell>
          <table:table-cell table:style-name="표36.A2" office:value-type="string">
            <text:p text:style-name="P72">Float</text:p>
          </table:table-cell>
          <table:table-cell table:style-name="표36.A2" office:value-type="string">
            <text:p text:style-name="P93">o</text:p>
          </table:table-cell>
          <table:table-cell table:style-name="표36.D2" office:value-type="string">
            <text:p text:style-name="P72">품질 임계값을 설정한다.</text:p>
            <text:p text:style-name="P72">(0.0~1.0, 예: 0.95)</text:p>
          </table:table-cell>
        </table:table-row>
        <table:table-row>
          <table:table-cell table:style-name="표36.A2" office:value-type="string">
            <text:p text:style-name="P72">feature_store_enabled</text:p>
          </table:table-cell>
          <table:table-cell table:style-name="표36.A2" office:value-type="string">
            <text:p text:style-name="P72">Boolean</text:p>
          </table:table-cell>
          <table:table-cell table:style-name="표36.A2" office:value-type="string">
            <text:p text:style-name="P93">o</text:p>
          </table:table-cell>
          <table:table-cell table:style-name="표36.D2" office:value-type="string">
            <text:p text:style-name="P72">Feature Store 구축 여부를 선택한다.</text:p>
          </table:table-cell>
        </table:table-row>
        <table:table-row>
          <table:table-cell table:style-name="표36.A2" office:value-type="string">
            <text:p text:style-name="P72">feature_store_tool</text:p>
          </table:table-cell>
          <table:table-cell table:style-name="표36.A2" office:value-type="string">
            <text:p text:style-name="P72">String </text:p>
          </table:table-cell>
          <table:table-cell table:style-name="표36.A2" office:value-type="string">
            <text:p text:style-name="P93">o</text:p>
          </table:table-cell>
          <table:table-cell table:style-name="표36.D2" office:value-type="string">
            <text:p text:style-name="P72">Feature Store 도구를 선택한다. (Feast, Tecton, Hopsworks 등)</text:p>
          </table:table-cell>
        </table:table-row>
        <table:table-row>
          <table:table-cell table:style-name="표36.A2" office:value-type="string">
            <text:p text:style-name="P72">data_versioning_enabled</text:p>
          </table:table-cell>
          <table:table-cell table:style-name="표36.A2" office:value-type="string">
            <text:p text:style-name="P72">Boolean</text:p>
          </table:table-cell>
          <table:table-cell table:style-name="표36.A2" office:value-type="string">
            <text:p text:style-name="P93">o</text:p>
          </table:table-cell>
          <table:table-cell table:style-name="표36.D2" office:value-type="string">
            <text:p text:style-name="P72">데이터 버전 관리 활성화 <text:s/>여부를 선택한다.</text:p>
          </table:table-cell>
        </table:table-row>
        <table:table-row>
          <table:table-cell table:style-name="표36.A2" office:value-type="string">
            <text:p text:style-name="P72">dvc_tool</text:p>
          </table:table-cell>
          <table:table-cell table:style-name="표36.A2" office:value-type="string">
            <text:p text:style-name="P72">String </text:p>
          </table:table-cell>
          <table:table-cell table:style-name="표36.A2" office:value-type="string">
            <text:p text:style-name="P92">-</text:p>
          </table:table-cell>
          <table:table-cell table:style-name="표36.D2" office:value-type="string">
            <text:p text:style-name="P72">데이터 버전 관리 도구를 <text:s/>선택한다. (DVC, LakeFS, Delta Lake 등)</text:p>
          </table:table-cell>
        </table:table-row>
      </table:table>
      <text:p text:style-name="Preformatted_20_Text"><text:soft-page-break/><text:span text:style-name="T7">7.2 모델 개발 및 훈련 (Section 5.3)</text:span></text:p>
      <text:p text:style-name="Preformatted_20_Text"/>
      <table:table table:name="표37" table:style-name="표37">
        <table:table-column table:style-name="표37.A"/>
        <table:table-column table:style-name="표37.B"/>
        <table:table-column table:style-name="표37.C"/>
        <table:table-column table:style-name="표37.D"/>
        <table:table-row>
          <table:table-cell table:style-name="표37.A1" office:value-type="string">
            <text:p text:style-name="P24">필드명</text:p>
          </table:table-cell>
          <table:table-cell table:style-name="표37.A1" office:value-type="string">
            <text:p text:style-name="P24">데이터 타입</text:p>
          </table:table-cell>
          <table:table-cell table:style-name="표37.A1" office:value-type="string">
            <text:p text:style-name="P24">필수</text:p>
          </table:table-cell>
          <table:table-cell table:style-name="표37.D1" office:value-type="string">
            <text:p text:style-name="P24">설명</text:p>
          </table:table-cell>
        </table:table-row>
        <table:table-row>
          <table:table-cell table:style-name="표37.A2" office:value-type="string">
            <text:p text:style-name="P73">containerized_environment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86">o</text:p>
          </table:table-cell>
          <table:table-cell table:style-name="표37.D2" office:value-type="string">
            <text:p text:style-name="P73">컨테이너화된 개발 환경 보유 여부를 선택한다.</text:p>
          </table:table-cell>
        </table:table-row>
        <table:table-row>
          <table:table-cell table:style-name="표37.A2" office:value-type="string">
            <text:p text:style-name="P73">container_platform</text:p>
          </table:table-cell>
          <table:table-cell table:style-name="표37.A2" office:value-type="string">
            <text:p text:style-name="P73">String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컨테이너 플랫폼을 선택한다.</text:p>
            <text:p text:style-name="P73">(Docker, Kubernetes 등)</text:p>
          </table:table-cell>
        </table:table-row>
        <table:table-row>
          <table:table-cell table:style-name="표37.A2" office:value-type="string">
            <text:p text:style-name="P73">experiment_tracking_enabled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실험 관리 활성화 여부를 선택한다.</text:p>
          </table:table-cell>
        </table:table-row>
        <table:table-row>
          <table:table-cell table:style-name="표37.A2" office:value-type="string">
            <text:p text:style-name="P73">experiment_tracking_tool</text:p>
          </table:table-cell>
          <table:table-cell table:style-name="표37.A2" office:value-type="string">
            <text:p text:style-name="P73">String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실험 관리 도구를 선택한다.</text:p>
            <text:p text:style-name="P73">(MLflow, Weights &amp; Biases, <text:s/>Neptune 등)</text:p>
          </table:table-cell>
        </table:table-row>
        <table:table-row>
          <table:table-cell table:style-name="표37.A2" office:value-type="string">
            <text:p text:style-name="P73">param_auto_logging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파라미터 자동 로깅 활성화 여부를 선택한다.</text:p>
          </table:table-cell>
        </table:table-row>
        <table:table-row>
          <table:table-cell table:style-name="표37.A2" office:value-type="string">
            <text:p text:style-name="P73">metric_auto_logging 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메트릭 자동 로깅 활성화 여부를 선택한다.</text:p>
          </table:table-cell>
        </table:table-row>
        <table:table-row table:style-name="표37.8">
          <table:table-cell table:style-name="표37.A2" office:value-type="string">
            <text:p text:style-name="P73">artifact_auto_logging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아티팩트 자동 로깅 활성화 여부를 선택한다.</text:p>
          </table:table-cell>
        </table:table-row>
        <table:table-row>
          <table:table-cell table:style-name="표37.A2" office:value-type="string">
            <text:p text:style-name="P73">model_registry_enabled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모델 레지스트리 구축 여부를 선택한다.</text:p>
          </table:table-cell>
        </table:table-row>
        <table:table-row>
          <table:table-cell table:style-name="표37.A2" office:value-type="string">
            <text:p text:style-name="P73">model_metadata_tracking 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모델 메타데이터 추적 활성화 여부를 선택한다.</text:p>
          </table:table-cell>
        </table:table-row>
        <table:table-row>
          <table:table-cell table:style-name="표37.A2" office:value-type="string">
            <text:p text:style-name="P73">hpo_enabled </text:p>
          </table:table-cell>
          <table:table-cell table:style-name="표37.A2" office:value-type="string">
            <text:p text:style-name="P73">Boolean</text:p>
          </table:table-cell>
          <table:table-cell table:style-name="표37.A2" office:value-type="string">
            <text:p text:style-name="P94">o</text:p>
          </table:table-cell>
          <table:table-cell table:style-name="표37.D2" office:value-type="string">
            <text:p text:style-name="P73">하이퍼파라미터 최적화(HPO) 자동화 활성화 여부를 선택한다.</text:p>
          </table:table-cell>
        </table:table-row>
        <table:table-row>
          <table:table-cell table:style-name="표37.A2" office:value-type="string">
            <text:p text:style-name="P73">hpo_tool <text:s/></text:p>
          </table:table-cell>
          <table:table-cell table:style-name="표37.A2" office:value-type="string">
            <text:p text:style-name="P73">String</text:p>
          </table:table-cell>
          <table:table-cell table:style-name="표37.A2" office:value-type="string">
            <text:p text:style-name="P86">-</text:p>
          </table:table-cell>
          <table:table-cell table:style-name="표37.D2" office:value-type="string">
            <text:p text:style-name="P73">HPO 도구를 선택한다.</text:p>
            <text:p text:style-name="P73">(Optuna, Ray Tune, Hyperopt 등)</text:p>
          </table:table-cell>
        </table:table-row>
      </table:table>
      <text:p text:style-name="P131"/>
      <text:p text:style-name="P8"/>
      <text:p text:style-name="P8">7.3 모델 평가 및 검증 (Section 5.4)</text:p>
      <text:p text:style-name="Preformatted_20_Text"/>
      <table:table table:name="표38" table:style-name="표38">
        <table:table-column table:style-name="표38.A"/>
        <table:table-column table:style-name="표38.B"/>
        <table:table-column table:style-name="표38.C"/>
        <table:table-column table:style-name="표38.D"/>
        <table:table-row>
          <table:table-cell table:style-name="표38.A1" office:value-type="string">
            <text:p text:style-name="P25">필드명</text:p>
          </table:table-cell>
          <table:table-cell table:style-name="표38.A1" office:value-type="string">
            <text:p text:style-name="P25">데이터 타입</text:p>
          </table:table-cell>
          <table:table-cell table:style-name="표38.A1" office:value-type="string">
            <text:p text:style-name="P25">필수</text:p>
          </table:table-cell>
          <table:table-cell table:style-name="표38.D1" office:value-type="string">
            <text:p text:style-name="P25">설명</text:p>
          </table:table-cell>
        </table:table-row>
        <table:table-row>
          <table:table-cell table:style-name="표38.A2" office:value-type="string">
            <text:p text:style-name="P73">auto_evaluation_enabled 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자동 평가 활성화 여부를 선택한다.</text:p>
          </table:table-cell>
        </table:table-row>
        <table:table-row>
          <table:table-cell table:style-name="표38.A2" office:value-type="string">
            <text:p text:style-name="P73">technical_metrics</text:p>
          </table:table-cell>
          <table:table-cell table:style-name="표38.A2" office:value-type="string">
            <text:p text:style-name="P73">List</text:p>
            <text:p text:style-name="P73">[String]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기술 지표 목록을 선택한다.</text:p>
            <text:p text:style-name="P74">(예: F1-Score, AUC-ROC, RMSE, MAE 등)</text:p>
          </table:table-cell>
        </table:table-row>
        <table:table-row>
          <table:table-cell table:style-name="표38.A2" office:value-type="string">
            <text:p text:style-name="P73">business_metrics</text:p>
          </table:table-cell>
          <table:table-cell table:style-name="표38.A2" office:value-type="string">
            <text:p text:style-name="P73">List</text:p>
            <text:p text:style-name="P73">[String]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비즈니스 지표 목록을 선택한다. (예: ROI, 전환율, 비용 절감액 등)</text:p>
          </table:table-cell>
        </table:table-row>
        <table:table-row>
          <table:table-cell table:style-name="표38.A2" office:value-type="string">
            <text:p text:style-name="P73">xai_enabled 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XAI(설명 가능 AI) 적용 여부를 선택한다.</text:p>
          </table:table-cell>
        </table:table-row>
        <table:table-row>
          <table:table-cell table:style-name="표38.A2" office:value-type="string">
            <text:p text:style-name="P73">xai_methods</text:p>
          </table:table-cell>
          <table:table-cell table:style-name="표38.A2" office:value-type="string">
            <text:p text:style-name="P73">List</text:p>
            <text:p text:style-name="P73">[String]</text:p>
          </table:table-cell>
          <table:table-cell table:style-name="표38.A2" office:value-type="string">
            <text:p text:style-name="P94">-</text:p>
          </table:table-cell>
          <table:table-cell table:style-name="표38.D2" office:value-type="string">
            <text:p text:style-name="P74">XAI 기법 목록을 선택한다.</text:p>
            <text:p text:style-name="P74">(SHAP, LIME, Captum 등)</text:p>
          </table:table-cell>
        </table:table-row>
        <table:table-row>
          <table:table-cell table:style-name="표38.A2" office:value-type="string">
            <text:p text:style-name="P73">feature_importance_tracking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특성 중요도 추적 활성화 여부를 선택한다.</text:p>
          </table:table-cell>
        </table:table-row>
        <table:table-row table:style-name="표38.8">
          <table:table-cell table:style-name="표38.A2" office:value-type="string">
            <text:p text:style-name="P73">robustness_testing_enabled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견고성 테스트 활성화 여부를 선택한다.</text:p>
          </table:table-cell>
        </table:table-row>
        <table:table-row>
          <table:table-cell table:style-name="표38.A2" office:value-type="string">
            <text:p text:style-name="P73">edge_case_testing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엣지 케이스 테스트 활성화 여부를 선택한다. </text:p>
          </table:table-cell>
        </table:table-row>
        <text:soft-page-break/>
        <table:table-row>
          <table:table-cell table:style-name="표38.A2" office:value-type="string">
            <text:p text:style-name="P73">ethics_risk_testing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윤리/위험 테스트 활성화 여부를 선택한다.</text:p>
          </table:table-cell>
        </table:table-row>
        <table:table-row>
          <table:table-cell table:style-name="표38.A2" office:value-type="string">
            <text:p text:style-name="P73">deployment_gate_enabled 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94">o</text:p>
          </table:table-cell>
          <table:table-cell table:style-name="표38.D2" office:value-type="string">
            <text:p text:style-name="P74">배포 승인 게이트 활성화 여부를 선택한다.</text:p>
          </table:table-cell>
        </table:table-row>
        <table:table-row>
          <table:table-cell table:style-name="표38.A2" office:value-type="string">
            <text:p text:style-name="P73">minimum_performance_threshold</text:p>
          </table:table-cell>
          <table:table-cell table:style-name="표38.A2" office:value-type="string">
            <text:p text:style-name="P73">Boolean</text:p>
          </table:table-cell>
          <table:table-cell table:style-name="표38.A2" office:value-type="string">
            <text:p text:style-name="P87">-</text:p>
          </table:table-cell>
          <table:table-cell table:style-name="표38.D2" office:value-type="string">
            <text:p text:style-name="P74">최소 성능 기준값을 설정한다.</text:p>
            <text:p text:style-name="P74">(예: 0.85)</text:p>
          </table:table-cell>
        </table:table-row>
      </table:table>
      <text:p text:style-name="P132"/>
      <text:p text:style-name="Preformatted_20_Text"><text:span text:style-name="T7"/></text:p>
      <text:p text:style-name="Preformatted_20_Text"><text:span text:style-name="T7">7.4 모델 배포 및 서비스 (Section 5.5)</text:span></text:p>
      <text:p text:style-name="Preformatted_20_Text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row>
          <table:table-cell table:style-name="표39.A1" office:value-type="string">
            <text:p text:style-name="P26">필드명</text:p>
          </table:table-cell>
          <table:table-cell table:style-name="표39.A1" office:value-type="string">
            <text:p text:style-name="P26">데이터 타입</text:p>
          </table:table-cell>
          <table:table-cell table:style-name="표39.A1" office:value-type="string">
            <text:p text:style-name="P26">필수</text:p>
          </table:table-cell>
          <table:table-cell table:style-name="표39.D1" office:value-type="string">
            <text:p text:style-name="P26">설명</text:p>
          </table:table-cell>
        </table:table-row>
        <table:table-row>
          <table:table-cell table:style-name="표39.A2" office:value-type="string">
            <text:p text:style-name="P75">cd_pipeline_enabled</text:p>
          </table:table-cell>
          <table:table-cell table:style-name="표39.A2" office:value-type="string">
            <text:p text:style-name="P75">Boolean</text:p>
          </table:table-cell>
          <table:table-cell table:style-name="표39.A2" office:value-type="string">
            <text:p text:style-name="P97">o</text:p>
          </table:table-cell>
          <table:table-cell table:style-name="표39.D2" office:value-type="string">
            <text:p text:style-name="P75">CD 파이프라인 구축 여부를 선택한다.</text:p>
          </table:table-cell>
        </table:table-row>
        <table:table-row>
          <table:table-cell table:style-name="표39.A2" office:value-type="string">
            <text:p text:style-name="P75">cd_tool <text:s/></text:p>
          </table:table-cell>
          <table:table-cell table:style-name="표39.A2" office:value-type="string">
            <text:p text:style-name="P75">String</text:p>
          </table:table-cell>
          <table:table-cell table:style-name="표39.A2" office:value-type="string">
            <text:p text:style-name="P95">-</text:p>
          </table:table-cell>
          <table:table-cell table:style-name="표39.D2" office:value-type="string">
            <text:p text:style-name="P75">CD 도구를 선택한다.</text:p>
            <text:p text:style-name="P75">(Jenkins, GitLab CI, Argo CD, GitHub Actions 등)</text:p>
          </table:table-cell>
        </table:table-row>
        <table:table-row>
          <table:table-cell table:style-name="표39.A2" office:value-type="string">
            <text:p text:style-name="P75">auto_deployment_enabled</text:p>
          </table:table-cell>
          <table:table-cell table:style-name="표39.A2" office:value-type="string">
            <text:p text:style-name="P75">Boolean</text:p>
          </table:table-cell>
          <table:table-cell table:style-name="표39.A2" office:value-type="string">
            <text:p text:style-name="P97">o</text:p>
          </table:table-cell>
          <table:table-cell table:style-name="표39.D2" office:value-type="string">
            <text:p text:style-name="P75">자동 배포 활성화 여부를 선택한다.</text:p>
          </table:table-cell>
        </table:table-row>
        <table:table-row>
          <table:table-cell table:style-name="표39.A2" office:value-type="string">
            <text:p text:style-name="P75">api_type </text:p>
          </table:table-cell>
          <table:table-cell table:style-name="표39.A2" office:value-type="string">
            <text:p text:style-name="P75">String</text:p>
          </table:table-cell>
          <table:table-cell table:style-name="표39.A2" office:value-type="string">
            <text:p text:style-name="P97">o</text:p>
          </table:table-cell>
          <table:table-cell table:style-name="표39.D2" office:value-type="string">
            <text:p text:style-name="P75">API 유형을 선택한다.</text:p>
            <text:p text:style-name="P75">(REST, gRPC, GraphQL 등)</text:p>
          </table:table-cell>
        </table:table-row>
        <table:table-row>
          <table:table-cell table:style-name="표39.A2" office:value-type="string">
            <text:p text:style-name="P75">api_gateway</text:p>
          </table:table-cell>
          <table:table-cell table:style-name="표39.A2" office:value-type="string">
            <text:p text:style-name="P75">String</text:p>
          </table:table-cell>
          <table:table-cell table:style-name="표39.A2" office:value-type="string">
            <text:p text:style-name="P95">-</text:p>
          </table:table-cell>
          <table:table-cell table:style-name="표39.D2" office:value-type="string">
            <text:p text:style-name="P75">API Gateway를 선택한다.</text:p>
            <text:p text:style-name="P75">(Kong, AWS API Gateway, Apigee 등)</text:p>
          </table:table-cell>
        </table:table-row>
        <table:table-row>
          <table:table-cell table:style-name="표39.A2" office:value-type="string">
            <text:p text:style-name="P75">load_balancer</text:p>
          </table:table-cell>
          <table:table-cell table:style-name="표39.A2" office:value-type="string">
            <text:p text:style-name="P75">String</text:p>
          </table:table-cell>
          <table:table-cell table:style-name="표39.A2" office:value-type="string">
            <text:p text:style-name="P95">-</text:p>
          </table:table-cell>
          <table:table-cell table:style-name="표39.D2" office:value-type="string">
            <text:p text:style-name="P75">로드 밸런서를 선택한다.</text:p>
            <text:p text:style-name="P75">(Nginx, HAProxy, AWS ELB 등)</text:p>
          </table:table-cell>
        </table:table-row>
        <table:table-row table:style-name="표39.8">
          <table:table-cell table:style-name="표39.A2" office:value-type="string">
            <text:p text:style-name="P75">deployment_strategy </text:p>
          </table:table-cell>
          <table:table-cell table:style-name="표39.A2" office:value-type="string">
            <text:p text:style-name="P75">String</text:p>
          </table:table-cell>
          <table:table-cell table:style-name="표39.A2" office:value-type="string">
            <text:p text:style-name="P97">o</text:p>
          </table:table-cell>
          <table:table-cell table:style-name="표39.D2" office:value-type="string">
            <text:p text:style-name="P75">배포 전략을 선택한다.</text:p>
            <text:p text:style-name="P75">(Canary, Blue/Green, Rolling, Shadow 등)</text:p>
          </table:table-cell>
        </table:table-row>
        <table:table-row>
          <table:table-cell table:style-name="표39.A2" office:value-type="string">
            <text:p text:style-name="P75">canary_percentage</text:p>
          </table:table-cell>
          <table:table-cell table:style-name="표39.A2" office:value-type="string">
            <text:p text:style-name="P75">Float</text:p>
          </table:table-cell>
          <table:table-cell table:style-name="표39.A2" office:value-type="string">
            <text:p text:style-name="P97">-</text:p>
          </table:table-cell>
          <table:table-cell table:style-name="표39.D2" office:value-type="string">
            <text:p text:style-name="P75">Canary 배포 비율을 설정한다.</text:p>
            <text:p text:style-name="P75">(예: 0.1 <text:s/>10%)</text:p>
          </table:table-cell>
        </table:table-row>
        <table:table-row>
          <table:table-cell table:style-name="표39.A2" office:value-type="string">
            <text:p text:style-name="P75">auto_rollback_enabled</text:p>
          </table:table-cell>
          <table:table-cell table:style-name="표39.A2" office:value-type="string">
            <text:p text:style-name="P75">Boolean</text:p>
          </table:table-cell>
          <table:table-cell table:style-name="표39.A2" office:value-type="string">
            <text:p text:style-name="P97">o</text:p>
          </table:table-cell>
          <table:table-cell table:style-name="표39.D2" office:value-type="string">
            <text:p text:style-name="P75">자동 롤백 활성화 여부를 선택한다.</text:p>
          </table:table-cell>
        </table:table-row>
        <table:table-row>
          <table:table-cell table:style-name="표39.A2" office:value-type="string">
            <text:p text:style-name="P75">ab_testing_enabled </text:p>
          </table:table-cell>
          <table:table-cell table:style-name="표39.A2" office:value-type="string">
            <text:p text:style-name="P75">Boolean</text:p>
          </table:table-cell>
          <table:table-cell table:style-name="표39.A2" office:value-type="string">
            <text:p text:style-name="P97">o</text:p>
          </table:table-cell>
          <table:table-cell table:style-name="표39.D2" office:value-type="string">
            <text:p text:style-name="P75">A/B 테스트 지원 활성화 여부를 선택한다.</text:p>
          </table:table-cell>
        </table:table-row>
        <table:table-row>
          <table:table-cell table:style-name="표39.A2" office:value-type="string">
            <text:p text:style-name="P75">traffic_split_tool</text:p>
          </table:table-cell>
          <table:table-cell table:style-name="표39.A2" office:value-type="string">
            <text:p text:style-name="P75">String</text:p>
          </table:table-cell>
          <table:table-cell table:style-name="표39.A2" office:value-type="string">
            <text:p text:style-name="P88">-</text:p>
          </table:table-cell>
          <table:table-cell table:style-name="표39.D2" office:value-type="string">
            <text:p text:style-name="P75">트래픽 분할 도구를 선택한다.</text:p>
            <text:p text:style-name="P75">(Istio, Envoy 등)</text:p>
          </table:table-cell>
        </table:table-row>
      </table:table>
      <text:p text:style-name="P133"/>
      <text:p text:style-name="Preformatted_20_Text"/>
      <text:p text:style-name="P8">7.5 모델 모니터링 및 재학습 (Section 5.6)</text:p>
      <text:p text:style-name="Preformatted_20_Text"/>
      <table:table table:name="표40" table:style-name="표40">
        <table:table-column table:style-name="표40.A"/>
        <table:table-column table:style-name="표40.B"/>
        <table:table-column table:style-name="표40.C"/>
        <table:table-column table:style-name="표40.D"/>
        <table:table-row>
          <table:table-cell table:style-name="표40.A1" office:value-type="string">
            <text:p text:style-name="P27">필드명</text:p>
          </table:table-cell>
          <table:table-cell table:style-name="표40.A1" office:value-type="string">
            <text:p text:style-name="P27">데이터 타입</text:p>
          </table:table-cell>
          <table:table-cell table:style-name="표40.A1" office:value-type="string">
            <text:p text:style-name="P27">필수</text:p>
          </table:table-cell>
          <table:table-cell table:style-name="표40.D1" office:value-type="string">
            <text:p text:style-name="P27">설명</text:p>
          </table:table-cell>
        </table:table-row>
        <table:table-row>
          <table:table-cell table:style-name="표40.A2" office:value-type="string">
            <text:p text:style-name="P76">realtime_monitoring_enabled</text:p>
          </table:table-cell>
          <table:table-cell table:style-name="표40.A2" office:value-type="string">
            <text:p text:style-name="P76">Boolean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실시간 모니터링 활성화 여부를 선택한다.</text:p>
          </table:table-cell>
        </table:table-row>
        <table:table-row>
          <table:table-cell table:style-name="표40.A2" office:value-type="string">
            <text:p text:style-name="P76">latency_tracking</text:p>
          </table:table-cell>
          <table:table-cell table:style-name="표40.A2" office:value-type="string">
            <text:p text:style-name="P76">Boolean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응답 지연 시간 추적 활성화 여부를 선택한다.</text:p>
          </table:table-cell>
        </table:table-row>
        <table:table-row>
          <table:table-cell table:style-name="표40.A2" office:value-type="string">
            <text:p text:style-name="P76">throughput_tracking</text:p>
          </table:table-cell>
          <table:table-cell table:style-name="표40.A2" office:value-type="string">
            <text:p text:style-name="P76">Boolean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처리량 추적 활성화 여부를 선택한다.</text:p>
          </table:table-cell>
        </table:table-row>
        <table:table-row>
          <table:table-cell table:style-name="표40.A2" office:value-type="string">
            <text:p text:style-name="P76">error_rate_tracking</text:p>
          </table:table-cell>
          <table:table-cell table:style-name="표40.A2" office:value-type="string">
            <text:p text:style-name="P76">Boolean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오류율 추적 활성화 여부를 선택한다.</text:p>
          </table:table-cell>
        </table:table-row>
        <table:table-row>
          <table:table-cell table:style-name="표40.A2" office:value-type="string">
            <text:p text:style-name="P76">accuracy_tracking</text:p>
          </table:table-cell>
          <table:table-cell table:style-name="표40.A2" office:value-type="string">
            <text:p text:style-name="P76">Boolean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정확도 추적 활성화 여부를 선택한다.</text:p>
          </table:table-cell>
        </table:table-row>
        <text:soft-page-break/>
        <table:table-row>
          <table:table-cell table:style-name="표40.A2" office:value-type="string">
            <text:p text:style-name="P76">monitoring_tool</text:p>
          </table:table-cell>
          <table:table-cell table:style-name="표40.A2" office:value-type="string">
            <text:p text:style-name="P76">String </text:p>
          </table:table-cell>
          <table:table-cell table:style-name="표40.A2" office:value-type="string">
            <text:p text:style-name="P96">-</text:p>
          </table:table-cell>
          <table:table-cell table:style-name="표40.D2" office:value-type="string">
            <text:p text:style-name="P76">모니터링 도구를 선택한다.</text:p>
            <text:p text:style-name="P76">(Prometheus, Grafana, Datadog, New Relic 등)</text:p>
          </table:table-cell>
        </table:table-row>
        <table:table-row table:style-name="표40.8">
          <table:table-cell table:style-name="표40.A2" office:value-type="string">
            <text:p text:style-name="P76">data_drift_detection</text:p>
          </table:table-cell>
          <table:table-cell table:style-name="표40.A2" office:value-type="string">
            <text:p text:style-name="P76">Boolean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데이터 드리프트 감지 활성화 여부를 선택한다.</text:p>
          </table:table-cell>
        </table:table-row>
        <table:table-row>
          <table:table-cell table:style-name="표40.A2" office:value-type="string">
            <text:p text:style-name="P76">concept_drift_detection</text:p>
          </table:table-cell>
          <table:table-cell table:style-name="표40.A2" office:value-type="string">
            <text:p text:style-name="P76">Boolean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개념 드리프트 감지 활성화 여부를 선택한다.</text:p>
          </table:table-cell>
        </table:table-row>
        <table:table-row>
          <table:table-cell table:style-name="표40.A2" office:value-type="string">
            <text:p text:style-name="P76">drift_detection_tool</text:p>
          </table:table-cell>
          <table:table-cell table:style-name="표40.A2" office:value-type="string">
            <text:p text:style-name="P76">String</text:p>
          </table:table-cell>
          <table:table-cell table:style-name="표40.A2" office:value-type="string">
            <text:p text:style-name="P98">-</text:p>
          </table:table-cell>
          <table:table-cell table:style-name="표40.D2" office:value-type="string">
            <text:p text:style-name="P76">드리프트 감지 도구를 선택한다.</text:p>
            <text:p text:style-name="P76">(Evidently, NannyML, Alibi Detect 등)</text:p>
          </table:table-cell>
        </table:table-row>
        <table:table-row>
          <table:table-cell table:style-name="표40.A2" office:value-type="string">
            <text:p text:style-name="P76">drift_threshold</text:p>
          </table:table-cell>
          <table:table-cell table:style-name="표40.A2" office:value-type="string">
            <text:p text:style-name="P76">Float</text:p>
          </table:table-cell>
          <table:table-cell table:style-name="표40.A2" office:value-type="string">
            <text:p text:style-name="P98">-</text:p>
          </table:table-cell>
          <table:table-cell table:style-name="표40.D2" office:value-type="string">
            <text:p text:style-name="P76">드리프트 임계값을 설정한다.</text:p>
            <text:p text:style-name="P76">(예: 0.1)</text:p>
          </table:table-cell>
        </table:table-row>
        <table:table-row>
          <table:table-cell table:style-name="표40.A2" office:value-type="string">
            <text:p text:style-name="P76">auto_retraining_enabled</text:p>
          </table:table-cell>
          <table:table-cell table:style-name="표40.A2" office:value-type="string">
            <text:p text:style-name="P76">Boolean 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자동 재학습 활성화 여부를 선택한다.</text:p>
          </table:table-cell>
        </table:table-row>
        <table:table-row>
          <table:table-cell table:style-name="표40.A2" office:value-type="string">
            <text:p text:style-name="P76">retraining_trigger</text:p>
          </table:table-cell>
          <table:table-cell table:style-name="표40.A2" office:value-type="string">
            <text:p text:style-name="P76">String</text:p>
          </table:table-cell>
          <table:table-cell table:style-name="표40.A2" office:value-type="string">
            <text:p text:style-name="P89">-</text:p>
          </table:table-cell>
          <table:table-cell table:style-name="표40.D2" office:value-type="string">
            <text:p text:style-name="P76">재학습 트리거 조건을 정의한다.</text:p>
            <text:p text:style-name="P76">(예: "drift &gt; 0.1", "accuracy &lt; 0.85")</text:p>
          </table:table-cell>
        </table:table-row>
        <table:table-row>
          <table:table-cell table:style-name="표40.A2" office:value-type="string">
            <text:p text:style-name="P76">feedback_loop_enabled </text:p>
          </table:table-cell>
          <table:table-cell table:style-name="표40.A2" office:value-type="string">
            <text:p text:style-name="P76">Boolean </text:p>
          </table:table-cell>
          <table:table-cell table:style-name="표40.A2" office:value-type="string">
            <text:p text:style-name="P99">o</text:p>
          </table:table-cell>
          <table:table-cell table:style-name="표40.D2" office:value-type="string">
            <text:p text:style-name="P76">피드백 루프 구축 여부를 선택한다.</text:p>
          </table:table-cell>
        </table:table-row>
        <table:table-row>
          <table:table-cell table:style-name="표40.A2" office:value-type="string">
            <text:p text:style-name="P76">feedback_collection_tool</text:p>
          </table:table-cell>
          <table:table-cell table:style-name="표40.A2" office:value-type="string">
            <text:p text:style-name="P76">String</text:p>
          </table:table-cell>
          <table:table-cell table:style-name="표40.A2" office:value-type="string">
            <text:p text:style-name="P89">-</text:p>
          </table:table-cell>
          <table:table-cell table:style-name="표40.D2" office:value-type="string">
            <text:p text:style-name="P76">피드백 수집 도구를 선택한다.</text:p>
            <text:p text:style-name="P76">(Label Studio, Prodigy 등)</text:p>
          </table:table-cell>
        </table:table-row>
      </table:table>
      <text:p text:style-name="P134"/>
      <text:p text:style-name="P8">7.6 보안 및 거버넌스 통합 (Section 5.7)</text:p>
      <text:p text:style-name="Preformatted_20_Text"/>
      <table:table table:name="표41" table:style-name="표41">
        <table:table-column table:style-name="표41.A"/>
        <table:table-column table:style-name="표41.B"/>
        <table:table-column table:style-name="표41.C"/>
        <table:table-column table:style-name="표41.D"/>
        <table:table-row>
          <table:table-cell table:style-name="표41.A1" office:value-type="string">
            <text:p text:style-name="P27">필드명</text:p>
          </table:table-cell>
          <table:table-cell table:style-name="표41.A1" office:value-type="string">
            <text:p text:style-name="P27">데이터 타입</text:p>
          </table:table-cell>
          <table:table-cell table:style-name="표41.A1" office:value-type="string">
            <text:p text:style-name="P27">필수</text:p>
          </table:table-cell>
          <table:table-cell table:style-name="표41.D1" office:value-type="string">
            <text:p text:style-name="P27">설명</text:p>
          </table:table-cell>
        </table:table-row>
        <table:table-row>
          <table:table-cell table:style-name="표41.A2" office:value-type="string">
            <text:p text:style-name="P77">rbac_enabled</text:p>
          </table:table-cell>
          <table:table-cell table:style-name="표41.A2" office:value-type="string">
            <text:p text:style-name="P77">Boolean</text:p>
          </table:table-cell>
          <table:table-cell table:style-name="표41.A2" office:value-type="string">
            <text:p text:style-name="P102">o</text:p>
          </table:table-cell>
          <table:table-cell table:style-name="표41.D2" office:value-type="string">
            <text:p text:style-name="P77">RBAC(역할 기반 접근 제어) 구현 여부를 선택한다.</text:p>
          </table:table-cell>
        </table:table-row>
        <table:table-row>
          <table:table-cell table:style-name="표41.A2" office:value-type="string">
            <text:p text:style-name="P77">least_privilege_applied</text:p>
          </table:table-cell>
          <table:table-cell table:style-name="표41.A2" office:value-type="string">
            <text:p text:style-name="P77">Boolean</text:p>
          </table:table-cell>
          <table:table-cell table:style-name="표41.A2" office:value-type="string">
            <text:p text:style-name="P102">o</text:p>
          </table:table-cell>
          <table:table-cell table:style-name="표41.D2" office:value-type="string">
            <text:p text:style-name="P77">최소 권한 원칙 적용 여부를 선택한다.</text:p>
          </table:table-cell>
        </table:table-row>
        <table:table-row>
          <table:table-cell table:style-name="표41.A2" office:value-type="string">
            <text:p text:style-name="P77">access_control_tool </text:p>
          </table:table-cell>
          <table:table-cell table:style-name="표41.A2" office:value-type="string">
            <text:p text:style-name="P77">String</text:p>
          </table:table-cell>
          <table:table-cell table:style-name="표41.A2" office:value-type="string">
            <text:p text:style-name="P99">-</text:p>
          </table:table-cell>
          <table:table-cell table:style-name="표41.D2" office:value-type="string">
            <text:p text:style-name="P77">접근 통제 도구를 선택한다.</text:p>
            <text:p text:style-name="P77">(Keycloak, AWS IAM, Azure AD 등)</text:p>
          </table:table-cell>
        </table:table-row>
        <table:table-row>
          <table:table-cell table:style-name="표41.A2" office:value-type="string">
            <text:p text:style-name="P77">audit_trail_enabled</text:p>
          </table:table-cell>
          <table:table-cell table:style-name="표41.A2" office:value-type="string">
            <text:p text:style-name="P77">Boolean</text:p>
          </table:table-cell>
          <table:table-cell table:style-name="표41.A2" office:value-type="string">
            <text:p text:style-name="P102">o</text:p>
          </table:table-cell>
          <table:table-cell table:style-name="표41.D2" office:value-type="string">
            <text:p text:style-name="P77">감사 추적 활성화 여부를 선택한다.</text:p>
          </table:table-cell>
        </table:table-row>
        <table:table-row>
          <table:table-cell table:style-name="표41.A2" office:value-type="string">
            <text:p text:style-name="P77">audit_logging_scope <text:s/></text:p>
          </table:table-cell>
          <table:table-cell table:style-name="표41.A2" office:value-type="string">
            <text:p text:style-name="P77">String</text:p>
          </table:table-cell>
          <table:table-cell table:style-name="표41.A2" office:value-type="string">
            <text:p text:style-name="P99">-</text:p>
          </table:table-cell>
          <table:table-cell table:style-name="표41.D2" office:value-type="string">
            <text:p text:style-name="P77">감사 로깅 범위를 정의한다.</text:p>
            <text:p text:style-name="P77">(예: "모든 API 호출", "데이터 접근" 등)</text:p>
          </table:table-cell>
        </table:table-row>
        <table:table-row>
          <table:table-cell table:style-name="표41.A2" office:value-type="string">
            <text:p text:style-name="P77">audit_log_retention_period</text:p>
          </table:table-cell>
          <table:table-cell table:style-name="표41.A2" office:value-type="string">
            <text:p text:style-name="P77">String</text:p>
          </table:table-cell>
          <table:table-cell table:style-name="표41.A2" office:value-type="string">
            <text:p text:style-name="P96">-</text:p>
          </table:table-cell>
          <table:table-cell table:style-name="표41.D2" office:value-type="string">
            <text:p text:style-name="P77">감사 로그 보존 기간을 설정한다. (예: "7년")</text:p>
          </table:table-cell>
        </table:table-row>
        <table:table-row table:style-name="표41.8">
          <table:table-cell table:style-name="표41.A2" office:value-type="string">
            <text:p text:style-name="P77">code_security_scan </text:p>
          </table:table-cell>
          <table:table-cell table:style-name="표41.A2" office:value-type="string">
            <text:p text:style-name="P77">Boolean</text:p>
          </table:table-cell>
          <table:table-cell table:style-name="표41.A2" office:value-type="string">
            <text:p text:style-name="P102">o</text:p>
          </table:table-cell>
          <table:table-cell table:style-name="표41.D2" office:value-type="string">
            <text:p text:style-name="P77">코드 보안 스캐닝 활성화 여부를 선택한다.</text:p>
          </table:table-cell>
        </table:table-row>
        <table:table-row>
          <table:table-cell table:style-name="표41.A2" office:value-type="string">
            <text:p text:style-name="P77">container_security_scan</text:p>
          </table:table-cell>
          <table:table-cell table:style-name="표41.A2" office:value-type="string">
            <text:p text:style-name="P77">Boolean</text:p>
          </table:table-cell>
          <table:table-cell table:style-name="표41.A2" office:value-type="string">
            <text:p text:style-name="P102">o</text:p>
          </table:table-cell>
          <table:table-cell table:style-name="표41.D2" office:value-type="string">
            <text:p text:style-name="P77">컨테이너 이미지 스캐닝 활성화 여부를 선택한다.</text:p>
          </table:table-cell>
        </table:table-row>
        <table:table-row>
          <table:table-cell table:style-name="표41.A2" office:value-type="string">
            <text:p text:style-name="P77">security_scan_tool</text:p>
          </table:table-cell>
          <table:table-cell table:style-name="표41.A2" office:value-type="string">
            <text:p text:style-name="P77">String</text:p>
          </table:table-cell>
          <table:table-cell table:style-name="표41.A2" office:value-type="string">
            <text:p text:style-name="P98">-</text:p>
          </table:table-cell>
          <table:table-cell table:style-name="표41.D2" office:value-type="string">
            <text:p text:style-name="P77">보안 스캔 도구를 선택한다.</text:p>
            <text:p text:style-name="P77">(Snyk, Trivy, SonarQube 등)</text:p>
          </table:table-cell>
        </table:table-row>
        <table:table-row>
          <table:table-cell table:style-name="표41.A2" office:value-type="string">
            <text:p text:style-name="P77">cicd_integration</text:p>
          </table:table-cell>
          <table:table-cell table:style-name="표41.A2" office:value-type="string">
            <text:p text:style-name="P77">Boolean</text:p>
          </table:table-cell>
          <table:table-cell table:style-name="표41.A2" office:value-type="string">
            <text:p text:style-name="P102">o</text:p>
          </table:table-cell>
          <table:table-cell table:style-name="표41.D2" office:value-type="string">
            <text:p text:style-name="P77">CI/CD 통합 여부를 선택한다.</text:p>
          </table:table-cell>
        </table:table-row>
      </table:table>
      <text:p text:style-name="Preformatted_20_Text"><text:span text:style-name="T1"/></text:p>
      <text:p text:style-name="Preformatted_20_Text"><text:span text:style-name="T1">【MLOps 기술 표준 입력 항목 합계: 약 70~80개 필드】</text:span></text:p>
      <text:p text:style-name="Preformatted_20_Text"><text:soft-page-break/></text:p>
      <text:p text:style-name="P4">【 STEP 8 】 추가 분석: 인력 구성 및 조직 체계 (제6장)</text:p>
      <text:p text:style-name="Preformatted_20_Text"/>
      <text:p text:style-name="Preformatted_20_Text">API 엔드포인트: POST /api/v1/projects/{project_id}/personnel-organization</text:p>
      <text:p text:style-name="Preformatted_20_Text">요청 모델: SavePersonnelOrganizationRequest</text:p>
      <text:p text:style-name="Preformatted_20_Text"/>
      <text:p text:style-name="Preformatted_20_Text">AI 전환을 위한 필수 인력 구성과 조직 체계를 정의한다. 4개 팀, 12개 역할에</text:p>
      <text:p text:style-name="Preformatted_20_Text">대해 현황과 목표를 입력한다.</text:p>
      <text:p text:style-name="Preformatted_20_Text"/>
      <text:p text:style-name="Preformatted_20_Text"/>
      <text:p text:style-name="P8">8.1 전략 및 프로젝트 관리 팀 (Section 6.2)</text:p>
      <text:p text:style-name="Preformatted_20_Text"/>
      <text:p text:style-name="Preformatted_20_Text"/>
      <text:p text:style-name="Preformatted_20_Text">【역할: Engagement Manager】</text:p>
      <text:p text:style-name="Preformatted_20_Text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row>
          <table:table-cell table:style-name="표42.A1" office:value-type="string">
            <text:p text:style-name="P28">필드명</text:p>
          </table:table-cell>
          <table:table-cell table:style-name="표42.A1" office:value-type="string">
            <text:p text:style-name="P28">데이터 타입</text:p>
          </table:table-cell>
          <table:table-cell table:style-name="표42.A1" office:value-type="string">
            <text:p text:style-name="P28">필수</text:p>
          </table:table-cell>
          <table:table-cell table:style-name="표42.D1" office:value-type="string">
            <text:p text:style-name="P28">설명</text:p>
          </table:table-cell>
        </table:table-row>
        <table:table-row>
          <table:table-cell table:style-name="표42.A2" office:value-type="string">
            <text:p text:style-name="P77">current_headcount</text:p>
          </table:table-cell>
          <table:table-cell table:style-name="표42.A2" office:value-type="string">
            <text:p text:style-name="P78">Integer</text:p>
          </table:table-cell>
          <table:table-cell table:style-name="표42.A2" office:value-type="string">
            <text:p text:style-name="P102">o</text:p>
          </table:table-cell>
          <table:table-cell table:style-name="표42.D2" office:value-type="string">
            <text:p text:style-name="P78">현재 인원 수를 입력한다.</text:p>
          </table:table-cell>
        </table:table-row>
        <table:table-row>
          <table:table-cell table:style-name="표42.A2" office:value-type="string">
            <text:p text:style-name="P77">target_headcount</text:p>
          </table:table-cell>
          <table:table-cell table:style-name="표42.A2" office:value-type="string">
            <text:p text:style-name="P78">Integer</text:p>
          </table:table-cell>
          <table:table-cell table:style-name="표42.A2" office:value-type="string">
            <text:p text:style-name="P102">o</text:p>
          </table:table-cell>
          <table:table-cell table:style-name="표42.D2" office:value-type="string">
            <text:p text:style-name="P78">목표 인원 수를 입력한다.</text:p>
          </table:table-cell>
        </table:table-row>
        <table:table-row>
          <table:table-cell table:style-name="표42.A2" office:value-type="string">
            <text:p text:style-name="P77">hiring_plan</text:p>
          </table:table-cell>
          <table:table-cell table:style-name="표42.A2" office:value-type="string">
            <text:p text:style-name="P77">String</text:p>
          </table:table-cell>
          <table:table-cell table:style-name="표42.A2" office:value-type="string">
            <text:p text:style-name="P100">-</text:p>
          </table:table-cell>
          <table:table-cell table:style-name="표42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2.A2" office:value-type="string">
            <text:p text:style-name="P77">training_plan</text:p>
          </table:table-cell>
          <table:table-cell table:style-name="표42.A2" office:value-type="string">
            <text:p text:style-name="P78">String </text:p>
          </table:table-cell>
          <table:table-cell table:style-name="표42.A2" office:value-type="string">
            <text:p text:style-name="P102">-</text:p>
          </table:table-cell>
          <table:table-cell table:style-name="표42.D2" office:value-type="string">
            <text:p text:style-name="P78">교육/역량 개발 계획을 기술한다.</text:p>
          </table:table-cell>
        </table:table-row>
        <table:table-row>
          <table:table-cell table:style-name="표42.A2" office:value-type="string">
            <text:p text:style-name="P78">notes</text:p>
          </table:table-cell>
          <table:table-cell table:style-name="표42.A2" office:value-type="string">
            <text:p text:style-name="P77">String</text:p>
          </table:table-cell>
          <table:table-cell table:style-name="표42.A2" office:value-type="string">
            <text:p text:style-name="P100">-</text:p>
          </table:table-cell>
          <table:table-cell table:style-name="표42.D2" office:value-type="string">
            <text:p text:style-name="P78">비고 사항을 기술한다.</text:p>
          </table:table-cell>
        </table:table-row>
      </table:table>
      <text:p text:style-name="P135"/>
      <text:p text:style-name="Preformatted_20_Text"/>
      <text:p text:style-name="Preformatted_20_Text">【역할: AI Strategist】</text:p>
      <text:p text:style-name="Preformatted_20_Text"/>
      <table:table table:name="표43" table:style-name="표43">
        <table:table-column table:style-name="표43.A"/>
        <table:table-column table:style-name="표43.B"/>
        <table:table-column table:style-name="표43.C"/>
        <table:table-column table:style-name="표43.D"/>
        <table:table-row>
          <table:table-cell table:style-name="표43.A1" office:value-type="string">
            <text:p text:style-name="P29">필드명</text:p>
          </table:table-cell>
          <table:table-cell table:style-name="표43.A1" office:value-type="string">
            <text:p text:style-name="P29">데이터 타입</text:p>
          </table:table-cell>
          <table:table-cell table:style-name="표43.A1" office:value-type="string">
            <text:p text:style-name="P29">필수</text:p>
          </table:table-cell>
          <table:table-cell table:style-name="표43.D1" office:value-type="string">
            <text:p text:style-name="P29">설명</text:p>
          </table:table-cell>
        </table:table-row>
        <table:table-row>
          <table:table-cell table:style-name="표43.A2" office:value-type="string">
            <text:p text:style-name="P78">current_headcount</text:p>
          </table:table-cell>
          <table:table-cell table:style-name="표43.A2" office:value-type="string">
            <text:p text:style-name="P78">Integer</text:p>
          </table:table-cell>
          <table:table-cell table:style-name="표43.A2" office:value-type="string">
            <text:p text:style-name="P103">o</text:p>
          </table:table-cell>
          <table:table-cell table:style-name="표43.D2" office:value-type="string">
            <text:p text:style-name="P78">현재 인원 수를 입력한다.</text:p>
          </table:table-cell>
        </table:table-row>
        <table:table-row>
          <table:table-cell table:style-name="표43.A2" office:value-type="string">
            <text:p text:style-name="P78">target_headcount</text:p>
          </table:table-cell>
          <table:table-cell table:style-name="표43.A2" office:value-type="string">
            <text:p text:style-name="P78">Integer</text:p>
          </table:table-cell>
          <table:table-cell table:style-name="표43.A2" office:value-type="string">
            <text:p text:style-name="P103">o</text:p>
          </table:table-cell>
          <table:table-cell table:style-name="표43.D2" office:value-type="string">
            <text:p text:style-name="P78">목표 인원 수를 입력한다.</text:p>
          </table:table-cell>
        </table:table-row>
        <table:table-row>
          <table:table-cell table:style-name="표43.A2" office:value-type="string">
            <text:p text:style-name="P78">hiring_plan</text:p>
          </table:table-cell>
          <table:table-cell table:style-name="표43.A2" office:value-type="string">
            <text:p text:style-name="P78">String</text:p>
          </table:table-cell>
          <table:table-cell table:style-name="표43.A2" office:value-type="string">
            <text:p text:style-name="P101">-</text:p>
          </table:table-cell>
          <table:table-cell table:style-name="표43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3.A2" office:value-type="string">
            <text:p text:style-name="P78">training_plan</text:p>
          </table:table-cell>
          <table:table-cell table:style-name="표43.A2" office:value-type="string">
            <text:p text:style-name="P78">String </text:p>
          </table:table-cell>
          <table:table-cell table:style-name="표43.A2" office:value-type="string">
            <text:p text:style-name="P103">-</text:p>
          </table:table-cell>
          <table:table-cell table:style-name="표43.D2" office:value-type="string">
            <text:p text:style-name="P78">교육/역량 개발 계획을 기술한다.</text:p>
          </table:table-cell>
        </table:table-row>
        <table:table-row>
          <table:table-cell table:style-name="표43.A2" office:value-type="string">
            <text:p text:style-name="P78">notes</text:p>
          </table:table-cell>
          <table:table-cell table:style-name="표43.A2" office:value-type="string">
            <text:p text:style-name="P78">String</text:p>
          </table:table-cell>
          <table:table-cell table:style-name="표43.A2" office:value-type="string">
            <text:p text:style-name="P101">-</text:p>
          </table:table-cell>
          <table:table-cell table:style-name="표43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>【역할: Business Analyst】</text:p>
      <text:p text:style-name="Preformatted_20_Text"/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able:table-row>
          <table:table-cell table:style-name="표44.A1" office:value-type="string">
            <text:p text:style-name="P29">필드명</text:p>
          </table:table-cell>
          <table:table-cell table:style-name="표44.A1" office:value-type="string">
            <text:p text:style-name="P29">데이터 타입</text:p>
          </table:table-cell>
          <table:table-cell table:style-name="표44.A1" office:value-type="string">
            <text:p text:style-name="P29">필수</text:p>
          </table:table-cell>
          <table:table-cell table:style-name="표44.D1" office:value-type="string">
            <text:p text:style-name="P29">설명</text:p>
          </table:table-cell>
        </table:table-row>
        <table:table-row>
          <table:table-cell table:style-name="표44.A2" office:value-type="string">
            <text:p text:style-name="P78">current_headcount</text:p>
          </table:table-cell>
          <table:table-cell table:style-name="표44.A2" office:value-type="string">
            <text:p text:style-name="P78">Integer</text:p>
          </table:table-cell>
          <table:table-cell table:style-name="표44.A2" office:value-type="string">
            <text:p text:style-name="P103">o</text:p>
          </table:table-cell>
          <table:table-cell table:style-name="표44.D2" office:value-type="string">
            <text:p text:style-name="P78">현재 인원 수를 입력한다.</text:p>
          </table:table-cell>
        </table:table-row>
        <table:table-row>
          <table:table-cell table:style-name="표44.A2" office:value-type="string">
            <text:p text:style-name="P78">target_headcount</text:p>
          </table:table-cell>
          <table:table-cell table:style-name="표44.A2" office:value-type="string">
            <text:p text:style-name="P78">Integer</text:p>
          </table:table-cell>
          <table:table-cell table:style-name="표44.A2" office:value-type="string">
            <text:p text:style-name="P103">o</text:p>
          </table:table-cell>
          <table:table-cell table:style-name="표44.D2" office:value-type="string">
            <text:p text:style-name="P78">목표 인원 수를 입력한다.</text:p>
          </table:table-cell>
        </table:table-row>
        <table:table-row>
          <table:table-cell table:style-name="표44.A2" office:value-type="string">
            <text:p text:style-name="P78">hiring_plan</text:p>
          </table:table-cell>
          <table:table-cell table:style-name="표44.A2" office:value-type="string">
            <text:p text:style-name="P78">String</text:p>
          </table:table-cell>
          <table:table-cell table:style-name="표44.A2" office:value-type="string">
            <text:p text:style-name="P101">-</text:p>
          </table:table-cell>
          <table:table-cell table:style-name="표44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4.A2" office:value-type="string">
            <text:p text:style-name="P78">training_plan</text:p>
          </table:table-cell>
          <table:table-cell table:style-name="표44.A2" office:value-type="string">
            <text:p text:style-name="P78">String </text:p>
          </table:table-cell>
          <table:table-cell table:style-name="표44.A2" office:value-type="string">
            <text:p text:style-name="P103">-</text:p>
          </table:table-cell>
          <table:table-cell table:style-name="표44.D2" office:value-type="string">
            <text:p text:style-name="P78">교육/역량 개발 계획을 기술한다.</text:p>
          </table:table-cell>
        </table:table-row>
        <table:table-row>
          <table:table-cell table:style-name="표44.A2" office:value-type="string">
            <text:p text:style-name="P78">notes</text:p>
          </table:table-cell>
          <table:table-cell table:style-name="표44.A2" office:value-type="string">
            <text:p text:style-name="P78">String</text:p>
          </table:table-cell>
          <table:table-cell table:style-name="표44.A2" office:value-type="string">
            <text:p text:style-name="P101">-</text:p>
          </table:table-cell>
          <table:table-cell table:style-name="표44.D2" office:value-type="string">
            <text:p text:style-name="P78">비고 사항을 기술한다.</text:p>
          </table:table-cell>
        </table:table-row>
      </table:table>
      <text:p text:style-name="Preformatted_20_Text"><text:soft-page-break/><text:span text:style-name="T7">8.2 기술 및 모델 개발 팀 (Section 6.3)</text:span></text:p>
      <text:p text:style-name="Preformatted_20_Text"/>
      <text:p text:style-name="Preformatted_20_Text"/>
      <text:p text:style-name="Preformatted_20_Text">【역할: Lead Data Scientist】</text:p>
      <text:p text:style-name="Preformatted_20_Text"/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able:table-row>
          <table:table-cell table:style-name="표45.A1" office:value-type="string">
            <text:p text:style-name="P29">필드명</text:p>
          </table:table-cell>
          <table:table-cell table:style-name="표45.A1" office:value-type="string">
            <text:p text:style-name="P29">데이터 타입</text:p>
          </table:table-cell>
          <table:table-cell table:style-name="표45.A1" office:value-type="string">
            <text:p text:style-name="P29">필수</text:p>
          </table:table-cell>
          <table:table-cell table:style-name="표45.D1" office:value-type="string">
            <text:p text:style-name="P29">설명</text:p>
          </table:table-cell>
        </table:table-row>
        <table:table-row>
          <table:table-cell table:style-name="표45.A2" office:value-type="string">
            <text:p text:style-name="P78">current_headcount</text:p>
          </table:table-cell>
          <table:table-cell table:style-name="표45.A2" office:value-type="string">
            <text:p text:style-name="P78">Integer</text:p>
          </table:table-cell>
          <table:table-cell table:style-name="표45.A2" office:value-type="string">
            <text:p text:style-name="P103">o</text:p>
          </table:table-cell>
          <table:table-cell table:style-name="표45.D2" office:value-type="string">
            <text:p text:style-name="P78">현재 인원 수를 입력한다.</text:p>
          </table:table-cell>
        </table:table-row>
        <table:table-row>
          <table:table-cell table:style-name="표45.A2" office:value-type="string">
            <text:p text:style-name="P78">target_headcount</text:p>
          </table:table-cell>
          <table:table-cell table:style-name="표45.A2" office:value-type="string">
            <text:p text:style-name="P78">Integer</text:p>
          </table:table-cell>
          <table:table-cell table:style-name="표45.A2" office:value-type="string">
            <text:p text:style-name="P103">o</text:p>
          </table:table-cell>
          <table:table-cell table:style-name="표45.D2" office:value-type="string">
            <text:p text:style-name="P78">목표 인원 수를 입력한다.</text:p>
          </table:table-cell>
        </table:table-row>
        <table:table-row>
          <table:table-cell table:style-name="표45.A2" office:value-type="string">
            <text:p text:style-name="P78">hiring_plan</text:p>
          </table:table-cell>
          <table:table-cell table:style-name="표45.A2" office:value-type="string">
            <text:p text:style-name="P78">String</text:p>
          </table:table-cell>
          <table:table-cell table:style-name="표45.A2" office:value-type="string">
            <text:p text:style-name="P101">-</text:p>
          </table:table-cell>
          <table:table-cell table:style-name="표45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5.A2" office:value-type="string">
            <text:p text:style-name="P78">training_plan</text:p>
          </table:table-cell>
          <table:table-cell table:style-name="표45.A2" office:value-type="string">
            <text:p text:style-name="P78">String </text:p>
          </table:table-cell>
          <table:table-cell table:style-name="표45.A2" office:value-type="string">
            <text:p text:style-name="P103">-</text:p>
          </table:table-cell>
          <table:table-cell table:style-name="표45.D2" office:value-type="string">
            <text:p text:style-name="P78">교육/역량 개발 계획을 기술한다.</text:p>
          </table:table-cell>
        </table:table-row>
        <table:table-row>
          <table:table-cell table:style-name="표45.A2" office:value-type="string">
            <text:p text:style-name="P78">notes</text:p>
          </table:table-cell>
          <table:table-cell table:style-name="표45.A2" office:value-type="string">
            <text:p text:style-name="P78">String</text:p>
          </table:table-cell>
          <table:table-cell table:style-name="표45.A2" office:value-type="string">
            <text:p text:style-name="P101">-</text:p>
          </table:table-cell>
          <table:table-cell table:style-name="표45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>【역할: ML Engineer】</text:p>
      <text:p text:style-name="Preformatted_20_Text"/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row>
          <table:table-cell table:style-name="표46.A1" office:value-type="string">
            <text:p text:style-name="P29">필드명</text:p>
          </table:table-cell>
          <table:table-cell table:style-name="표46.A1" office:value-type="string">
            <text:p text:style-name="P29">데이터 타입</text:p>
          </table:table-cell>
          <table:table-cell table:style-name="표46.A1" office:value-type="string">
            <text:p text:style-name="P29">필수</text:p>
          </table:table-cell>
          <table:table-cell table:style-name="표46.D1" office:value-type="string">
            <text:p text:style-name="P29">설명</text:p>
          </table:table-cell>
        </table:table-row>
        <table:table-row>
          <table:table-cell table:style-name="표46.A2" office:value-type="string">
            <text:p text:style-name="P78">current_headcount</text:p>
          </table:table-cell>
          <table:table-cell table:style-name="표46.A2" office:value-type="string">
            <text:p text:style-name="P78">Integer</text:p>
          </table:table-cell>
          <table:table-cell table:style-name="표46.A2" office:value-type="string">
            <text:p text:style-name="P103">o</text:p>
          </table:table-cell>
          <table:table-cell table:style-name="표46.D2" office:value-type="string">
            <text:p text:style-name="P78">현재 인원 수를 입력한다.</text:p>
          </table:table-cell>
        </table:table-row>
        <table:table-row>
          <table:table-cell table:style-name="표46.A2" office:value-type="string">
            <text:p text:style-name="P78">target_headcount</text:p>
          </table:table-cell>
          <table:table-cell table:style-name="표46.A2" office:value-type="string">
            <text:p text:style-name="P78">Integer</text:p>
          </table:table-cell>
          <table:table-cell table:style-name="표46.A2" office:value-type="string">
            <text:p text:style-name="P103">o</text:p>
          </table:table-cell>
          <table:table-cell table:style-name="표46.D2" office:value-type="string">
            <text:p text:style-name="P78">목표 인원 수를 입력한다.</text:p>
          </table:table-cell>
        </table:table-row>
        <table:table-row>
          <table:table-cell table:style-name="표46.A2" office:value-type="string">
            <text:p text:style-name="P78">hiring_plan</text:p>
          </table:table-cell>
          <table:table-cell table:style-name="표46.A2" office:value-type="string">
            <text:p text:style-name="P78">String</text:p>
          </table:table-cell>
          <table:table-cell table:style-name="표46.A2" office:value-type="string">
            <text:p text:style-name="P101">-</text:p>
          </table:table-cell>
          <table:table-cell table:style-name="표46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6.A2" office:value-type="string">
            <text:p text:style-name="P78">training_plan</text:p>
          </table:table-cell>
          <table:table-cell table:style-name="표46.A2" office:value-type="string">
            <text:p text:style-name="P78">String </text:p>
          </table:table-cell>
          <table:table-cell table:style-name="표46.A2" office:value-type="string">
            <text:p text:style-name="P103">-</text:p>
          </table:table-cell>
          <table:table-cell table:style-name="표46.D2" office:value-type="string">
            <text:p text:style-name="P78">교육/역량 개발 계획을 기술한다.</text:p>
          </table:table-cell>
        </table:table-row>
        <table:table-row>
          <table:table-cell table:style-name="표46.A2" office:value-type="string">
            <text:p text:style-name="P78">notes</text:p>
          </table:table-cell>
          <table:table-cell table:style-name="표46.A2" office:value-type="string">
            <text:p text:style-name="P78">String</text:p>
          </table:table-cell>
          <table:table-cell table:style-name="표46.A2" office:value-type="string">
            <text:p text:style-name="P101">-</text:p>
          </table:table-cell>
          <table:table-cell table:style-name="표46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>【역할: Software Engineer】</text:p>
      <text:p text:style-name="Preformatted_20_Text"/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row>
          <table:table-cell table:style-name="표47.A1" office:value-type="string">
            <text:p text:style-name="P29">필드명</text:p>
          </table:table-cell>
          <table:table-cell table:style-name="표47.A1" office:value-type="string">
            <text:p text:style-name="P29">데이터 타입</text:p>
          </table:table-cell>
          <table:table-cell table:style-name="표47.A1" office:value-type="string">
            <text:p text:style-name="P29">필수</text:p>
          </table:table-cell>
          <table:table-cell table:style-name="표47.D1" office:value-type="string">
            <text:p text:style-name="P29">설명</text:p>
          </table:table-cell>
        </table:table-row>
        <table:table-row>
          <table:table-cell table:style-name="표47.A2" office:value-type="string">
            <text:p text:style-name="P78">current_headcount</text:p>
          </table:table-cell>
          <table:table-cell table:style-name="표47.A2" office:value-type="string">
            <text:p text:style-name="P78">Integer</text:p>
          </table:table-cell>
          <table:table-cell table:style-name="표47.A2" office:value-type="string">
            <text:p text:style-name="P103">o</text:p>
          </table:table-cell>
          <table:table-cell table:style-name="표47.D2" office:value-type="string">
            <text:p text:style-name="P78">현재 인원 수를 입력한다.</text:p>
          </table:table-cell>
        </table:table-row>
        <table:table-row>
          <table:table-cell table:style-name="표47.A2" office:value-type="string">
            <text:p text:style-name="P78">target_headcount</text:p>
          </table:table-cell>
          <table:table-cell table:style-name="표47.A2" office:value-type="string">
            <text:p text:style-name="P78">Integer</text:p>
          </table:table-cell>
          <table:table-cell table:style-name="표47.A2" office:value-type="string">
            <text:p text:style-name="P103">o</text:p>
          </table:table-cell>
          <table:table-cell table:style-name="표47.D2" office:value-type="string">
            <text:p text:style-name="P78">목표 인원 수를 입력한다.</text:p>
          </table:table-cell>
        </table:table-row>
        <table:table-row>
          <table:table-cell table:style-name="표47.A2" office:value-type="string">
            <text:p text:style-name="P78">hiring_plan</text:p>
          </table:table-cell>
          <table:table-cell table:style-name="표47.A2" office:value-type="string">
            <text:p text:style-name="P78">String</text:p>
          </table:table-cell>
          <table:table-cell table:style-name="표47.A2" office:value-type="string">
            <text:p text:style-name="P101">-</text:p>
          </table:table-cell>
          <table:table-cell table:style-name="표47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7.A2" office:value-type="string">
            <text:p text:style-name="P78">training_plan</text:p>
          </table:table-cell>
          <table:table-cell table:style-name="표47.A2" office:value-type="string">
            <text:p text:style-name="P78">String </text:p>
          </table:table-cell>
          <table:table-cell table:style-name="표47.A2" office:value-type="string">
            <text:p text:style-name="P103">-</text:p>
          </table:table-cell>
          <table:table-cell table:style-name="표47.D2" office:value-type="string">
            <text:p text:style-name="P78">교육/역량 개발 계획을 기술한다.</text:p>
          </table:table-cell>
        </table:table-row>
        <table:table-row>
          <table:table-cell table:style-name="표47.A2" office:value-type="string">
            <text:p text:style-name="P78">notes</text:p>
          </table:table-cell>
          <table:table-cell table:style-name="표47.A2" office:value-type="string">
            <text:p text:style-name="P78">String</text:p>
          </table:table-cell>
          <table:table-cell table:style-name="표47.A2" office:value-type="string">
            <text:p text:style-name="P101">-</text:p>
          </table:table-cell>
          <table:table-cell table:style-name="표47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/>
      <text:p text:style-name="P8">8.3 데이터 및 인프라 팀 (Section 6.4)</text:p>
      <text:p text:style-name="Preformatted_20_Text"/>
      <text:p text:style-name="Preformatted_20_Text"/>
      <text:p text:style-name="Preformatted_20_Text">【역할: Data Engineer】</text:p>
      <text:p text:style-name="Preformatted_20_Text"/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row>
          <table:table-cell table:style-name="표48.A1" office:value-type="string">
            <text:p text:style-name="P29">필드명</text:p>
          </table:table-cell>
          <table:table-cell table:style-name="표48.A1" office:value-type="string">
            <text:p text:style-name="P29">데이터 타입</text:p>
          </table:table-cell>
          <table:table-cell table:style-name="표48.A1" office:value-type="string">
            <text:p text:style-name="P29">필수</text:p>
          </table:table-cell>
          <table:table-cell table:style-name="표48.D1" office:value-type="string">
            <text:p text:style-name="P29">설명</text:p>
          </table:table-cell>
        </table:table-row>
        <text:soft-page-break/>
        <table:table-row>
          <table:table-cell table:style-name="표48.A2" office:value-type="string">
            <text:p text:style-name="P78">current_headcount</text:p>
          </table:table-cell>
          <table:table-cell table:style-name="표48.A2" office:value-type="string">
            <text:p text:style-name="P78">Integer</text:p>
          </table:table-cell>
          <table:table-cell table:style-name="표48.A2" office:value-type="string">
            <text:p text:style-name="P103">o</text:p>
          </table:table-cell>
          <table:table-cell table:style-name="표48.D2" office:value-type="string">
            <text:p text:style-name="P78">현재 인원 수를 입력한다.</text:p>
          </table:table-cell>
        </table:table-row>
        <table:table-row>
          <table:table-cell table:style-name="표48.A2" office:value-type="string">
            <text:p text:style-name="P78">target_headcount</text:p>
          </table:table-cell>
          <table:table-cell table:style-name="표48.A2" office:value-type="string">
            <text:p text:style-name="P78">Integer</text:p>
          </table:table-cell>
          <table:table-cell table:style-name="표48.A2" office:value-type="string">
            <text:p text:style-name="P103">o</text:p>
          </table:table-cell>
          <table:table-cell table:style-name="표48.D2" office:value-type="string">
            <text:p text:style-name="P78">목표 인원 수를 입력한다.</text:p>
          </table:table-cell>
        </table:table-row>
        <table:table-row>
          <table:table-cell table:style-name="표48.A2" office:value-type="string">
            <text:p text:style-name="P78">hiring_plan</text:p>
          </table:table-cell>
          <table:table-cell table:style-name="표48.A2" office:value-type="string">
            <text:p text:style-name="P78">String</text:p>
          </table:table-cell>
          <table:table-cell table:style-name="표48.A2" office:value-type="string">
            <text:p text:style-name="P101">-</text:p>
          </table:table-cell>
          <table:table-cell table:style-name="표48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8.A2" office:value-type="string">
            <text:p text:style-name="P78">training_plan</text:p>
          </table:table-cell>
          <table:table-cell table:style-name="표48.A2" office:value-type="string">
            <text:p text:style-name="P78">String </text:p>
          </table:table-cell>
          <table:table-cell table:style-name="표48.A2" office:value-type="string">
            <text:p text:style-name="P103">-</text:p>
          </table:table-cell>
          <table:table-cell table:style-name="표48.D2" office:value-type="string">
            <text:p text:style-name="P78">교육/역량 개발 계획을 기술한다.</text:p>
          </table:table-cell>
        </table:table-row>
        <table:table-row>
          <table:table-cell table:style-name="표48.A2" office:value-type="string">
            <text:p text:style-name="P78">notes</text:p>
          </table:table-cell>
          <table:table-cell table:style-name="표48.A2" office:value-type="string">
            <text:p text:style-name="P78">String</text:p>
          </table:table-cell>
          <table:table-cell table:style-name="표48.A2" office:value-type="string">
            <text:p text:style-name="P101">-</text:p>
          </table:table-cell>
          <table:table-cell table:style-name="표48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>【역할: Cloud/Infrastructure Architect】</text:p>
      <text:p text:style-name="Preformatted_20_Text"/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>
          <table:table-cell table:style-name="표49.A1" office:value-type="string">
            <text:p text:style-name="P29">필드명</text:p>
          </table:table-cell>
          <table:table-cell table:style-name="표49.A1" office:value-type="string">
            <text:p text:style-name="P29">데이터 타입</text:p>
          </table:table-cell>
          <table:table-cell table:style-name="표49.A1" office:value-type="string">
            <text:p text:style-name="P29">필수</text:p>
          </table:table-cell>
          <table:table-cell table:style-name="표49.D1" office:value-type="string">
            <text:p text:style-name="P29">설명</text:p>
          </table:table-cell>
        </table:table-row>
        <table:table-row>
          <table:table-cell table:style-name="표49.A2" office:value-type="string">
            <text:p text:style-name="P78">current_headcount</text:p>
          </table:table-cell>
          <table:table-cell table:style-name="표49.A2" office:value-type="string">
            <text:p text:style-name="P78">Integer</text:p>
          </table:table-cell>
          <table:table-cell table:style-name="표49.A2" office:value-type="string">
            <text:p text:style-name="P103">o</text:p>
          </table:table-cell>
          <table:table-cell table:style-name="표49.D2" office:value-type="string">
            <text:p text:style-name="P78">현재 인원 수를 입력한다.</text:p>
          </table:table-cell>
        </table:table-row>
        <table:table-row>
          <table:table-cell table:style-name="표49.A2" office:value-type="string">
            <text:p text:style-name="P78">target_headcount</text:p>
          </table:table-cell>
          <table:table-cell table:style-name="표49.A2" office:value-type="string">
            <text:p text:style-name="P78">Integer</text:p>
          </table:table-cell>
          <table:table-cell table:style-name="표49.A2" office:value-type="string">
            <text:p text:style-name="P103">o</text:p>
          </table:table-cell>
          <table:table-cell table:style-name="표49.D2" office:value-type="string">
            <text:p text:style-name="P78">목표 인원 수를 입력한다.</text:p>
          </table:table-cell>
        </table:table-row>
        <table:table-row>
          <table:table-cell table:style-name="표49.A2" office:value-type="string">
            <text:p text:style-name="P78">hiring_plan</text:p>
          </table:table-cell>
          <table:table-cell table:style-name="표49.A2" office:value-type="string">
            <text:p text:style-name="P78">String</text:p>
          </table:table-cell>
          <table:table-cell table:style-name="표49.A2" office:value-type="string">
            <text:p text:style-name="P101">-</text:p>
          </table:table-cell>
          <table:table-cell table:style-name="표49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49.A2" office:value-type="string">
            <text:p text:style-name="P78">training_plan</text:p>
          </table:table-cell>
          <table:table-cell table:style-name="표49.A2" office:value-type="string">
            <text:p text:style-name="P78">String </text:p>
          </table:table-cell>
          <table:table-cell table:style-name="표49.A2" office:value-type="string">
            <text:p text:style-name="P103">-</text:p>
          </table:table-cell>
          <table:table-cell table:style-name="표49.D2" office:value-type="string">
            <text:p text:style-name="P78">교육/역량 개발 계획을 기술한다.</text:p>
          </table:table-cell>
        </table:table-row>
        <table:table-row>
          <table:table-cell table:style-name="표49.A2" office:value-type="string">
            <text:p text:style-name="P78">notes</text:p>
          </table:table-cell>
          <table:table-cell table:style-name="표49.A2" office:value-type="string">
            <text:p text:style-name="P78">String</text:p>
          </table:table-cell>
          <table:table-cell table:style-name="표49.A2" office:value-type="string">
            <text:p text:style-name="P101">-</text:p>
          </table:table-cell>
          <table:table-cell table:style-name="표49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>【역할: Data Steward/Curator】</text:p>
      <text:p text:style-name="Preformatted_20_Text"/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row>
          <table:table-cell table:style-name="표50.A1" office:value-type="string">
            <text:p text:style-name="P29">필드명</text:p>
          </table:table-cell>
          <table:table-cell table:style-name="표50.A1" office:value-type="string">
            <text:p text:style-name="P29">데이터 타입</text:p>
          </table:table-cell>
          <table:table-cell table:style-name="표50.A1" office:value-type="string">
            <text:p text:style-name="P29">필수</text:p>
          </table:table-cell>
          <table:table-cell table:style-name="표50.D1" office:value-type="string">
            <text:p text:style-name="P29">설명</text:p>
          </table:table-cell>
        </table:table-row>
        <table:table-row>
          <table:table-cell table:style-name="표50.A2" office:value-type="string">
            <text:p text:style-name="P78">current_headcount</text:p>
          </table:table-cell>
          <table:table-cell table:style-name="표50.A2" office:value-type="string">
            <text:p text:style-name="P78">Integer</text:p>
          </table:table-cell>
          <table:table-cell table:style-name="표50.A2" office:value-type="string">
            <text:p text:style-name="P103">o</text:p>
          </table:table-cell>
          <table:table-cell table:style-name="표50.D2" office:value-type="string">
            <text:p text:style-name="P78">현재 인원 수를 입력한다.</text:p>
          </table:table-cell>
        </table:table-row>
        <table:table-row>
          <table:table-cell table:style-name="표50.A2" office:value-type="string">
            <text:p text:style-name="P78">target_headcount</text:p>
          </table:table-cell>
          <table:table-cell table:style-name="표50.A2" office:value-type="string">
            <text:p text:style-name="P78">Integer</text:p>
          </table:table-cell>
          <table:table-cell table:style-name="표50.A2" office:value-type="string">
            <text:p text:style-name="P103">o</text:p>
          </table:table-cell>
          <table:table-cell table:style-name="표50.D2" office:value-type="string">
            <text:p text:style-name="P78">목표 인원 수를 입력한다.</text:p>
          </table:table-cell>
        </table:table-row>
        <table:table-row>
          <table:table-cell table:style-name="표50.A2" office:value-type="string">
            <text:p text:style-name="P78">hiring_plan</text:p>
          </table:table-cell>
          <table:table-cell table:style-name="표50.A2" office:value-type="string">
            <text:p text:style-name="P78">String</text:p>
          </table:table-cell>
          <table:table-cell table:style-name="표50.A2" office:value-type="string">
            <text:p text:style-name="P101">-</text:p>
          </table:table-cell>
          <table:table-cell table:style-name="표50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50.A2" office:value-type="string">
            <text:p text:style-name="P78">training_plan</text:p>
          </table:table-cell>
          <table:table-cell table:style-name="표50.A2" office:value-type="string">
            <text:p text:style-name="P78">String </text:p>
          </table:table-cell>
          <table:table-cell table:style-name="표50.A2" office:value-type="string">
            <text:p text:style-name="P103">-</text:p>
          </table:table-cell>
          <table:table-cell table:style-name="표50.D2" office:value-type="string">
            <text:p text:style-name="P78">교육/역량 개발 계획을 기술한다.</text:p>
          </table:table-cell>
        </table:table-row>
        <table:table-row>
          <table:table-cell table:style-name="표50.A2" office:value-type="string">
            <text:p text:style-name="P78">notes</text:p>
          </table:table-cell>
          <table:table-cell table:style-name="표50.A2" office:value-type="string">
            <text:p text:style-name="P78">String</text:p>
          </table:table-cell>
          <table:table-cell table:style-name="표50.A2" office:value-type="string">
            <text:p text:style-name="P101">-</text:p>
          </table:table-cell>
          <table:table-cell table:style-name="표50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/>
      <text:p text:style-name="P8">8.4 거버넌스 및 전문성 팀 (Section 6.5)</text:p>
      <text:p text:style-name="Preformatted_20_Text"/>
      <text:p text:style-name="Preformatted_20_Text"/>
      <text:p text:style-name="Preformatted_20_Text">【역할: AI Ethics Officer】</text:p>
      <text:p text:style-name="Preformatted_20_Text"/>
      <table:table table:name="표51" table:style-name="표51">
        <table:table-column table:style-name="표51.A"/>
        <table:table-column table:style-name="표51.B"/>
        <table:table-column table:style-name="표51.C"/>
        <table:table-column table:style-name="표51.D"/>
        <table:table-row>
          <table:table-cell table:style-name="표51.A1" office:value-type="string">
            <text:p text:style-name="P29">필드명</text:p>
          </table:table-cell>
          <table:table-cell table:style-name="표51.A1" office:value-type="string">
            <text:p text:style-name="P29">데이터 타입</text:p>
          </table:table-cell>
          <table:table-cell table:style-name="표51.A1" office:value-type="string">
            <text:p text:style-name="P29">필수</text:p>
          </table:table-cell>
          <table:table-cell table:style-name="표51.D1" office:value-type="string">
            <text:p text:style-name="P29">설명</text:p>
          </table:table-cell>
        </table:table-row>
        <table:table-row>
          <table:table-cell table:style-name="표51.A2" office:value-type="string">
            <text:p text:style-name="P78">current_headcount</text:p>
          </table:table-cell>
          <table:table-cell table:style-name="표51.A2" office:value-type="string">
            <text:p text:style-name="P78">Integer</text:p>
          </table:table-cell>
          <table:table-cell table:style-name="표51.A2" office:value-type="string">
            <text:p text:style-name="P103">o</text:p>
          </table:table-cell>
          <table:table-cell table:style-name="표51.D2" office:value-type="string">
            <text:p text:style-name="P78">현재 인원 수를 입력한다.</text:p>
          </table:table-cell>
        </table:table-row>
        <table:table-row>
          <table:table-cell table:style-name="표51.A2" office:value-type="string">
            <text:p text:style-name="P78">target_headcount</text:p>
          </table:table-cell>
          <table:table-cell table:style-name="표51.A2" office:value-type="string">
            <text:p text:style-name="P78">Integer</text:p>
          </table:table-cell>
          <table:table-cell table:style-name="표51.A2" office:value-type="string">
            <text:p text:style-name="P103">o</text:p>
          </table:table-cell>
          <table:table-cell table:style-name="표51.D2" office:value-type="string">
            <text:p text:style-name="P78">목표 인원 수를 입력한다.</text:p>
          </table:table-cell>
        </table:table-row>
        <table:table-row>
          <table:table-cell table:style-name="표51.A2" office:value-type="string">
            <text:p text:style-name="P78">hiring_plan</text:p>
          </table:table-cell>
          <table:table-cell table:style-name="표51.A2" office:value-type="string">
            <text:p text:style-name="P78">String</text:p>
          </table:table-cell>
          <table:table-cell table:style-name="표51.A2" office:value-type="string">
            <text:p text:style-name="P101">-</text:p>
          </table:table-cell>
          <table:table-cell table:style-name="표51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51.A2" office:value-type="string">
            <text:p text:style-name="P78">training_plan</text:p>
          </table:table-cell>
          <table:table-cell table:style-name="표51.A2" office:value-type="string">
            <text:p text:style-name="P78">String </text:p>
          </table:table-cell>
          <table:table-cell table:style-name="표51.A2" office:value-type="string">
            <text:p text:style-name="P103">-</text:p>
          </table:table-cell>
          <table:table-cell table:style-name="표51.D2" office:value-type="string">
            <text:p text:style-name="P78">교육/역량 개발 계획을 기술한다.</text:p>
          </table:table-cell>
        </table:table-row>
        <text:soft-page-break/>
        <table:table-row>
          <table:table-cell table:style-name="표51.A2" office:value-type="string">
            <text:p text:style-name="P78">notes</text:p>
          </table:table-cell>
          <table:table-cell table:style-name="표51.A2" office:value-type="string">
            <text:p text:style-name="P78">String</text:p>
          </table:table-cell>
          <table:table-cell table:style-name="표51.A2" office:value-type="string">
            <text:p text:style-name="P101">-</text:p>
          </table:table-cell>
          <table:table-cell table:style-name="표51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>【역할: Domain Expert】</text:p>
      <text:p text:style-name="Preformatted_20_Text"/>
      <table:table table:name="표52" table:style-name="표52">
        <table:table-column table:style-name="표52.A"/>
        <table:table-column table:style-name="표52.B"/>
        <table:table-column table:style-name="표52.C"/>
        <table:table-column table:style-name="표52.D"/>
        <table:table-row>
          <table:table-cell table:style-name="표52.A1" office:value-type="string">
            <text:p text:style-name="P29">필드명</text:p>
          </table:table-cell>
          <table:table-cell table:style-name="표52.A1" office:value-type="string">
            <text:p text:style-name="P29">데이터 타입</text:p>
          </table:table-cell>
          <table:table-cell table:style-name="표52.A1" office:value-type="string">
            <text:p text:style-name="P29">필수</text:p>
          </table:table-cell>
          <table:table-cell table:style-name="표52.D1" office:value-type="string">
            <text:p text:style-name="P29">설명</text:p>
          </table:table-cell>
        </table:table-row>
        <table:table-row>
          <table:table-cell table:style-name="표52.A2" office:value-type="string">
            <text:p text:style-name="P78">current_headcount</text:p>
          </table:table-cell>
          <table:table-cell table:style-name="표52.A2" office:value-type="string">
            <text:p text:style-name="P78">Integer</text:p>
          </table:table-cell>
          <table:table-cell table:style-name="표52.A2" office:value-type="string">
            <text:p text:style-name="P103">o</text:p>
          </table:table-cell>
          <table:table-cell table:style-name="표52.D2" office:value-type="string">
            <text:p text:style-name="P78">현재 인원 수를 입력한다.</text:p>
          </table:table-cell>
        </table:table-row>
        <table:table-row>
          <table:table-cell table:style-name="표52.A2" office:value-type="string">
            <text:p text:style-name="P78">target_headcount</text:p>
          </table:table-cell>
          <table:table-cell table:style-name="표52.A2" office:value-type="string">
            <text:p text:style-name="P78">Integer</text:p>
          </table:table-cell>
          <table:table-cell table:style-name="표52.A2" office:value-type="string">
            <text:p text:style-name="P103">o</text:p>
          </table:table-cell>
          <table:table-cell table:style-name="표52.D2" office:value-type="string">
            <text:p text:style-name="P78">목표 인원 수를 입력한다.</text:p>
          </table:table-cell>
        </table:table-row>
        <table:table-row>
          <table:table-cell table:style-name="표52.A2" office:value-type="string">
            <text:p text:style-name="P78">hiring_plan</text:p>
          </table:table-cell>
          <table:table-cell table:style-name="표52.A2" office:value-type="string">
            <text:p text:style-name="P78">String</text:p>
          </table:table-cell>
          <table:table-cell table:style-name="표52.A2" office:value-type="string">
            <text:p text:style-name="P101">-</text:p>
          </table:table-cell>
          <table:table-cell table:style-name="표52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52.A2" office:value-type="string">
            <text:p text:style-name="P78">training_plan</text:p>
          </table:table-cell>
          <table:table-cell table:style-name="표52.A2" office:value-type="string">
            <text:p text:style-name="P78">String </text:p>
          </table:table-cell>
          <table:table-cell table:style-name="표52.A2" office:value-type="string">
            <text:p text:style-name="P103">-</text:p>
          </table:table-cell>
          <table:table-cell table:style-name="표52.D2" office:value-type="string">
            <text:p text:style-name="P78">교육/역량 개발 계획을 기술한다.</text:p>
          </table:table-cell>
        </table:table-row>
        <table:table-row>
          <table:table-cell table:style-name="표52.A2" office:value-type="string">
            <text:p text:style-name="P78">notes</text:p>
          </table:table-cell>
          <table:table-cell table:style-name="표52.A2" office:value-type="string">
            <text:p text:style-name="P78">String</text:p>
          </table:table-cell>
          <table:table-cell table:style-name="표52.A2" office:value-type="string">
            <text:p text:style-name="P101">-</text:p>
          </table:table-cell>
          <table:table-cell table:style-name="표52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reformatted_20_Text">【역할: QA Engineer】</text:p>
      <text:p text:style-name="Preformatted_20_Text"/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row>
          <table:table-cell table:style-name="표53.A1" office:value-type="string">
            <text:p text:style-name="P29">필드명</text:p>
          </table:table-cell>
          <table:table-cell table:style-name="표53.A1" office:value-type="string">
            <text:p text:style-name="P29">데이터 타입</text:p>
          </table:table-cell>
          <table:table-cell table:style-name="표53.A1" office:value-type="string">
            <text:p text:style-name="P29">필수</text:p>
          </table:table-cell>
          <table:table-cell table:style-name="표53.D1" office:value-type="string">
            <text:p text:style-name="P29">설명</text:p>
          </table:table-cell>
        </table:table-row>
        <table:table-row>
          <table:table-cell table:style-name="표53.A2" office:value-type="string">
            <text:p text:style-name="P78">current_headcount</text:p>
          </table:table-cell>
          <table:table-cell table:style-name="표53.A2" office:value-type="string">
            <text:p text:style-name="P78">Integer</text:p>
          </table:table-cell>
          <table:table-cell table:style-name="표53.A2" office:value-type="string">
            <text:p text:style-name="P103">o</text:p>
          </table:table-cell>
          <table:table-cell table:style-name="표53.D2" office:value-type="string">
            <text:p text:style-name="P78">현재 인원 수를 입력한다.</text:p>
          </table:table-cell>
        </table:table-row>
        <table:table-row>
          <table:table-cell table:style-name="표53.A2" office:value-type="string">
            <text:p text:style-name="P78">target_headcount</text:p>
          </table:table-cell>
          <table:table-cell table:style-name="표53.A2" office:value-type="string">
            <text:p text:style-name="P78">Integer</text:p>
          </table:table-cell>
          <table:table-cell table:style-name="표53.A2" office:value-type="string">
            <text:p text:style-name="P103">o</text:p>
          </table:table-cell>
          <table:table-cell table:style-name="표53.D2" office:value-type="string">
            <text:p text:style-name="P78">목표 인원 수를 입력한다.</text:p>
          </table:table-cell>
        </table:table-row>
        <table:table-row>
          <table:table-cell table:style-name="표53.A2" office:value-type="string">
            <text:p text:style-name="P78">hiring_plan</text:p>
          </table:table-cell>
          <table:table-cell table:style-name="표53.A2" office:value-type="string">
            <text:p text:style-name="P78">String</text:p>
          </table:table-cell>
          <table:table-cell table:style-name="표53.A2" office:value-type="string">
            <text:p text:style-name="P101">-</text:p>
          </table:table-cell>
          <table:table-cell table:style-name="표53.D2" office:value-type="string">
            <text:p text:style-name="P78">충원 계획을 기술한다.</text:p>
            <text:p text:style-name="P78">(내부 육성, 외부 채용, 외주 등)</text:p>
          </table:table-cell>
        </table:table-row>
        <table:table-row>
          <table:table-cell table:style-name="표53.A2" office:value-type="string">
            <text:p text:style-name="P78">training_plan</text:p>
          </table:table-cell>
          <table:table-cell table:style-name="표53.A2" office:value-type="string">
            <text:p text:style-name="P78">String </text:p>
          </table:table-cell>
          <table:table-cell table:style-name="표53.A2" office:value-type="string">
            <text:p text:style-name="P103">-</text:p>
          </table:table-cell>
          <table:table-cell table:style-name="표53.D2" office:value-type="string">
            <text:p text:style-name="P78">교육/역량 개발 계획을 기술한다.</text:p>
          </table:table-cell>
        </table:table-row>
        <table:table-row>
          <table:table-cell table:style-name="표53.A2" office:value-type="string">
            <text:p text:style-name="P78">notes</text:p>
          </table:table-cell>
          <table:table-cell table:style-name="표53.A2" office:value-type="string">
            <text:p text:style-name="P78">String</text:p>
          </table:table-cell>
          <table:table-cell table:style-name="표53.A2" office:value-type="string">
            <text:p text:style-name="P101">-</text:p>
          </table:table-cell>
          <table:table-cell table:style-name="표53.D2" office:value-type="string">
            <text:p text:style-name="P78">비고 사항을 기술한다.</text:p>
          </table:table-cell>
        </table:table-row>
      </table:table>
      <text:p text:style-name="P136"/>
      <text:p text:style-name="Preformatted_20_Text"/>
      <text:p text:style-name="P8"/>
      <text:p text:style-name="P8">8.5 조직 구조 정보 (추가 입력)</text:p>
      <text:p text:style-name="Preformatted_20_Text"/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row>
          <table:table-cell table:style-name="표54.A1" office:value-type="string">
            <text:p text:style-name="P29">필드명</text:p>
          </table:table-cell>
          <table:table-cell table:style-name="표54.A1" office:value-type="string">
            <text:p text:style-name="P29">데이터 타입</text:p>
          </table:table-cell>
          <table:table-cell table:style-name="표54.A1" office:value-type="string">
            <text:p text:style-name="P29">필수</text:p>
          </table:table-cell>
          <table:table-cell table:style-name="표54.D1" office:value-type="string">
            <text:p text:style-name="P29">설명</text:p>
          </table:table-cell>
        </table:table-row>
        <table:table-row>
          <table:table-cell table:style-name="표54.A2" office:value-type="string">
            <text:p text:style-name="P78">organization_structure</text:p>
          </table:table-cell>
          <table:table-cell table:style-name="표54.A2" office:value-type="string">
            <text:p text:style-name="P78">String</text:p>
          </table:table-cell>
          <table:table-cell table:style-name="표54.A2" office:value-type="string">
            <text:p text:style-name="P104">o</text:p>
          </table:table-cell>
          <table:table-cell table:style-name="표54.D2" office:value-type="string">
            <text:p text:style-name="P78">조직 구조를 기술한다.</text:p>
            <text:p text:style-name="P78">(예: CoE 중심형, 분산형, 하이브리드형 등)</text:p>
          </table:table-cell>
        </table:table-row>
        <table:table-row>
          <table:table-cell table:style-name="표54.A2" office:value-type="string">
            <text:p text:style-name="P78">reporting_hierarchy</text:p>
          </table:table-cell>
          <table:table-cell table:style-name="표54.A2" office:value-type="string">
            <text:p text:style-name="P78">String</text:p>
          </table:table-cell>
          <table:table-cell table:style-name="표54.A2" office:value-type="string">
            <text:p text:style-name="P104">o</text:p>
          </table:table-cell>
          <table:table-cell table:style-name="표54.D2" office:value-type="string">
            <text:p text:style-name="P78">보고 체계를 기술한다.</text:p>
            <text:p text:style-name="P78">CTO/CDO 직속 여부, 사업부별 보고 라인 등을 명시한다.</text:p>
          </table:table-cell>
        </table:table-row>
        <table:table-row>
          <table:table-cell table:style-name="표54.A2" office:value-type="string">
            <text:p text:style-name="P78">outsourcing_plan</text:p>
          </table:table-cell>
          <table:table-cell table:style-name="표54.A2" office:value-type="string">
            <text:p text:style-name="P78">String</text:p>
          </table:table-cell>
          <table:table-cell table:style-name="표54.A2" office:value-type="string">
            <text:p text:style-name="P101">-</text:p>
          </table:table-cell>
          <table:table-cell table:style-name="표54.D2" office:value-type="string">
            <text:p text:style-name="P78">외주/파트너 활용 계획을 기술한다.</text:p>
          </table:table-cell>
        </table:table-row>
        <table:table-row>
          <table:table-cell table:style-name="표54.A2" office:value-type="string">
            <text:p text:style-name="P78">training_budget</text:p>
          </table:table-cell>
          <table:table-cell table:style-name="표54.A2" office:value-type="string">
            <text:p text:style-name="P78">Float</text:p>
          </table:table-cell>
          <table:table-cell table:style-name="표54.A2" office:value-type="string">
            <text:p text:style-name="P103">-</text:p>
          </table:table-cell>
          <table:table-cell table:style-name="표54.D2" office:value-type="string">
            <text:p text:style-name="P78">교육 예산을 억원 단위로 <text:s/>입력한다.</text:p>
          </table:table-cell>
        </table:table-row>
        <table:table-row>
          <table:table-cell table:style-name="표54.A2" office:value-type="string">
            <text:p text:style-name="P78">hiring_timeline</text:p>
          </table:table-cell>
          <table:table-cell table:style-name="표54.A2" office:value-type="string">
            <text:p text:style-name="P78">String</text:p>
          </table:table-cell>
          <table:table-cell table:style-name="표54.A2" office:value-type="string">
            <text:p text:style-name="P101">-</text:p>
          </table:table-cell>
          <table:table-cell table:style-name="표54.D2" office:value-type="string">
            <text:p text:style-name="P78">채용 타임라인을 기술한다.</text:p>
          </table:table-cell>
        </table:table-row>
      </table:table>
      <text:p text:style-name="P136"/>
      <text:p text:style-name="Preformatted_20_Text"/>
      <text:p text:style-name="P1">【인력 구성 입력 항목 합계: 약 60~65개 필드 (12역할 × 5필드 + 조직 정보 5필드)】</text:p>
      <text:p text:style-name="Preformatted_20_Text"/>
      <text:p text:style-name="Preformatted_20_Text"/>
      <text:p text:style-name="Preformatted_20_Text"/>
      <text:p text:style-name="P4"><text:soft-page-break/>【 STEP 9 】 시나리오 분석 및 선택</text:p>
      <text:p text:style-name="Preformatted_20_Text"/>
      <text:p text:style-name="Preformatted_20_Text">API 엔드포인트: POST /api/v1/projects/{project_id}/scenarios</text:p>
      <text:p text:style-name="Preformatted_20_Text">요청 모델: GenerateScenarioRequest</text:p>
      <text:p text:style-name="Preformatted_20_Text"/>
      <text:p text:style-name="Preformatted_20_Text">시스템은 입력된 데이터를 기반으로 3가지 시나리오(보수적, 균형, 적극적)를 자동 생성한다. 컨설턴트는 시나리오 생성을 위한 파라미터를 입력한다.</text:p>
      <text:p text:style-name="Preformatted_20_Text"/>
      <text:p text:style-name="Preformatted_20_Text"/>
      <text:p text:style-name="P8">9.1 시나리오 파라미터 (Scenario Parameters)</text:p>
      <text:p text:style-name="P8"/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row>
          <table:table-cell table:style-name="표55.A1" office:value-type="string">
            <text:p text:style-name="P30">필드명</text:p>
          </table:table-cell>
          <table:table-cell table:style-name="표55.A1" office:value-type="string">
            <text:p text:style-name="P30">데이터 타입</text:p>
          </table:table-cell>
          <table:table-cell table:style-name="표55.A1" office:value-type="string">
            <text:p text:style-name="P30">필수</text:p>
          </table:table-cell>
          <table:table-cell table:style-name="표55.D1" office:value-type="string">
            <text:p text:style-name="P30">설명</text:p>
          </table:table-cell>
        </table:table-row>
        <table:table-row>
          <table:table-cell table:style-name="표55.A2" office:value-type="string">
            <text:p text:style-name="P79">investment_budget</text:p>
          </table:table-cell>
          <table:table-cell table:style-name="표55.A2" office:value-type="string">
            <text:p text:style-name="P79">Float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79">투자 예산을 억원 단위로 입력한다. 시나리오별 예산 배분의 기준이 된다.</text:p>
          </table:table-cell>
        </table:table-row>
        <table:table-row>
          <table:table-cell table:style-name="표55.A2" office:value-type="string">
            <text:p text:style-name="P79">timeline_months</text:p>
          </table:table-cell>
          <table:table-cell table:style-name="표55.A2" office:value-type="string">
            <text:p text:style-name="P79">Integer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79">추진 기간을 개월 단위로 입력한다. 시나리오별 일정 산정의 기준이 된다.</text:p>
          </table:table-cell>
        </table:table-row>
        <table:table-row>
          <table:table-cell table:style-name="표55.A2" office:value-type="string">
            <text:p text:style-name="P79">internal_resource_ratio</text:p>
          </table:table-cell>
          <table:table-cell table:style-name="표55.A2" office:value-type="string">
            <text:p text:style-name="P79">Float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79">내부 자원 활용 비율을 입력한다. (0.0~1.0)</text:p>
            <text:p text:style-name="P79">내부 인력 활용 대 외부 자원 활용의 비율이다.</text:p>
          </table:table-cell>
        </table:table-row>
        <table:table-row>
          <table:table-cell table:style-name="표55.A2" office:value-type="string">
            <text:p text:style-name="P79">outsourcing_ratio</text:p>
          </table:table-cell>
          <table:table-cell table:style-name="표55.A2" office:value-type="string">
            <text:p text:style-name="P79">Float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79">외주 비율을 입력한다.</text:p>
            <text:p text:style-name="P79">(0.0~1.0)</text:p>
            <text:p text:style-name="P79">전체 개발 중 외주 비중이다.</text:p>
          </table:table-cell>
        </table:table-row>
        <table:table-row>
          <table:table-cell table:style-name="표55.A2" office:value-type="string">
            <text:p text:style-name="P79">risk_appetite</text:p>
          </table:table-cell>
          <table:table-cell table:style-name="표55.A2" office:value-type="string">
            <text:p text:style-name="P79">Enum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79">리스크 허용도를 선택한다.</text:p>
            <text:p text:style-name="P79">- low: 보수적 (검증된 기술)</text:p>
            <text:p text:style-name="P79">- medium: 중간 (균형 접근)</text:p>
            <text:p text:style-name="P79">- high: 적극적 (신기술 도전)</text:p>
            <text:p text:style-name="P79">- critical: 최대 (혁신 추구)</text:p>
          </table:table-cell>
        </table:table-row>
        <table:table-row>
          <table:table-cell table:style-name="표55.A2" office:value-type="string">
            <text:p text:style-name="P79">focus_areas</text:p>
          </table:table-cell>
          <table:table-cell table:style-name="표55.A2" office:value-type="string">
            <text:p text:style-name="P79">List</text:p>
            <text:p text:style-name="P79">[String]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80">집중 영역을 선택한다. (복수 선택 가능)</text:p>
            <text:p text:style-name="P80">예: ["cost_reduction", "revenue_growth", "customer_experience", "operational_efficiency"]</text:p>
          </table:table-cell>
        </table:table-row>
        <table:table-row>
          <table:table-cell table:style-name="표55.A2" office:value-type="string">
            <text:p text:style-name="P79">roi_weight</text:p>
          </table:table-cell>
          <table:table-cell table:style-name="표55.A2" office:value-type="string">
            <text:p text:style-name="P79">Float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80">ROI 가중치를 입력한다. (0.0~1.0)</text:p>
            <text:p text:style-name="P80">시나리오 평가 시 ROI의 중요도를 설정한다.</text:p>
          </table:table-cell>
        </table:table-row>
        <table:table-row>
          <table:table-cell table:style-name="표55.A2" office:value-type="string">
            <text:p text:style-name="P79">strategic_alignment_weight</text:p>
          </table:table-cell>
          <table:table-cell table:style-name="표55.A2" office:value-type="string">
            <text:p text:style-name="P79">Float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80">전략 정합성 가중치를 입력한다. (0.0~1.0)</text:p>
            <text:p text:style-name="P80">기업 전략과의 정합성 중요도를 설정한다.</text:p>
          </table:table-cell>
        </table:table-row>
        <table:table-row>
          <table:table-cell table:style-name="표55.A2" office:value-type="string">
            <text:p text:style-name="P79">feasibility_weight</text:p>
          </table:table-cell>
          <table:table-cell table:style-name="표55.A2" office:value-type="string">
            <text:p text:style-name="P79">Float</text:p>
          </table:table-cell>
          <table:table-cell table:style-name="표55.A2" office:value-type="string">
            <text:p text:style-name="P105">o</text:p>
          </table:table-cell>
          <table:table-cell table:style-name="표55.D2" office:value-type="string">
            <text:p text:style-name="P80">실현 가능성 가중치를 입력한다.</text:p>
            <text:p text:style-name="P80">(0.0~1.0)</text:p>
            <text:p text:style-name="P80">기술적/조직적 실현 가능성 중요도를 설정한다.</text:p>
          </table:table-cell>
        </table:table-row>
      </table:table>
      <text:p text:style-name="P1"/>
      <text:p text:style-name="P1">【시나리오 파라미터 입력 항목 합계: 9개 필드】</text:p>
      <text:p text:style-name="P1"/>
      <text:p text:style-name="P1">※ 참고: 시나리오 생성 후, 시스템은 3가지 시나리오를 자동 생성하며, 인간 컨설턴트는 이를 검토한 후 STEP 10에서 피드백을 제출한다.</text:p>
      <text:p text:style-name="Preformatted_20_Text"><text:soft-page-break/><text:span text:style-name="T4">【 STEP 10 】 협업 및 검토 (피드백/승인)</text:span></text:p>
      <text:p text:style-name="Preformatted_20_Text"/>
      <text:p text:style-name="Preformatted_20_Text"/>
      <text:p text:style-name="Preformatted_20_Text">인간-AI 협업 단계로, 생성된 분석 결과와 시나리오에 대해 컨설턴트 및 고객 담당자의 피드백을 수집하고 최종 승인을 진행한다.</text:p>
      <text:p text:style-name="Preformatted_20_Text"/>
      <text:p text:style-name="Preformatted_20_Text"/>
      <text:p text:style-name="P8">10.1 피드백 제출 (Feedback Submission)</text:p>
      <text:p text:style-name="Preformatted_20_Text"/>
      <text:p text:style-name="Preformatted_20_Text">API 엔드포인트: POST /api/v1/projects/{project_id}/feedback</text:p>
      <text:p text:style-name="Preformatted_20_Text">요청 모델: SubmitFeedbackRequest</text:p>
      <text:p text:style-name="Preformatted_20_Text"/>
      <table:table table:name="표56" table:style-name="표56">
        <table:table-column table:style-name="표56.A"/>
        <table:table-column table:style-name="표56.B"/>
        <table:table-column table:style-name="표56.C"/>
        <table:table-column table:style-name="표56.D"/>
        <table:table-row>
          <table:table-cell table:style-name="표56.A1" office:value-type="string">
            <text:p text:style-name="P31">필드명</text:p>
          </table:table-cell>
          <table:table-cell table:style-name="표56.A1" office:value-type="string">
            <text:p text:style-name="P31">데이터 타입</text:p>
          </table:table-cell>
          <table:table-cell table:style-name="표56.A1" office:value-type="string">
            <text:p text:style-name="P31">필수</text:p>
          </table:table-cell>
          <table:table-cell table:style-name="표56.D1" office:value-type="string">
            <text:p text:style-name="P31">설명</text:p>
          </table:table-cell>
        </table:table-row>
        <table:table-row>
          <table:table-cell table:style-name="표56.A2" office:value-type="string">
            <text:p text:style-name="P81">feedback_type</text:p>
          </table:table-cell>
          <table:table-cell table:style-name="표56.A2" office:value-type="string">
            <text:p text:style-name="P81">Enum</text:p>
          </table:table-cell>
          <table:table-cell table:style-name="표56.A2" office:value-type="string">
            <text:p text:style-name="P106"/>
          </table:table-cell>
          <table:table-cell table:style-name="표56.D2" office:value-type="string">
            <text:p text:style-name="P81">피드백 유형을 선택한다.</text:p>
            <text:p text:style-name="P81">- approval: 승인</text:p>
            <text:p text:style-name="P81">- rejection: 반려</text:p>
            <text:p text:style-name="P81">- modification: 수정 요청</text:p>
            <text:p text:style-name="P81">- question: 질의</text:p>
          </table:table-cell>
        </table:table-row>
        <table:table-row>
          <table:table-cell table:style-name="표56.A2" office:value-type="string">
            <text:p text:style-name="P81">stage</text:p>
          </table:table-cell>
          <table:table-cell table:style-name="표56.A2" office:value-type="string">
            <text:p text:style-name="P81">Integer (1-5)</text:p>
          </table:table-cell>
          <table:table-cell table:style-name="표56.A2" office:value-type="string">
            <text:p text:style-name="P106"/>
          </table:table-cell>
          <table:table-cell table:style-name="표56.D2" office:value-type="string">
            <text:p text:style-name="P81">해당 단계를 선택한다.</text:p>
            <text:p text:style-name="P81">피드백이 관련된 컨설팅 Stage (1~5)이다.</text:p>
          </table:table-cell>
        </table:table-row>
        <table:table-row>
          <table:table-cell table:style-name="표56.A2" office:value-type="string">
            <text:p text:style-name="P81">content</text:p>
          </table:table-cell>
          <table:table-cell table:style-name="표56.A2" office:value-type="string">
            <text:p text:style-name="P81">String</text:p>
          </table:table-cell>
          <table:table-cell table:style-name="표56.A2" office:value-type="string">
            <text:p text:style-name="P106"/>
          </table:table-cell>
          <table:table-cell table:style-name="표56.D2" office:value-type="string">
            <text:p text:style-name="P81">피드백 내용을 상세히 기술한다.</text:p>
            <text:p text:style-name="P81">수정 요청 시 구체적인 수정 사항을, 질의 시 질문 내용을 명확히 작성한다.</text:p>
          </table:table-cell>
        </table:table-row>
        <table:table-row>
          <table:table-cell table:style-name="표56.A2" office:value-type="string">
            <text:p text:style-name="P81">reviewer_role</text:p>
          </table:table-cell>
          <table:table-cell table:style-name="표56.A2" office:value-type="string">
            <text:p text:style-name="P81">Enum</text:p>
          </table:table-cell>
          <table:table-cell table:style-name="표56.A2" office:value-type="string">
            <text:p text:style-name="P106"/>
          </table:table-cell>
          <table:table-cell table:style-name="표56.D2" office:value-type="string">
            <text:p text:style-name="P81">리뷰어 역할을 선택한다.</text:p>
            <text:p text:style-name="P81">- manager: 프로젝트 매니저</text:p>
            <text:p text:style-name="P81">- executive: 경영진</text:p>
            <text:p text:style-name="P81">- specialist: 전문가</text:p>
            <text:p text:style-name="P81">- customer: 고객 담당자</text:p>
          </table:table-cell>
        </table:table-row>
        <table:table-row>
          <table:table-cell table:style-name="표56.A2" office:value-type="string">
            <text:p text:style-name="P81">reviewer_name</text:p>
          </table:table-cell>
          <table:table-cell table:style-name="표56.A2" office:value-type="string">
            <text:p text:style-name="P81">String</text:p>
          </table:table-cell>
          <table:table-cell table:style-name="표56.A2" office:value-type="string">
            <text:p text:style-name="P106"/>
          </table:table-cell>
          <table:table-cell table:style-name="표56.D2" office:value-type="string">
            <text:p text:style-name="P81">리뷰어 이름을 입력한다.</text:p>
          </table:table-cell>
        </table:table-row>
        <table:table-row>
          <table:table-cell table:style-name="표56.A2" office:value-type="string">
            <text:p text:style-name="P81">priority</text:p>
          </table:table-cell>
          <table:table-cell table:style-name="표56.A2" office:value-type="string">
            <text:p text:style-name="P81">Enum</text:p>
          </table:table-cell>
          <table:table-cell table:style-name="표56.A2" office:value-type="string">
            <text:p text:style-name="P106"/>
          </table:table-cell>
          <table:table-cell table:style-name="표56.D2" office:value-type="string">
            <text:p text:style-name="P81">우선순위를 선택한다.</text:p>
            <text:p text:style-name="P81">- low: 낮음 (참고 사항)</text:p>
            <text:p text:style-name="P81">- medium: 보통 (일반 피드백)</text:p>
            <text:p text:style-name="P81">- high: 높음 (긴급 반영 필요)</text:p>
          </table:table-cell>
        </table:table-row>
      </table:table>
      <text:p text:style-name="P137"/>
      <text:p text:style-name="Preformatted_20_Text"/>
      <text:p text:style-name="P1">【피드백 제출 입력 항목 합계: 6개 필드】</text:p>
      <text:p text:style-name="Preformatted_20_Text"/>
      <text:p text:style-name="Preformatted_20_Text"/>
      <text:p text:style-name="P8"/>
      <text:p text:style-name="P10">10.2 시나리오 승인 (Scenario Approval)</text:p>
      <text:p text:style-name="Preformatted_20_Text"/>
      <text:p text:style-name="Preformatted_20_Text">API 엔드포인트: POST /api/v1/projects/{project_id}/scenarios/{scenario_id}/approve</text:p>
      <text:p text:style-name="Preformatted_20_Text">요청 모델: ApproveScenarioRequest</text:p>
      <text:p text:style-name="Preformatted_20_Text"/>
      <table:table table:name="표57" table:style-name="표57">
        <table:table-column table:style-name="표57.A"/>
        <table:table-column table:style-name="표57.B"/>
        <table:table-column table:style-name="표57.C"/>
        <table:table-column table:style-name="표57.D"/>
        <table:table-row>
          <table:table-cell table:style-name="표57.A1" office:value-type="string">
            <text:p text:style-name="P32">필드명</text:p>
          </table:table-cell>
          <table:table-cell table:style-name="표57.A1" office:value-type="string">
            <text:p text:style-name="P32">데이터 타입</text:p>
          </table:table-cell>
          <table:table-cell table:style-name="표57.A1" office:value-type="string">
            <text:p text:style-name="P32">필수</text:p>
          </table:table-cell>
          <table:table-cell table:style-name="표57.D1" office:value-type="string">
            <text:p text:style-name="P32">설명</text:p>
          </table:table-cell>
        </table:table-row>
        <table:table-row>
          <table:table-cell table:style-name="표57.A2" office:value-type="string">
            <text:p text:style-name="P81">scenario_id</text:p>
          </table:table-cell>
          <table:table-cell table:style-name="표57.A2" office:value-type="string">
            <text:p text:style-name="P81">String</text:p>
          </table:table-cell>
          <table:table-cell table:style-name="표57.A2" office:value-type="string">
            <text:p text:style-name="P108">o</text:p>
          </table:table-cell>
          <table:table-cell table:style-name="표57.D2" office:value-type="string">
            <text:p text:style-name="P81">승인할 시나리오 ID를 지정한다. (보수적/균형/적극적 중 하나)</text:p>
          </table:table-cell>
        </table:table-row>
        <table:table-row>
          <table:table-cell table:style-name="표57.A2" office:value-type="string">
            <text:p text:style-name="P81">approval_comment</text:p>
          </table:table-cell>
          <table:table-cell table:style-name="표57.A2" office:value-type="string">
            <text:p text:style-name="P81">String</text:p>
          </table:table-cell>
          <table:table-cell table:style-name="표57.A2" office:value-type="string">
            <text:p text:style-name="P107">-</text:p>
          </table:table-cell>
          <table:table-cell table:style-name="표57.D2" office:value-type="string">
            <text:p text:style-name="P81">승인 코멘트를 입력한다.</text:p>
            <text:p text:style-name="P81">승인 사유나 추가 지시사항을 기재할 수 있다.</text:p>
          </table:table-cell>
        </table:table-row>
        <table:table-row>
          <table:table-cell table:style-name="표57.A2" office:value-type="string">
            <text:p text:style-name="P81">approver_name</text:p>
          </table:table-cell>
          <table:table-cell table:style-name="표57.A2" office:value-type="string">
            <text:p text:style-name="P81">String</text:p>
          </table:table-cell>
          <table:table-cell table:style-name="표57.A2" office:value-type="string">
            <text:p text:style-name="P108">o</text:p>
          </table:table-cell>
          <table:table-cell table:style-name="표57.D2" office:value-type="string">
            <text:p text:style-name="P81">승인자 이름을 입력한다.</text:p>
          </table:table-cell>
        </table:table-row>
        <table:table-row>
          <table:table-cell table:style-name="표57.A2" office:value-type="string">
            <text:p text:style-name="P81">approver_role</text:p>
          </table:table-cell>
          <table:table-cell table:style-name="표57.A2" office:value-type="string">
            <text:p text:style-name="P81">String</text:p>
          </table:table-cell>
          <table:table-cell table:style-name="표57.A2" office:value-type="string">
            <text:p text:style-name="P108">o</text:p>
          </table:table-cell>
          <table:table-cell table:style-name="표57.D2" office:value-type="string">
            <text:p text:style-name="P81">승인자 역할을 입력한다.</text:p>
          </table:table-cell>
        </table:table-row>
      </table:table>
      <text:p text:style-name="P138"/>
      <text:p text:style-name="Preformatted_20_Text"/>
      <text:p text:style-name="P1">【시나리오 승인 입력 항목 합계: 4개 필드】</text:p>
      <text:p text:style-name="Preformatted_20_Text"/>
      <text:p text:style-name="Preformatted_20_Text"/>
      <text:p text:style-name="Preformatted_20_Text"/>
      <text:p text:style-name="P4">【 STEP 11 】 최종 보고서 생성</text:p>
      <text:p text:style-name="Preformatted_20_Text"/>
      <text:p text:style-name="Preformatted_20_Text">API 엔드포인트: POST /api/v1/projects/{project_id}/reports</text:p>
      <text:p text:style-name="Preformatted_20_Text">요청 모델: GenerateReportRequest</text:p>
      <text:p text:style-name="Preformatted_20_Text"/>
      <text:p text:style-name="Preformatted_20_Text">최종 컨설팅 보고서 생성을 요청한다. 시스템은 지금까지 입력된 모든 데이터를 종합하여 자동으로 보고서를 생성한다.</text:p>
      <text:p text:style-name="Preformatted_20_Text"/>
      <text:p text:style-name="Preformatted_20_Text"/>
      <text:p text:style-name="P8">11.1 보고서 생성 요청 (Report Generation Request)</text:p>
      <text:p text:style-name="Preformatted_20_Text"/>
      <text:p text:style-name="Preformatted_20_Text"/>
      <table:table table:name="표58" table:style-name="표58">
        <table:table-column table:style-name="표58.A"/>
        <table:table-column table:style-name="표58.B"/>
        <table:table-column table:style-name="표58.C"/>
        <table:table-column table:style-name="표58.D"/>
        <table:table-row>
          <table:table-cell table:style-name="표58.A1" office:value-type="string">
            <text:p text:style-name="P32">필드명</text:p>
          </table:table-cell>
          <table:table-cell table:style-name="표58.A1" office:value-type="string">
            <text:p text:style-name="P32">데이터 타입</text:p>
          </table:table-cell>
          <table:table-cell table:style-name="표58.A1" office:value-type="string">
            <text:p text:style-name="P32">필수</text:p>
          </table:table-cell>
          <table:table-cell table:style-name="표58.D1" office:value-type="string">
            <text:p text:style-name="P32">설명</text:p>
          </table:table-cell>
        </table:table-row>
        <table:table-row>
          <table:table-cell table:style-name="표58.A2" office:value-type="string">
            <text:p text:style-name="P81">report_type</text:p>
          </table:table-cell>
          <table:table-cell table:style-name="표58.A2" office:value-type="string">
            <text:p text:style-name="P81">Enum </text:p>
          </table:table-cell>
          <table:table-cell table:style-name="표58.A2" office:value-type="string">
            <text:p text:style-name="P108">o</text:p>
          </table:table-cell>
          <table:table-cell table:style-name="표58.D2" office:value-type="string">
            <text:p text:style-name="P81">보고서 유형을 선택한다.</text:p>
            <text:p text:style-name="P81">- executive_summary:경영진 요약 보고서</text:p>
            <text:p text:style-name="P81">- full_report: 전체 컨설팅 보고서</text:p>
            <text:p text:style-name="P81">- technical_appendix:기술 부록</text:p>
            <text:p text:style-name="P81">- implementation_guide:구현 가이드</text:p>
          </table:table-cell>
        </table:table-row>
        <table:table-row>
          <table:table-cell table:style-name="표58.A2" office:value-type="string">
            <text:p text:style-name="P81">format</text:p>
          </table:table-cell>
          <table:table-cell table:style-name="표58.A2" office:value-type="string">
            <text:p text:style-name="P81">Enum </text:p>
          </table:table-cell>
          <table:table-cell table:style-name="표58.A2" office:value-type="string">
            <text:p text:style-name="P108">o</text:p>
          </table:table-cell>
          <table:table-cell table:style-name="표58.D2" office:value-type="string">
            <text:p text:style-name="P81">출력 형식을 선택한다.</text:p>
            <text:p text:style-name="P81">- docx: Microsoft Word</text:p>
            <text:p text:style-name="P81">- pdf: PDF</text:p>
            <text:p text:style-name="P81">- html: HTML</text:p>
          </table:table-cell>
        </table:table-row>
        <table:table-row>
          <table:table-cell table:style-name="표58.A2" office:value-type="string">
            <text:p text:style-name="P81">language</text:p>
          </table:table-cell>
          <table:table-cell table:style-name="표58.A2" office:value-type="string">
            <text:p text:style-name="P81">Enum </text:p>
          </table:table-cell>
          <table:table-cell table:style-name="표58.A2" office:value-type="string">
            <text:p text:style-name="P108">o</text:p>
          </table:table-cell>
          <table:table-cell table:style-name="표58.D2" office:value-type="string">
            <text:p text:style-name="P81">보고서 언어를 선택한다.</text:p>
            <text:p text:style-name="P82">- ko: 한국어</text:p>
            <text:p text:style-name="P82">- en: 영어</text:p>
          </table:table-cell>
        </table:table-row>
        <table:table-row>
          <table:table-cell table:style-name="표58.A2" office:value-type="string">
            <text:p text:style-name="P81">include_sections</text:p>
          </table:table-cell>
          <table:table-cell table:style-name="표58.A2" office:value-type="string">
            <text:p text:style-name="P81">List</text:p>
            <text:p text:style-name="P81">[String]</text:p>
          </table:table-cell>
          <table:table-cell table:style-name="표58.A2" office:value-type="string">
            <text:p text:style-name="P108">o</text:p>
          </table:table-cell>
          <table:table-cell table:style-name="표58.D2" office:value-type="string">
            <text:p text:style-name="P82">포함할 섹션을 선택한다.</text:p>
            <text:p text:style-name="P82">(기본값: 전체 섹션)</text:p>
            <text:p text:style-name="P82">예: ["maturity_assessment", <text:soft-page-break/>"opportunity_analysis", "roadmap", "scenarios", "mlops_standards", </text:p>
            <text:p text:style-name="P82"><text:s/>"personnel_plan"]</text:p>
          </table:table-cell>
        </table:table-row>
        <table:table-row>
          <table:table-cell table:style-name="표58.A2" office:value-type="string">
            <text:p text:style-name="P81">custom_title</text:p>
          </table:table-cell>
          <table:table-cell table:style-name="표58.A2" office:value-type="string">
            <text:p text:style-name="P81">String</text:p>
          </table:table-cell>
          <table:table-cell table:style-name="표58.A2" office:value-type="string">
            <text:p text:style-name="P108">-</text:p>
          </table:table-cell>
          <table:table-cell table:style-name="표58.D2" office:value-type="string">
            <text:p text:style-name="P82">사용자 정의 제목을 입력한다.</text:p>
            <text:p text:style-name="P139">(기본값: 자동 생성)</text:p>
          </table:table-cell>
        </table:table-row>
        <table:table-row>
          <table:table-cell table:style-name="표58.A2" office:value-type="string">
            <text:p text:style-name="P81">additional_notes</text:p>
          </table:table-cell>
          <table:table-cell table:style-name="표58.A2" office:value-type="string">
            <text:p text:style-name="P81">String</text:p>
          </table:table-cell>
          <table:table-cell table:style-name="표58.A2" office:value-type="string">
            <text:p text:style-name="P108">-</text:p>
          </table:table-cell>
          <table:table-cell table:style-name="표58.D2" office:value-type="string">
            <text:p text:style-name="P82">추가 메모를 입력한다.</text:p>
            <text:p text:style-name="P82">보고서에 반영할 추가 사항을 기재한다.</text:p>
          </table:table-cell>
        </table:table-row>
      </table:table>
      <text:p text:style-name="P138"/>
      <text:p text:style-name="Preformatted_20_Text"/>
      <text:p text:style-name="P1">【보고서 생성 입력 항목 합계: 6개 필드】</text:p>
      <text:p text:style-name="Preformatted_20_Text"/>
      <text:p text:style-name="Preformatted_20_Text"/>
      <text:p text:style-name="Preformatted_20_Text"><text:s text:c="19"/><text:span text:style-name="T4"><text:s text:c="4"/>【 전체 워크플로우 요약 】</text:span></text:p>
      <text:p text:style-name="Preformatted_20_Text"/>
      <text:p text:style-name="Preformatted_20_Text"/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>
          <table:table-cell table:style-name="표26.A1" office:value-type="string">
            <text:p text:style-name="P18">단계</text:p>
          </table:table-cell>
          <table:table-cell table:style-name="표26.A1" office:value-type="string">
            <text:p text:style-name="P18">주요 활동</text:p>
          </table:table-cell>
          <table:table-cell table:style-name="표26.A1" office:value-type="string">
            <text:p text:style-name="P18">입력 항목 수</text:p>
          </table:table-cell>
          <table:table-cell table:style-name="표26.D1" office:value-type="string">
            <text:p text:style-name="P18">비고</text:p>
          </table:table-cell>
        </table:table-row>
        <table:table-row table:style-name="표26.2">
          <table:table-cell table:style-name="표26.A2" office:value-type="string">
            <text:p text:style-name="P63">STEP 1</text:p>
            <text:p text:style-name="P63">STEP <text:span text:style-name="T13">2</text:span></text:p>
            <text:p text:style-name="P63">STEP <text:span text:style-name="T13">3</text:span></text:p>
            <text:p text:style-name="P63">STEP <text:span text:style-name="T13">4</text:span></text:p>
            <text:p text:style-name="P63">STEP <text:span text:style-name="T13">5</text:span></text:p>
            <text:p text:style-name="P63">STEP <text:span text:style-name="T13">6</text:span></text:p>
            <text:p text:style-name="P63">STEP <text:span text:style-name="T13">7</text:span></text:p>
            <text:p text:style-name="P63">STEP <text:span text:style-name="T13">8</text:span></text:p>
            <text:p text:style-name="P63">STEP <text:span text:style-name="T13">9</text:span></text:p>
            <text:p text:style-name="P64">STEP 1<text:span text:style-name="T13">0</text:span></text:p>
            <text:p text:style-name="P64">STEP 1<text:span text:style-name="T13">1</text:span></text:p>
          </table:table-cell>
          <table:table-cell table:style-name="표26.A2" office:value-type="string">
            <text:p text:style-name="P62"><text:s/>프로젝트 생성</text:p>
            <text:p text:style-name="P62"><text:s/>Stage 1 전략 수립</text:p>
            <text:p text:style-name="P62"><text:s/>Stage 2 설계 정의 <text:s text:c="2"/></text:p>
            <text:p text:style-name="P62"><text:s/>Stage 3 솔루션 구축</text:p>
            <text:p text:style-name="P62"><text:s/>Stage 4 파일럿/확산 </text:p>
            <text:p text:style-name="P62"><text:s/>Stage 5 운영/개선</text:p>
            <text:p text:style-name="P62"><text:s/>MLOps 기술 표준</text:p>
            <text:p text:style-name="P62"><text:s/>인력 구성 계획 </text:p>
            <text:p text:style-name="P62"><text:s/>시나리오 분석</text:p>
            <text:p text:style-name="P62"><text:s/>피드백/승인 </text:p>
            <text:p text:style-name="P62"><text:s/>보고서 생성 </text:p>
          </table:table-cell>
          <table:table-cell table:style-name="표26.A2" office:value-type="string">
            <text:p text:style-name="P62">약 35개</text:p>
            <text:p text:style-name="P62">약 30개+</text:p>
            <text:p text:style-name="P62">약 15개</text:p>
            <text:p text:style-name="P62">약 15개</text:p>
            <text:p text:style-name="P62">약 16개</text:p>
            <text:p text:style-name="P62">약 14개</text:p>
            <text:p text:style-name="P62">약 70-80개</text:p>
            <text:p text:style-name="P62">약 60-65개 </text:p>
            <text:p text:style-name="P62">약 9개</text:p>
            <text:p text:style-name="P62">약 10개</text:p>
            <text:p text:style-name="P62">약 6개</text:p>
          </table:table-cell>
          <table:table-cell table:style-name="표26.D2" office:value-type="string">
            <text:p text:style-name="P42">필수</text:p>
            <text:p text:style-name="P42">필수</text:p>
            <text:p text:style-name="P42">필수</text:p>
            <text:p text:style-name="P42">필수</text:p>
            <text:p text:style-name="P42">필수</text:p>
            <text:p text:style-name="P42">필수</text:p>
            <text:p text:style-name="P42">선택*</text:p>
            <text:p text:style-name="P42">선택*</text:p>
            <text:p text:style-name="P42">필수</text:p>
            <text:p text:style-name="P42">필수</text:p>
            <text:p text:style-name="P42">필수</text:p>
          </table:table-cell>
        </table:table-row>
        <table:table-row>
          <table:table-cell table:style-name="표26.A2" office:value-type="string">
            <text:p text:style-name="P42">합계</text:p>
          </table:table-cell>
          <table:table-cell table:style-name="표26.A2" office:value-type="string">
            <text:p text:style-name="P153"/>
          </table:table-cell>
          <table:table-cell table:style-name="표26.A2" office:value-type="string">
            <text:p text:style-name="P61">약 280-310개</text:p>
          </table:table-cell>
          <table:table-cell table:style-name="표26.D2" office:value-type="string">
            <text:p text:style-name="P140"/>
          </table:table-cell>
        </table:table-row>
      </table:table>
      <text:p text:style-name="Preformatted_20_Text"/>
      <text:p text:style-name="Preformatted_20_Text">* MLOps 기술 표준(STEP 7)과 인력 구성(STEP 8)은 상세 컨설팅 시 입력하며, 간소화된 컨설팅에서는 생략할 수 있다.</text:p>
      <text:p text:style-name="Preformatted_20_Text"/>
      <text:p text:style-name="Preformatted_20_Text"/>
      <text:p text:style-name="P112"><text:s text:c="12"/><text:span text:style-name="T4"><text:s text:c="10"/>【 워크플로우 순서도 】</text:span></text:p>
      <text:p text:style-name="Preformatted_20_Text"/>
      <text:p text:style-name="Preformatted_20_Text"/>
      <text:p text:style-name="Preformatted_20_Text"><draw:g text:anchor-type="paragraph" draw:z-index="0" draw:name="그룹 개체 1" draw:style-name="gr1"><draw:frame draw:style-name="gr2" draw:text-style-name="P154" svg:width="3.253cm" svg:height="1.294cm" svg:x="5.101cm" svg:y="0.228cm"><draw:image xlink:href="Pictures/20000045000010F0000005B9DB2772D8.svm" xlink:type="simple" xlink:show="embed" xlink:actuate="onLoad" draw:mime-type="image/x-svm"><text:p/></draw:image><draw:image xlink:href="Pictures/10000001000000A500000038486C02FA.png" xlink:type="simple" xlink:show="embed" xlink:actuate="onLoad" draw:mime-type="image/png"/></draw:frame><draw:frame draw:style-name="gr2" draw:text-style-name="P154" svg:width="3.255cm" svg:height="1.948cm" svg:x="5.135cm" svg:y="2.214cm"><draw:image xlink:href="Pictures/20000061000010F00000088EE59E7C10.svm" xlink:type="simple" xlink:show="embed" xlink:actuate="onLoad" draw:mime-type="image/x-svm"><text:p/></draw:image><draw:image xlink:href="Pictures/10000001000000A5000000541CE22F4C.png" xlink:type="simple" xlink:show="embed" xlink:actuate="onLoad" draw:mime-type="image/png"/></draw:frame><draw:frame draw:style-name="gr2" draw:text-style-name="P154" svg:width="3.32cm" svg:height="1.872cm" svg:x="5.094cm" svg:y="4.927cm"><draw:image xlink:href="Pictures/20000061000011450000083AD47688F2.svm" xlink:type="simple" xlink:show="embed" xlink:actuate="onLoad" draw:mime-type="image/x-svm"><text:p/></draw:image><draw:image xlink:href="Pictures/10000001000000A8000000515433C684.png" xlink:type="simple" xlink:show="embed" xlink:actuate="onLoad" draw:mime-type="image/png"/></draw:frame><draw:frame draw:style-name="gr2" draw:text-style-name="P154" svg:width="3.255cm" svg:height="1.909cm" svg:x="5.135cm" svg:y="7.508cm"><draw:image xlink:href="Pictures/20000053000010F000000862117D055C.svm" xlink:type="simple" xlink:show="embed" xlink:actuate="onLoad" draw:mime-type="image/x-svm"><text:p/></draw:image><draw:image xlink:href="Pictures/10000001000000A5000000521A556AD2.png" xlink:type="simple" xlink:show="embed" xlink:actuate="onLoad" draw:mime-type="image/png"/></draw:frame><draw:frame draw:style-name="gr2" draw:text-style-name="P154" svg:width="3.253cm" svg:height="1.848cm" svg:x="5.212cm" svg:y="10.171cm"><draw:image xlink:href="Pictures/2000006B000010F00000081FF83DD969.svm" xlink:type="simple" xlink:show="embed" xlink:actuate="onLoad" draw:mime-type="image/x-svm"><text:p/></draw:image><draw:image xlink:href="Pictures/10000001000000A50000005037226316.png" xlink:type="simple" xlink:show="embed" xlink:actuate="onLoad" draw:mime-type="image/png"/></draw:frame><draw:frame draw:style-name="gr2" draw:text-style-name="P154" svg:width="3.253cm" svg:height="1.855cm" svg:x="5.212cm" svg:y="12.704cm"><draw:image xlink:href="Pictures/2000006A000010F0000008255F81A4E9.svm" xlink:type="simple" xlink:show="embed" xlink:actuate="onLoad" draw:mime-type="image/x-svm"><text:p/></draw:image><draw:image xlink:href="Pictures/10000001000000A5000000502DDB6393.png" xlink:type="simple" xlink:show="embed" xlink:actuate="onLoad" draw:mime-type="image/png"/></draw:frame><draw:frame draw:style-name="gr2" draw:text-style-name="P154" svg:width="3.253cm" svg:height="1.294cm" svg:x="5.212cm" svg:y="15.285cm"><draw:image xlink:href="Pictures/2000004E000010F0000005B96BCE7150.svm" xlink:type="simple" xlink:show="embed" xlink:actuate="onLoad" draw:mime-type="image/x-svm"><text:p/></draw:image><draw:image xlink:href="Pictures/10000001000000A5000000385E233370.png" xlink:type="simple" xlink:show="embed" xlink:actuate="onLoad" draw:mime-type="image/png"/></draw:frame><draw:frame draw:style-name="gr2" draw:text-style-name="P154" svg:width="3.253cm" svg:height="1.417cm" svg:x="5.212cm" svg:y="17.364cm"><draw:image xlink:href="Pictures/20000054000010F000000645A8992803.svm" xlink:type="simple" xlink:show="embed" xlink:actuate="onLoad" draw:mime-type="image/x-svm"><text:p/></draw:image><draw:image xlink:href="Pictures/10000001000000A50000003E49C4B16D.png" xlink:type="simple" xlink:show="embed" xlink:actuate="onLoad" draw:mime-type="image/png"/></draw:frame><draw:frame draw:style-name="gr2" draw:text-style-name="P154" svg:width="3.255cm" svg:height="1.295cm" svg:x="5.135cm" svg:y="19.534cm"><draw:image xlink:href="Pictures/2000004B000010F0000005B9AFD82611.svm" xlink:type="simple" xlink:show="embed" xlink:actuate="onLoad" draw:mime-type="image/x-svm"><text:p/></draw:image><draw:image xlink:href="Pictures/10000001000000A500000038144ED984.png" xlink:type="simple" xlink:show="embed" xlink:actuate="onLoad" draw:mime-type="image/png"/></draw:frame><draw:line draw:style-name="gr3" draw:text-style-name="P155" svg:x1="6.726cm" svg:y1="1.488cm" svg:x2="6.726cm" svg:y2="2.392cm"><text:p/></draw:line><draw:line draw:style-name="gr3" draw:text-style-name="P155" svg:x1="6.726cm" svg:y1="4.193cm" svg:x2="6.726cm" svg:y2="5.097cm"><text:p/></draw:line><draw:line draw:style-name="gr3" draw:text-style-name="P155" svg:x1="6.726cm" svg:y1="6.807cm" svg:x2="6.726cm" svg:y2="7.711cm"><text:p/></draw:line><draw:line draw:style-name="gr3" draw:text-style-name="P155" svg:x1="6.726cm" svg:y1="9.421cm" svg:x2="6.726cm" svg:y2="10.325cm"><text:p/></draw:line><draw:line draw:style-name="gr3" draw:text-style-name="P155" svg:x1="6.726cm" svg:y1="12.036cm" svg:x2="6.726cm" svg:y2="12.94cm"><text:p/></draw:line><draw:line draw:style-name="gr3" draw:text-style-name="P155" svg:x1="6.726cm" svg:y1="14.561cm" svg:x2="6.726cm" svg:y2="15.465cm"><text:p/></draw:line><draw:line draw:style-name="gr3" draw:text-style-name="P155" svg:x1="6.726cm" svg:y1="16.541cm" svg:x2="6.726cm" svg:y2="17.445cm"><text:p/></draw:line><draw:line draw:style-name="gr3" draw:text-style-name="P155" svg:x1="6.726cm" svg:y1="18.703cm" svg:x2="6.726cm" svg:y2="19.607cm"><text:p/></draw:line><draw:line draw:style-name="gr3" draw:text-style-name="P155" svg:x1="6.726cm" svg:y1="20.866cm" svg:x2="6.726cm" svg:y2="21.77cm"><text:p/></draw:line><draw:frame draw:style-name="gr2" draw:text-style-name="P154" svg:width="3.255cm" svg:height="1.449cm" svg:x="10.054cm" svg:y="7.781cm"><draw:image xlink:href="Pictures/2000004B000010F000000665118C5AB2.svm" xlink:type="simple" xlink:show="embed" xlink:actuate="onLoad" draw:mime-type="image/x-svm"><text:p/></draw:image><draw:image xlink:href="Pictures/10000001000000A50000003F18DA24DE.png" xlink:type="simple" xlink:show="embed" xlink:actuate="onLoad" draw:mime-type="image/png"/></draw:frame><draw:frame draw:style-name="gr2" draw:text-style-name="P154" svg:width="3.255cm" svg:height="1.442cm" svg:x="10.054cm" svg:y="10.312cm"><draw:image xlink:href="Pictures/20000043000010F000000660D4F96AC6.svm" xlink:type="simple" xlink:show="embed" xlink:actuate="onLoad" draw:mime-type="image/x-svm"><text:p/></draw:image><draw:image xlink:href="Pictures/10000001000000A50000003FF8E0F073.png" xlink:type="simple" xlink:show="embed" xlink:actuate="onLoad" draw:mime-type="image/png"/></draw:frame><draw:line draw:style-name="gr3" draw:text-style-name="P155" svg:x1="9.982cm" svg:y1="10.99cm" svg:x2="8.469cm" svg:y2="10.989cm"><text:p/></draw:line><draw:line draw:style-name="gr3" draw:text-style-name="P155" svg:x1="9.989cm" svg:y1="8.459cm" svg:x2="8.476cm" svg:y2="8.458cm"><text:p/></draw:line><draw:line draw:style-name="gr3" draw:text-style-name="P155" svg:x1="8.431cm" svg:y1="3.123cm" svg:x2="14.144cm" svg:y2="3.078cm"><text:p/></draw:line><draw:line draw:style-name="gr3" draw:text-style-name="P155" svg:x1="14.144cm" svg:y1="3.078cm" svg:x2="14.144cm" svg:y2="10.99cm"><text:p/></draw:line><draw:line draw:style-name="gr3" draw:text-style-name="P155" svg:x1="14.144cm" svg:y1="10.99cm" svg:x2="13.243cm" svg:y2="10.99cm"><text:p/></draw:line><draw:line draw:style-name="gr3" draw:text-style-name="P155" svg:x1="14.152cm" svg:y1="8.458cm" svg:x2="13.251cm" svg:y2="8.458cm"><text:p/></draw:line><draw:frame draw:style-name="gr2" draw:text-style-name="P154" svg:width="3.257cm" svg:height="1.059cm" svg:x="5.135cm" svg:y="21.795cm"><draw:image xlink:href="Pictures/2000003A000010F0000004B66956596A.svm" xlink:type="simple" xlink:show="embed" xlink:actuate="onLoad" draw:mime-type="image/x-svm"><text:p/></draw:image><draw:image xlink:href="Pictures/10000001000000A50000002F1547AB3E.png" xlink:type="simple" xlink:show="embed" xlink:actuate="onLoad" draw:mime-type="image/png"/></draw:frame></draw:g><text:s/></text:p>
      <text:p text:style-name="Preformatted_20_Text"/>
      <text:p text:style-name="Preformatted_20_Text"/>
      <text:p text:style-name="Preformatted_20_Text"/>
      <text:p text:style-name="Preformatted_20_Text"/>
      <text:p text:style-name="P112"><text:s text:c="21"/><text:span text:style-name="T4"><text:s/>【 주요 용어 설명 】</text:span></text:p>
      <text:p text:style-name="Preformatted_20_Text"/>
      <text:p text:style-name="Preformatted_20_Text"/>
      <text:p text:style-name="Preformatted_20_Text">- 성숙도 진단 (Maturity Assessment): 조직의 AI 역량을 4대 영역(전략, 조직,</text:p>
      <text:p text:style-name="Preformatted_20_Text"><text:s text:c="2"/>기술, 프로세스)에서 1~5점으로 평가하는 진단 활동이다.</text:p>
      <text:p text:style-name="Preformatted_20_Text"/>
      <text:p text:style-name="Preformatted_20_Text">- Quick Win: 높은 효과와 쉬운 구현이 가능한 AI 적용 기회로, 초기 성과</text:p>
      <text:p text:style-name="Preformatted_20_Text"><text:s text:c="2"/>창출에 적합한 과제이다.</text:p>
      <text:p text:style-name="Preformatted_20_Text"/>
      <text:p text:style-name="Preformatted_20_Text">- MLOps: 머신러닝 모델의 개발, 배포, 운영을 체계적으로 관리하기 위한</text:p>
      <text:p text:style-name="Preformatted_20_Text"><text:s text:c="2"/>실천 방법론 및 도구 체계이다.</text:p>
      <text:p text:style-name="Preformatted_20_Text"/>
      <text:p text:style-name="Preformatted_20_Text">- Feature Store: ML 모델 학습 및 서빙에 사용되는 특성(Feature)을 중앙에서</text:p>
      <text:p text:style-name="Preformatted_20_Text"><text:s text:c="2"/>관리하고 재사용할 수 있게 하는 저장소이다.</text:p>
      <text:p text:style-name="Preformatted_20_Text"/>
      <text:p text:style-name="Preformatted_20_Text">- XAI (Explainable AI): AI 모델의 의사결정 과정을 인간이 이해할 수 있도록</text:p>
      <text:p text:style-name="Preformatted_20_Text"><text:s text:c="2"/>설명하는 기술이다.</text:p>
      <text:p text:style-name="Preformatted_20_Text"/>
      <text:p text:style-name="Preformatted_20_Text">- 드리프트 (Drift): 모델 학습 시점과 운영 시점의 데이터 분포가 변화하여</text:p>
      <text:p text:style-name="Preformatted_20_Text"><text:s text:c="2"/>모델 성능이 저하되는 현상이다.</text:p>
      <text:p text:style-name="Preformatted_20_Text"/>
      <text:p text:style-name="Preformatted_20_Text">- Canary 배포: 새 버전을 소규모 트래픽에만 먼저 적용하여 문제를 조기에</text:p>
      <text:p text:style-name="Preformatted_20_Text"><text:s text:c="2"/>발견하는 배포 전략이다.</text:p>
      <text:p text:style-name="Preformatted_20_Text"/>
      <text:p text:style-name="Preformatted_20_Text">- CoE (Center of Excellence): AI 전문 역량을 집중시킨 전담 조직으로,</text:p>
      <text:p text:style-name="Preformatted_20_Text"><text:s text:c="2"/>전사 AI 프로젝트를 지원하고 표준을 수립한다.</text:p>
      <text:p text:style-name="Preformatted_20_Text"/>
      <text:p text:style-name="Preformatted_20_Text"/>
      <text:p text:style-name="Preformatted_20_Text"/>
      <text:p text:style-name="Preformatted_20_Text"><text:s text:c="18"/><text:span text:style-name="T4"><text:s text:c="6"/>【 문서 정보 】</text:span></text:p>
      <text:p text:style-name="Preformatted_20_Text"/>
      <text:p text:style-name="Preformatted_20_Text"/>
      <text:p text:style-name="Preformatted_20_Text">작성일: 202<text:span text:style-name="T18">5</text:span>년 <text:span text:style-name="T18">12월 7일</text:span></text:p>
      <text:p text:style-name="Preformatted_20_Text">버전: 1.1</text:p>
      <text:p text:style-name="Preformatted_20_Text">문서명: AI Consulting Platform 컨설턴트 입력 워크플로우 가이드</text:p>
      <text:p text:style-name="Preformatted_20_Text">적용 대상: AI Consulting Assistant Platform v1.0</text:p>
      <text:p text:style-name="P118">Editor: Brian Lee</text:p>
      <text:p text:style-name="Preformatted_20_Text"/>
      <text:p text:style-name="Preformatted_20_Text">본 문서는 AI Consulting Platform에서 컨설턴트가 입력해야 하는 모든 항목을 워크플로우 순서에 따라 정리한 것이다. 각 입력 항목에 대한 상세 설명을 참고하여 정확하고 완전한 데이터를 입력하기 바란다.</text:p>
      <text:p text:style-name="Preformatted_20_Text"/>
      <text:p text:style-name="Preformatted_20_Text"/>
      <text:p text:style-name="Preformatted_20_Text"><text:s text:c="30"/>【 끝 】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" svg:font-family="'Noto Sa'"/>
    <style:font-face style:name="Noto Sans" svg:font-family="'Noto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marker draw:name="화살촉_20_1" draw:display-name="화살촉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KR1" style:font-family-asian="'Noto Serif CJK KR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7T11:31:35.181520531</dc:date>
    <meta:editing-duration>PT7H14M3S</meta:editing-duration>
    <meta:editing-cycles>22</meta:editing-cycles>
    <meta:generator>LibreOffice/24.2.7.2$Linux_X86_64 LibreOffice_project/420$Build-2</meta:generator>
    <meta:document-statistic meta:table-count="49" meta:image-count="0" meta:object-count="0" meta:page-count="33" meta:paragraph-count="1893" meta:word-count="12739" meta:character-count="27879" meta:non-whitespace-character-count="23866"/>
  </office:meta>
</office:document-meta>
</file>